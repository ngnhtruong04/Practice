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819in" table:align="left"/>
    </style:style>
    <style:style style:name="Table1.A" style:family="table-column">
      <style:table-column-properties style:column-width="0.8521in"/>
    </style:style>
    <style:style style:name="Table1.B" style:family="table-column">
      <style:table-column-properties style:column-width="1.3708in"/>
    </style:style>
    <style:style style:name="Table1.C" style:family="table-column">
      <style:table-column-properties style:column-width="1.35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063in" table:align="left"/>
    </style:style>
    <style:style style:name="Table2.A" style:family="table-column">
      <style:table-column-properties style:column-width="0.6576in"/>
    </style:style>
    <style:style style:name="Table2.B" style:family="table-column">
      <style:table-column-properties style:column-width="1.3313in"/>
    </style:style>
    <style:style style:name="Table2.C" style:family="table-column">
      <style:table-column-properties style:column-width="1.1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691in" table:align="left"/>
    </style:style>
    <style:style style:name="Table3.A" style:family="table-column">
      <style:table-column-properties style:column-width="1.0792in"/>
    </style:style>
    <style:style style:name="Table3.B" style:family="table-column">
      <style:table-column-properties style:column-width="1.1007in"/>
    </style:style>
    <style:style style:name="Table3.C" style:family="table-column">
      <style:table-column-properties style:column-width="1.2306in"/>
    </style:style>
    <style:style style:name="Table3.D" style:family="table-column">
      <style:table-column-properties style:column-width="1.280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4625in" table:align="left"/>
    </style:style>
    <style:style style:name="Table4.A" style:family="table-column">
      <style:table-column-properties style:column-width="1.0375in"/>
    </style:style>
    <style:style style:name="Table4.B" style:family="table-column">
      <style:table-column-properties style:column-width="1.4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1354in" table:align="left"/>
    </style:style>
    <style:style style:name="Table5.A" style:family="table-column">
      <style:table-column-properties style:column-width="1.1069in"/>
    </style:style>
    <style:style style:name="Table5.B" style:family="table-column">
      <style:table-column-properties style:column-width="2.0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2986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0.798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521in" table:align="left"/>
    </style:style>
    <style:style style:name="Table7.A" style:family="table-column">
      <style:table-column-properties style:column-width="1.1757in"/>
    </style:style>
    <style:style style:name="Table7.B" style:family="table-column">
      <style:table-column-properties style:column-width="1.47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75in" table:align="left"/>
    </style:style>
    <style:style style:name="Table8.A" style:family="table-column">
      <style:table-column-properties style:column-width="1.4208in"/>
    </style:style>
    <style:style style:name="Table8.B" style:family="table-column">
      <style:table-column-properties style:column-width="1.1097in"/>
    </style:style>
    <style:style style:name="Table8.C" style:family="table-column">
      <style:table-column-properties style:column-width="1.219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6639in" table:align="left"/>
    </style:style>
    <style:style style:name="Table9.A" style:family="table-column">
      <style:table-column-properties style:column-width="0.884in"/>
    </style:style>
    <style:style style:name="Table9.B" style:family="table-column">
      <style:table-column-properties style:column-width="0.779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4736in" table:align="left"/>
    </style:style>
    <style:style style:name="Table10.A" style:family="table-column">
      <style:table-column-properties style:column-width="1.2722in"/>
    </style:style>
    <style:style style:name="Table10.B" style:family="table-column">
      <style:table-column-properties style:column-width="1.201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8736in" table:align="left"/>
    </style:style>
    <style:style style:name="Table11.A" style:family="table-column">
      <style:table-column-properties style:column-width="1.1069in"/>
    </style:style>
    <style:style style:name="Table11.B" style:family="table-column">
      <style:table-column-properties style:column-width="1.7667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3396in" table:align="left"/>
    </style:style>
    <style:style style:name="Table12.A" style:family="table-column">
      <style:table-column-properties style:column-width="1.259in"/>
    </style:style>
    <style:style style:name="Table12.B" style:family="table-column">
      <style:table-column-properties style:column-width="1.080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5944in" table:align="left"/>
    </style:style>
    <style:style style:name="Table13.A" style:family="table-column">
      <style:table-column-properties style:column-width="1.2451in"/>
    </style:style>
    <style:style style:name="Table13.B" style:family="table-column">
      <style:table-column-properties style:column-width="1.3493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3pt" officeooo:rsid="000d7ced" officeooo:paragraph-rsid="000d7ced" style:font-size-asian="13pt" style:font-size-complex="13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Heading_20_1">
      <style:text-properties fo:font-size="13pt" officeooo:rsid="000d7ced" officeooo:paragraph-rsid="000d7ced" style:font-size-asian="13pt" style:font-size-complex="13pt"/>
    </style:style>
    <style:style style:name="P4" style:family="paragraph" style:parent-style-name="Heading_20_2">
      <style:text-properties fo:font-size="13pt" officeooo:rsid="000d7ced" style:font-size-asian="13pt" style:font-size-complex="13pt"/>
    </style:style>
    <style:style style:name="P5" style:family="paragraph" style:parent-style-name="Heading_20_3">
      <style:text-properties fo:font-size="13pt" officeooo:rsid="000d7ced" style:font-size-asian="13pt" style:font-size-complex="13pt"/>
    </style:style>
    <style:style style:name="P6" style:family="paragraph" style:parent-style-name="Text_20_body">
      <style:text-properties fo:font-size="13pt" officeooo:rsid="000d7ced" style:font-size-asian="13pt" style:font-size-complex="13pt"/>
    </style:style>
    <style:style style:name="P7" style:family="paragraph" style:parent-style-name="Text_20_body" style:list-style-name="L1">
      <style:text-properties fo:font-size="13pt" officeooo:rsid="000d7ced" style:font-size-asian="13pt" style:font-size-complex="13pt"/>
    </style:style>
    <style:style style:name="P8" style:family="paragraph" style:parent-style-name="Text_20_body" style:list-style-name="L2">
      <style:text-properties fo:font-size="13pt" officeooo:rsid="000d7ced" style:font-size-asian="13pt" style:font-size-complex="13pt"/>
    </style:style>
    <style:style style:name="P9" style:family="paragraph" style:parent-style-name="Text_20_body">
      <style:paragraph-properties fo:break-before="page"/>
      <style:text-properties fo:font-size="13pt" officeooo:rsid="000d7ced" style:font-size-asian="13pt" style:font-size-complex="13pt"/>
    </style:style>
    <style:style style:name="P10" style:family="paragraph" style:parent-style-name="Preformatted_20_Text">
      <style:text-properties fo:font-size="13pt" officeooo:rsid="000d7ced" style:font-size-asian="13pt" style:font-size-complex="13pt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size="13pt" officeooo:rsid="000d7ced" style:font-size-asian="13pt" style:font-size-complex="13pt"/>
    </style:style>
    <style:style style:name="P12" style:family="paragraph" style:parent-style-name="Horizontal_20_Line">
      <style:text-properties fo:font-size="13pt" officeooo:rsid="000d7ced" style:font-size-asian="13pt" style:font-size-complex="13pt"/>
    </style:style>
    <style:style style:name="P13" style:family="paragraph" style:parent-style-name="Heading_20_1">
      <style:text-properties fo:font-size="13pt" officeooo:rsid="000d7ced" style:font-size-asian="13pt" style:font-size-complex="13pt"/>
    </style:style>
    <style:style style:name="P14" style:family="paragraph" style:parent-style-name="Quotations">
      <style:text-properties fo:font-size="13pt" officeooo:rsid="000d7ced" style:font-size-asian="13pt" style:font-size-complex="13pt"/>
    </style:style>
    <style:style style:name="P15" style:family="paragraph" style:parent-style-name="Text_20_body" style:list-style-name="L3">
      <style:text-properties fo:font-size="13pt" officeooo:rsid="000d7ced" style:font-size-asian="13pt" style:font-size-complex="13pt"/>
    </style:style>
    <style:style style:name="P16" style:family="paragraph" style:parent-style-name="Text_20_body" style:list-style-name="L4">
      <style:text-properties fo:font-size="13pt" officeooo:rsid="000d7ced" style:font-size-asian="13pt" style:font-size-complex="13pt"/>
    </style:style>
    <style:style style:name="P17" style:family="paragraph" style:parent-style-name="Text_20_body" style:list-style-name="L5">
      <style:text-properties fo:font-size="13pt" officeooo:rsid="000d7ced" style:font-size-asian="13pt" style:font-size-complex="13pt"/>
    </style:style>
    <style:style style:name="P18" style:family="paragraph" style:parent-style-name="Text_20_body" style:list-style-name="L6">
      <style:text-properties fo:font-size="13pt" officeooo:rsid="000d7ced" style:font-size-asian="13pt" style:font-size-complex="13pt"/>
    </style:style>
    <style:style style:name="P19" style:family="paragraph" style:parent-style-name="Text_20_body" style:list-style-name="L7">
      <style:text-properties fo:font-size="13pt" officeooo:rsid="000d7ced" style:font-size-asian="13pt" style:font-size-complex="13pt"/>
    </style:style>
    <style:style style:name="P20" style:family="paragraph" style:parent-style-name="Text_20_body" style:list-style-name="L8">
      <style:text-properties fo:font-size="13pt" officeooo:rsid="000d7ced" style:font-size-asian="13pt" style:font-size-complex="13pt"/>
    </style:style>
    <style:style style:name="P21" style:family="paragraph" style:parent-style-name="Text_20_body" style:list-style-name="L9">
      <style:text-properties fo:font-size="13pt" officeooo:rsid="000d7ced" style:font-size-asian="13pt" style:font-size-complex="13pt"/>
    </style:style>
    <style:style style:name="P22" style:family="paragraph" style:parent-style-name="Text_20_body" style:list-style-name="L10">
      <style:text-properties fo:font-size="13pt" officeooo:rsid="000d7ced" style:font-size-asian="13pt" style:font-size-complex="13pt"/>
    </style:style>
    <style:style style:name="P23" style:family="paragraph" style:parent-style-name="Text_20_body" style:list-style-name="L11">
      <style:text-properties fo:font-size="13pt" officeooo:rsid="000d7ced" style:font-size-asian="13pt" style:font-size-complex="13pt"/>
    </style:style>
    <style:style style:name="P24" style:family="paragraph" style:parent-style-name="Text_20_body" style:list-style-name="L12">
      <style:text-properties fo:font-size="13pt" officeooo:rsid="000d7ced" style:font-size-asian="13pt" style:font-size-complex="13pt"/>
    </style:style>
    <style:style style:name="P25" style:family="paragraph" style:parent-style-name="Text_20_body" style:list-style-name="L13">
      <style:text-properties fo:font-size="13pt" officeooo:rsid="000d7ced" style:font-size-asian="13pt" style:font-size-complex="13pt"/>
    </style:style>
    <style:style style:name="P26" style:family="paragraph" style:parent-style-name="Text_20_body" style:list-style-name="L14">
      <style:text-properties fo:font-size="13pt" officeooo:rsid="000d7ced" style:font-size-asian="13pt" style:font-size-complex="13pt"/>
    </style:style>
    <style:style style:name="P27" style:family="paragraph" style:parent-style-name="Text_20_body" style:list-style-name="L15">
      <style:text-properties fo:font-size="13pt" officeooo:rsid="000d7ced" style:font-size-asian="13pt" style:font-size-complex="13pt"/>
    </style:style>
    <style:style style:name="P28" style:family="paragraph" style:parent-style-name="Text_20_body" style:list-style-name="L16">
      <style:text-properties fo:font-size="13pt" officeooo:rsid="000d7ced" style:font-size-asian="13pt" style:font-size-complex="13pt"/>
    </style:style>
    <style:style style:name="P29" style:family="paragraph" style:parent-style-name="Text_20_body" style:list-style-name="L17">
      <style:text-properties fo:font-size="13pt" officeooo:rsid="000d7ced" style:font-size-asian="13pt" style:font-size-complex="13pt"/>
    </style:style>
    <style:style style:name="P30" style:family="paragraph" style:parent-style-name="Text_20_body" style:list-style-name="L18">
      <style:text-properties fo:font-size="13pt" officeooo:rsid="000d7ced" style:font-size-asian="13pt" style:font-size-complex="13pt"/>
    </style:style>
    <style:style style:name="P31" style:family="paragraph" style:parent-style-name="Text_20_body" style:list-style-name="L19">
      <style:text-properties fo:font-size="13pt" officeooo:rsid="000d7ced" style:font-size-asian="13pt" style:font-size-complex="13pt"/>
    </style:style>
    <style:style style:name="P32" style:family="paragraph" style:parent-style-name="Text_20_body" style:list-style-name="L20">
      <style:text-properties fo:font-size="13pt" officeooo:rsid="000d7ced" style:font-size-asian="13pt" style:font-size-complex="13pt"/>
    </style:style>
    <style:style style:name="P33" style:family="paragraph" style:parent-style-name="Text_20_body" style:list-style-name="L21">
      <style:text-properties fo:font-size="13pt" officeooo:rsid="000d7ced" style:font-size-asian="13pt" style:font-size-complex="13pt"/>
    </style:style>
    <style:style style:name="P34" style:family="paragraph" style:parent-style-name="Text_20_body" style:list-style-name="L22">
      <style:text-properties fo:font-size="13pt" officeooo:rsid="000d7ced" style:font-size-asian="13pt" style:font-size-complex="13pt"/>
    </style:style>
    <style:style style:name="P35" style:family="paragraph" style:parent-style-name="Text_20_body" style:list-style-name="L23">
      <style:text-properties fo:font-size="13pt" officeooo:rsid="000d7ced" style:font-size-asian="13pt" style:font-size-complex="13pt"/>
    </style:style>
    <style:style style:name="P36" style:family="paragraph" style:parent-style-name="Text_20_body" style:list-style-name="L24">
      <style:text-properties fo:font-size="13pt" officeooo:rsid="000d7ced" style:font-size-asian="13pt" style:font-size-complex="13pt"/>
    </style:style>
    <style:style style:name="P37" style:family="paragraph" style:parent-style-name="Text_20_body" style:list-style-name="L25">
      <style:text-properties fo:font-size="13pt" officeooo:rsid="000d7ced" style:font-size-asian="13pt" style:font-size-complex="13pt"/>
    </style:style>
    <style:style style:name="P38" style:family="paragraph" style:parent-style-name="Text_20_body" style:list-style-name="L26">
      <style:text-properties fo:font-size="13pt" officeooo:rsid="000d7ced" style:font-size-asian="13pt" style:font-size-complex="13pt"/>
    </style:style>
    <style:style style:name="P39" style:family="paragraph" style:parent-style-name="Text_20_body" style:list-style-name="L27">
      <style:text-properties fo:font-size="13pt" officeooo:rsid="000d7ced" style:font-size-asian="13pt" style:font-size-complex="13pt"/>
    </style:style>
    <style:style style:name="P40" style:family="paragraph" style:parent-style-name="Text_20_body" style:list-style-name="L28">
      <style:text-properties fo:font-size="13pt" officeooo:rsid="000d7ced" style:font-size-asian="13pt" style:font-size-complex="13pt"/>
    </style:style>
    <style:style style:name="P41" style:family="paragraph" style:parent-style-name="Text_20_body" style:list-style-name="L29">
      <style:text-properties fo:font-size="13pt" officeooo:rsid="000d7ced" style:font-size-asian="13pt" style:font-size-complex="13pt"/>
    </style:style>
    <style:style style:name="P42" style:family="paragraph" style:parent-style-name="Text_20_body" style:list-style-name="L30">
      <style:text-properties fo:font-size="13pt" officeooo:rsid="000d7ced" style:font-size-asian="13pt" style:font-size-complex="13pt"/>
    </style:style>
    <style:style style:name="P43" style:family="paragraph" style:parent-style-name="Text_20_body" style:list-style-name="L31">
      <style:text-properties fo:font-size="13pt" officeooo:rsid="000d7ced" style:font-size-asian="13pt" style:font-size-complex="13pt"/>
    </style:style>
    <style:style style:name="P44" style:family="paragraph" style:parent-style-name="Text_20_body" style:list-style-name="L32">
      <style:text-properties fo:font-size="13pt" officeooo:rsid="000d7ced" style:font-size-asian="13pt" style:font-size-complex="13pt"/>
    </style:style>
    <style:style style:name="P45" style:family="paragraph" style:parent-style-name="Text_20_body" style:list-style-name="L33">
      <style:text-properties fo:font-size="13pt" officeooo:rsid="000d7ced" style:font-size-asian="13pt" style:font-size-complex="13pt"/>
    </style:style>
    <style:style style:name="P46" style:family="paragraph" style:parent-style-name="Text_20_body" style:list-style-name="L34">
      <style:text-properties fo:font-size="13pt" officeooo:rsid="000d7ced" style:font-size-asian="13pt" style:font-size-complex="13pt"/>
    </style:style>
    <style:style style:name="P47" style:family="paragraph" style:parent-style-name="Text_20_body" style:list-style-name="L35">
      <style:text-properties fo:font-size="13pt" officeooo:rsid="000d7ced" style:font-size-asian="13pt" style:font-size-complex="13pt"/>
    </style:style>
    <style:style style:name="P48" style:family="paragraph" style:parent-style-name="Text_20_body" style:list-style-name="L36">
      <style:text-properties fo:font-size="13pt" officeooo:rsid="000d7ced" style:font-size-asian="13pt" style:font-size-complex="13pt"/>
    </style:style>
    <style:style style:name="P49" style:family="paragraph" style:parent-style-name="Text_20_body" style:list-style-name="L37">
      <style:text-properties fo:font-size="13pt" officeooo:rsid="000d7ced" style:font-size-asian="13pt" style:font-size-complex="13pt"/>
    </style:style>
    <style:style style:name="P50" style:family="paragraph" style:parent-style-name="Text_20_body" style:list-style-name="L38">
      <style:text-properties fo:font-size="13pt" officeooo:rsid="000d7ced" style:font-size-asian="13pt" style:font-size-complex="13pt"/>
    </style:style>
    <style:style style:name="P51" style:family="paragraph" style:parent-style-name="Text_20_body" style:list-style-name="L39">
      <style:text-properties fo:font-size="13pt" officeooo:rsid="000d7ced" style:font-size-asian="13pt" style:font-size-complex="13pt"/>
    </style:style>
    <style:style style:name="P52" style:family="paragraph" style:parent-style-name="Text_20_body" style:list-style-name="L40">
      <style:text-properties fo:font-size="13pt" officeooo:rsid="000d7ced" style:font-size-asian="13pt" style:font-size-complex="13pt"/>
    </style:style>
    <style:style style:name="P53" style:family="paragraph" style:parent-style-name="Text_20_body" style:list-style-name="L41">
      <style:text-properties fo:font-size="13pt" officeooo:rsid="000d7ced" style:font-size-asian="13pt" style:font-size-complex="13pt"/>
    </style:style>
    <style:style style:name="P54" style:family="paragraph" style:parent-style-name="Text_20_body" style:list-style-name="L42">
      <style:text-properties fo:font-size="13pt" officeooo:rsid="000d7ced" style:font-size-asian="13pt" style:font-size-complex="13pt"/>
    </style:style>
    <style:style style:name="P55" style:family="paragraph" style:parent-style-name="Text_20_body" style:list-style-name="L43">
      <style:text-properties fo:font-size="13pt" officeooo:rsid="000d7ced" style:font-size-asian="13pt" style:font-size-complex="13pt"/>
    </style:style>
    <style:style style:name="P56" style:family="paragraph" style:parent-style-name="Text_20_body" style:list-style-name="L44">
      <style:text-properties fo:font-size="13pt" officeooo:rsid="000d7ced" style:font-size-asian="13pt" style:font-size-complex="13pt"/>
    </style:style>
    <style:style style:name="P57" style:family="paragraph" style:parent-style-name="Text_20_body" style:list-style-name="L45">
      <style:text-properties fo:font-size="13pt" officeooo:rsid="000d7ced" style:font-size-asian="13pt" style:font-size-complex="13pt"/>
    </style:style>
    <style:style style:name="P58" style:family="paragraph" style:parent-style-name="Text_20_body" style:list-style-name="L46">
      <style:text-properties fo:font-size="13pt" officeooo:rsid="000d7ced" style:font-size-asian="13pt" style:font-size-complex="13pt"/>
    </style:style>
    <style:style style:name="P59" style:family="paragraph" style:parent-style-name="Text_20_body" style:list-style-name="L47">
      <style:text-properties fo:font-size="13pt" officeooo:rsid="000d7ced" style:font-size-asian="13pt" style:font-size-complex="13pt"/>
    </style:style>
    <style:style style:name="P60" style:family="paragraph" style:parent-style-name="Text_20_body" style:list-style-name="L48">
      <style:text-properties fo:font-size="13pt" officeooo:rsid="000d7ced" style:font-size-asian="13pt" style:font-size-complex="13pt"/>
    </style:style>
    <style:style style:name="P61" style:family="paragraph" style:parent-style-name="Text_20_body" style:list-style-name="L49">
      <style:text-properties fo:font-size="13pt" officeooo:rsid="000d7ced" style:font-size-asian="13pt" style:font-size-complex="13pt"/>
    </style:style>
    <style:style style:name="P62" style:family="paragraph" style:parent-style-name="Text_20_body" style:list-style-name="L50">
      <style:text-properties fo:font-size="13pt" officeooo:rsid="000d7ced" style:font-size-asian="13pt" style:font-size-complex="13pt"/>
    </style:style>
    <style:style style:name="P63" style:family="paragraph" style:parent-style-name="Text_20_body" style:list-style-name="L51">
      <style:text-properties fo:font-size="13pt" officeooo:rsid="000d7ced" style:font-size-asian="13pt" style:font-size-complex="13pt"/>
    </style:style>
    <style:style style:name="P64" style:family="paragraph" style:parent-style-name="Text_20_body" style:list-style-name="L52">
      <style:text-properties fo:font-size="13pt" officeooo:rsid="000d7ced" style:font-size-asian="13pt" style:font-size-complex="13pt"/>
    </style:style>
    <style:style style:name="P65" style:family="paragraph" style:parent-style-name="Text_20_body" style:list-style-name="L53">
      <style:text-properties fo:font-size="13pt" officeooo:rsid="000d7ced" style:font-size-asian="13pt" style:font-size-complex="13pt"/>
    </style:style>
    <style:style style:name="P66" style:family="paragraph" style:parent-style-name="Text_20_body" style:list-style-name="L54">
      <style:text-properties fo:font-size="13pt" officeooo:rsid="000d7ced" style:font-size-asian="13pt" style:font-size-complex="13pt"/>
    </style:style>
    <style:style style:name="P67" style:family="paragraph" style:parent-style-name="Text_20_body" style:list-style-name="L55">
      <style:text-properties fo:font-size="13pt" officeooo:rsid="000d7ced" style:font-size-asian="13pt" style:font-size-complex="13pt"/>
    </style:style>
    <style:style style:name="P68" style:family="paragraph" style:parent-style-name="Text_20_body" style:list-style-name="L56">
      <style:text-properties fo:font-size="13pt" officeooo:rsid="000d7ced" style:font-size-asian="13pt" style:font-size-complex="13pt"/>
    </style:style>
    <style:style style:name="P69" style:family="paragraph" style:parent-style-name="Text_20_body" style:list-style-name="L57">
      <style:text-properties fo:font-size="13pt" officeooo:rsid="000d7ced" style:font-size-asian="13pt" style:font-size-complex="13pt"/>
    </style:style>
    <style:style style:name="P70" style:family="paragraph" style:parent-style-name="Text_20_body" style:list-style-name="L58">
      <style:text-properties fo:font-size="13pt" officeooo:rsid="000d7ced" style:font-size-asian="13pt" style:font-size-complex="13pt"/>
    </style:style>
    <style:style style:name="P71" style:family="paragraph" style:parent-style-name="Text_20_body" style:list-style-name="L59">
      <style:text-properties fo:font-size="13pt" officeooo:rsid="000d7ced" style:font-size-asian="13pt" style:font-size-complex="13pt"/>
    </style:style>
    <style:style style:name="P72" style:family="paragraph" style:parent-style-name="Text_20_body" style:list-style-name="L60">
      <style:text-properties fo:font-size="13pt" officeooo:rsid="000d7ced" style:font-size-asian="13pt" style:font-size-complex="13pt"/>
    </style:style>
    <style:style style:name="P73" style:family="paragraph" style:parent-style-name="Text_20_body" style:list-style-name="L61">
      <style:text-properties fo:font-size="13pt" officeooo:rsid="000d7ced" style:font-size-asian="13pt" style:font-size-complex="13pt"/>
    </style:style>
    <style:style style:name="P74" style:family="paragraph" style:parent-style-name="Text_20_body" style:list-style-name="L62">
      <style:text-properties fo:font-size="13pt" officeooo:rsid="000d7ced" style:font-size-asian="13pt" style:font-size-complex="13pt"/>
    </style:style>
    <style:style style:name="P75" style:family="paragraph" style:parent-style-name="Text_20_body" style:list-style-name="L63">
      <style:text-properties fo:font-size="13pt" officeooo:rsid="000d7ced" style:font-size-asian="13pt" style:font-size-complex="13pt"/>
    </style:style>
    <style:style style:name="P76" style:family="paragraph" style:parent-style-name="Standard">
      <style:text-properties fo:font-size="13pt" officeooo:rsid="000f21bb" officeooo:paragraph-rsid="000f21bb" style:font-size-asian="13pt" style:font-size-complex="13pt"/>
    </style:style>
    <style:style style:name="P77" style:family="paragraph" style:parent-style-name="Heading_20_1">
      <style:text-properties fo:font-size="13pt" officeooo:rsid="000f21bb" officeooo:paragraph-rsid="000f21bb" style:font-size-asian="13pt" style:font-size-complex="13pt"/>
    </style:style>
    <style:style style:name="P78" style:family="paragraph" style:parent-style-name="Heading_20_1">
      <style:text-properties fo:font-size="13pt" officeooo:rsid="000f21bb" style:font-size-asian="13pt" style:font-size-complex="13pt"/>
    </style:style>
    <style:style style:name="P79" style:family="paragraph" style:parent-style-name="Text_20_body">
      <style:text-properties fo:font-size="13pt" officeooo:rsid="000f21bb" style:font-size-asian="13pt" style:font-size-complex="13pt"/>
    </style:style>
    <style:style style:name="P80" style:family="paragraph" style:parent-style-name="Text_20_body" style:list-style-name="L64">
      <style:text-properties fo:font-size="13pt" officeooo:rsid="000f21bb" style:font-size-asian="13pt" style:font-size-complex="13pt"/>
    </style:style>
    <style:style style:name="P81" style:family="paragraph" style:parent-style-name="Horizontal_20_Line">
      <style:text-properties fo:font-size="13pt" officeooo:rsid="000f21bb" style:font-size-asian="13pt" style:font-size-complex="13pt"/>
    </style:style>
    <style:style style:name="P82" style:family="paragraph" style:parent-style-name="Text_20_body" style:list-style-name="L65">
      <style:text-properties fo:font-size="13pt" officeooo:rsid="000f21bb" style:font-size-asian="13pt" style:font-size-complex="13pt"/>
    </style:style>
    <style:style style:name="P83" style:family="paragraph" style:parent-style-name="Preformatted_20_Text">
      <style:text-properties fo:font-size="13pt" officeooo:rsid="000f21bb" style:font-size-asian="13pt" style:font-size-complex="13pt"/>
    </style:style>
    <style:style style:name="P84" style:family="paragraph" style:parent-style-name="Preformatted_20_Text">
      <style:paragraph-properties fo:margin-top="0in" fo:margin-bottom="0.1965in" style:contextual-spacing="false"/>
      <style:text-properties fo:font-size="13pt" officeooo:rsid="000f21bb" style:font-size-asian="13pt" style:font-size-complex="13pt"/>
    </style:style>
    <style:style style:name="P85" style:family="paragraph" style:parent-style-name="Heading_20_2">
      <style:text-properties fo:font-size="13pt" officeooo:rsid="000f21bb" style:font-size-asian="13pt" style:font-size-complex="13pt"/>
    </style:style>
    <style:style style:name="P86" style:family="paragraph" style:parent-style-name="Text_20_body" style:list-style-name="L66">
      <style:text-properties fo:font-size="13pt" officeooo:rsid="000f21bb" style:font-size-asian="13pt" style:font-size-complex="13pt"/>
    </style:style>
    <style:style style:name="P87" style:family="paragraph" style:parent-style-name="Text_20_body" style:list-style-name="L67">
      <style:text-properties fo:font-size="13pt" officeooo:rsid="000f21bb" style:font-size-asian="13pt" style:font-size-complex="13pt"/>
    </style:style>
    <style:style style:name="P88" style:family="paragraph" style:parent-style-name="Text_20_body" style:list-style-name="L68">
      <style:text-properties fo:font-size="13pt" officeooo:rsid="000f21bb" style:font-size-asian="13pt" style:font-size-complex="13pt"/>
    </style:style>
    <style:style style:name="P89" style:family="paragraph" style:parent-style-name="Text_20_body" style:list-style-name="L69">
      <style:text-properties fo:font-size="13pt" officeooo:rsid="000f21bb" style:font-size-asian="13pt" style:font-size-complex="13pt"/>
    </style:style>
    <style:style style:name="P90" style:family="paragraph" style:parent-style-name="Text_20_body" style:list-style-name="L70">
      <style:text-properties fo:font-size="13pt" officeooo:rsid="000f21bb" style:font-size-asian="13pt" style:font-size-complex="13pt"/>
    </style:style>
    <style:style style:name="P91" style:family="paragraph" style:parent-style-name="Text_20_body" style:list-style-name="L71">
      <style:text-properties fo:font-size="13pt" officeooo:rsid="000f21bb" style:font-size-asian="13pt" style:font-size-complex="13pt"/>
    </style:style>
    <style:style style:name="P92" style:family="paragraph" style:parent-style-name="Text_20_body" style:list-style-name="L72">
      <style:text-properties fo:font-size="13pt" officeooo:rsid="000f21bb" style:font-size-asian="13pt" style:font-size-complex="13pt"/>
    </style:style>
    <style:style style:name="P93" style:family="paragraph" style:parent-style-name="Text_20_body" style:list-style-name="L73">
      <style:text-properties fo:font-size="13pt" officeooo:rsid="000f21bb" style:font-size-asian="13pt" style:font-size-complex="13pt"/>
    </style:style>
    <style:style style:name="P94" style:family="paragraph" style:parent-style-name="Text_20_body" style:list-style-name="L74">
      <style:text-properties fo:font-size="13pt" officeooo:rsid="000f21bb" style:font-size-asian="13pt" style:font-size-complex="13pt"/>
    </style:style>
    <style:style style:name="P95" style:family="paragraph" style:parent-style-name="Standard">
      <style:paragraph-properties fo:text-align="center" style:justify-single-word="false"/>
      <style:text-properties fo:font-size="13pt" officeooo:rsid="000f21bb" officeooo:paragraph-rsid="000f21bb" style:font-size-asian="13pt" style:font-size-complex="13pt"/>
    </style:style>
    <style:style style:name="P96" style:family="paragraph" style:parent-style-name="Text_20_body" style:list-style-name="L75">
      <style:text-properties fo:font-size="13pt" officeooo:rsid="000f21bb" style:font-size-asian="13pt" style:font-size-complex="13pt"/>
    </style:style>
    <style:style style:name="P97" style:family="paragraph" style:parent-style-name="Text_20_body" style:list-style-name="L76">
      <style:text-properties fo:font-size="13pt" officeooo:rsid="000f21bb" style:font-size-asian="13pt" style:font-size-complex="13pt"/>
    </style:style>
    <style:style style:name="P98" style:family="paragraph" style:parent-style-name="Text_20_body" style:list-style-name="L77">
      <style:text-properties fo:font-size="13pt" officeooo:rsid="000f21bb" style:font-size-asian="13pt" style:font-size-complex="13pt"/>
    </style:style>
    <style:style style:name="P99" style:family="paragraph" style:parent-style-name="Text_20_body" style:list-style-name="L78">
      <style:text-properties fo:font-size="13pt" officeooo:rsid="000f21bb" style:font-size-asian="13pt" style:font-size-complex="13pt"/>
    </style:style>
    <style:style style:name="P100" style:family="paragraph" style:parent-style-name="Text_20_body" style:list-style-name="L79">
      <style:text-properties fo:font-size="13pt" officeooo:rsid="000f21bb" style:font-size-asian="13pt" style:font-size-complex="13pt"/>
    </style:style>
    <style:style style:name="T1" style:family="text">
      <style:text-properties fo:color="#000000" loext:opacity="100%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family="Arial" style:font-family-generic="roman" style:font-pitch="variable" fo:font-style="normal" fo:text-shadow="none" fo:font-weight="bold" style:font-style-asian="normal" style:font-weight-asian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family="Arial" style:font-family-generic="roman" style:font-pitch="variable" fo:font-style="normal" fo:text-shadow="none" fo:font-weight="bold" officeooo:rsid="000d7ced" style:font-style-asian="normal" style:font-weight-asian="bold" style:text-emphasiz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ab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5: 17/07/2026</text:p>
      <text:p text:style-name="P1"/>
      <text:p text:style-name="P2" loext:marker-style-name="T1"><text:span text:style-name="T2">LangChain and LangGraph Specialization </text:span><text:span text:style-name="T3">&amp;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 </text:span><text:span text:style-name="T3">L</text:span><text:span text:style-name="T3">o</text:span><text:span text:style-name="T3">a</text:span><text:span text:style-name="T3">d</text:span><text:span text:style-name="T3">e</text:span><text:span text:style-name="T3">r</text:span></text:p>
      <text:p text:style-name="P1"/>
      <text:p text:style-name="P1"/>
      <text:h text:style-name="Heading_20_1" text:outline-level="1">1. Introduction to LangChain &amp; Document Loading</text:h>
      <text:p text:style-name="P1"/>
      <text:h text:style-name="P3" text:outline-level="1">Giáo trình học: Introduction to LangChain &amp; Document Loading</text:h>
      <text:h text:style-name="P4" text:outline-level="2">1. Tổng quan LangChain</text:h>
      <text:h text:style-name="P4" text:outline-level="2">1.1. LangChain là gì?</text:h>
      <text:h text:style-name="P5" text:outline-level="3">Khái niệm</text:h>
      <text:p text:style-name="P6"><text:span text:style-name="Strong_20_Emphasis">LangChain</text:span> là một framework mã nguồn mở giúp xây dựng các ứng dụng sử dụng Large Language Models (LLMs) bằng cách kết nối LLM với:</text:p>
      <text:list text:style-name="L1">
        <text:list-item>
          <text:p text:style-name="P7">External data sources</text:p>
        </text:list-item>
        <text:list-item>
          <text:p text:style-name="P7">APIs</text:p>
        </text:list-item>
        <text:list-item>
          <text:p text:style-name="P7">Databases</text:p>
        </text:list-item>
        <text:list-item>
          <text:p text:style-name="P7">Vector databases</text:p>
        </text:list-item>
        <text:list-item>
          <text:p text:style-name="P7">Tools</text:p>
        </text:list-item>
        <text:list-item>
          <text:p text:style-name="P7">Memory</text:p>
        </text:list-item>
        <text:list-item>
          <text:p text:style-name="P7">Agents</text:p>
        </text:list-item>
      </text:list>
      <text:p text:style-name="P6">LLM bản thân chỉ có khả năng xử lý thông tin được học trong quá trình training. Nó không biết:</text:p>
      <text:list text:style-name="L2">
        <text:list-item>
          <text:p text:style-name="P8">Dữ liệu nội bộ công ty</text:p>
        </text:list-item>
        <text:list-item>
          <text:p text:style-name="P8">File PDF mới cập nhật</text:p>
        </text:list-item>
        <text:list-item>
          <text:p text:style-name="P8">Database riêng</text:p>
        </text:list-item>
        <text:list-item>
          <text:p text:style-name="P8">Tài liệu dự án</text:p>
        </text:list-item>
      </text:list>
      <text:p text:style-name="P6">LangChain cung cấp các thành phần giúp đưa dữ liệu thực tế vào LLM.</text:p>
      <text:p text:style-name="P6">Ví dụ:</text:p>
      <text:p text:style-name="P9"/>
      <text:p text:style-name="P6">Không dùng LangChain:</text:p>
      <text:p text:style-name="P10"><text:span text:style-name="Source_20_Text">User Question</text:span></text:p>
      <text:p text:style-name="P10"><text:span text:style-name="Source_20_Text"><text:s text:c="6"/>|</text:span></text:p>
      <text:p text:style-name="P10"><text:span text:style-name="Source_20_Text"><text:s text:c="6"/>↓</text:span></text:p>
      <text:p text:style-name="P10"><text:span text:style-name="Source_20_Text"><text:s text:c="5"/>LLM</text:span></text:p>
      <text:p text:style-name="P10"><text:span text:style-name="Source_20_Text"><text:s text:c="6"/>|</text:span></text:p>
      <text:p text:style-name="P10"><text:span text:style-name="Source_20_Text"><text:s text:c="6"/>↓</text:span></text:p>
      <text:p text:style-name="P11"><text:span text:style-name="Source_20_Text"><text:s/>Generic Answer</text:span></text:p>
      <text:p text:style-name="P6">LLM không biết tài liệu nội bộ.</text:p>
      <text:p text:style-name="P12"/>
      <text:p text:style-name="P6">Sử dụng LangChain:</text:p>
      <text:p text:style-name="P10"><text:span text:style-name="Source_20_Text">User Question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Search Internal Documents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Relevant Context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LLM</text:span></text:p>
      <text:p text:style-name="P10"/>
      <text:p text:style-name="P10"><text:span text:style-name="Source_20_Text"><text:s text:c="6"/>↓</text:span></text:p>
      <text:p text:style-name="P10"/>
      <text:p text:style-name="P11"><text:span text:style-name="Source_20_Text">Answer based on company data</text:span></text:p>
      <text:p text:style-name="P12"/>
      <text:h text:style-name="P13" text:outline-level="1">1.2. Tại sao cần LangChain?</text:h>
      <text:p text:style-name="P6">Trong ứng dụng thực tế, LLM thường cần kết hợp với nhiều thành phần.</text:p>
      <text:p text:style-name="P6">Ví dụ:</text:p>
      <text:h text:style-name="P4" text:outline-level="2">Chatbot hỏi đáp tài liệu công ty</text:h>
      <text:p text:style-name="P6">Requirement:</text:p>
      <text:p text:style-name="P14">"Nhân viên hỏi chính sách nghỉ phép, chatbot phải trả lời dựa trên file HR Policy PDF"</text:p>
      <text:p text:style-name="P6"><text:soft-page-break/>Hệ thống cần:</text:p>
      <text:list text:style-name="L3">
        <text:list-item>
          <text:p text:style-name="P15">Đọc PDF</text:p>
        </text:list-item>
        <text:list-item>
          <text:p text:style-name="P15">Extract text</text:p>
        </text:list-item>
        <text:list-item>
          <text:p text:style-name="P15">Chia nhỏ dữ liệu</text:p>
        </text:list-item>
        <text:list-item>
          <text:p text:style-name="P15">Convert text thành vector</text:p>
        </text:list-item>
        <text:list-item>
          <text:p text:style-name="P15">Tìm kiếm đoạn liên quan</text:p>
        </text:list-item>
        <text:list-item>
          <text:p text:style-name="P15">Gửi context cho LLM</text:p>
        </text:list-item>
        <text:list-item>
          <text:p text:style-name="P15">Sinh câu trả lời</text:p>
        </text:list-item>
      </text:list>
      <text:p text:style-name="P6">Nếu tự xây dựng:</text:p>
      <text:p text:style-name="P10"><text:span text:style-name="Source_20_Text">PDF Parser</text:span></text:p>
      <text:p text:style-name="P10"><text:span text:style-name="Source_20_Text">+</text:span></text:p>
      <text:p text:style-name="P10"><text:span text:style-name="Source_20_Text">Text Processing</text:span></text:p>
      <text:p text:style-name="P10"><text:span text:style-name="Source_20_Text">+</text:span></text:p>
      <text:p text:style-name="P10"><text:span text:style-name="Source_20_Text">Embedding Model</text:span></text:p>
      <text:p text:style-name="P10"><text:span text:style-name="Source_20_Text">+</text:span></text:p>
      <text:p text:style-name="P10"><text:span text:style-name="Source_20_Text">Vector Search</text:span></text:p>
      <text:p text:style-name="P10"><text:span text:style-name="Source_20_Text">+</text:span></text:p>
      <text:p text:style-name="P10"><text:span text:style-name="Source_20_Text">Prompt Management</text:span></text:p>
      <text:p text:style-name="P10"><text:span text:style-name="Source_20_Text">+</text:span></text:p>
      <text:p text:style-name="P11"><text:span text:style-name="Source_20_Text">LLM API</text:span></text:p>
      <text:p text:style-name="P6">Rất nhiều phần phải tự quản lý.</text:p>
      <text:p text:style-name="P6">LangChain cung cấp abstraction:</text:p>
      <text:p text:style-name="P10"><text:span text:style-name="Source_20_Text">Document Loader</text:span></text:p>
      <text:p text:style-name="P10"/>
      <text:p text:style-name="P10"><text:span text:style-name="Source_20_Text">Text Splitter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Vector Store</text:span></text:p>
      <text:p text:style-name="P10"/>
      <text:p text:style-name="P10"><text:span text:style-name="Source_20_Text">Retriever</text:span></text:p>
      <text:p text:style-name="P10"/>
      <text:p text:style-name="P11"><text:span text:style-name="Source_20_Text">LLM Chain</text:span></text:p>
      <text:p text:style-name="P12"/>
      <text:h text:style-name="P13" text:outline-level="1">1.3. Các thành phần chính trong LangChain</text:h>
      <text:h text:style-name="P4" text:outline-level="2">1. Model</text:h>
      <text:p text:style-name="P6">Kết nối với LLM:</text:p>
      <text:p text:style-name="P6"><text:soft-page-break/>Ví dụ:</text:p>
      <text:list text:style-name="L4">
        <text:list-item>
          <text:p text:style-name="P16">OpenAI GPT</text:p>
        </text:list-item>
        <text:list-item>
          <text:p text:style-name="P16">Anthropic Claude</text:p>
        </text:list-item>
        <text:list-item>
          <text:p text:style-name="P16">Google Gemini</text:p>
        </text:list-item>
        <text:list-item>
          <text:p text:style-name="P16">Local LLM</text:p>
        </text:list-item>
      </text:list>
      <text:p text:style-name="P6">Ví dụ:</text:p>
      <text:p text:style-name="P10"><text:span text:style-name="Source_20_Text">from langchain_openai import ChatOpenAI</text:span></text:p>
      <text:p text:style-name="P10"/>
      <text:p text:style-name="P10"><text:span text:style-name="Source_20_Text">llm = ChatOpenAI(</text:span></text:p>
      <text:p text:style-name="P10"><text:span text:style-name="Source_20_Text"><text:s text:c="4"/>model="gpt-4o-mini"</text:span></text:p>
      <text:p text:style-name="P11"><text:span text:style-name="Source_20_Text">)</text:span></text:p>
      <text:p text:style-name="P12"/>
      <text:h text:style-name="P4" text:outline-level="2">2. Prompt Template</text:h>
      <text:p text:style-name="P6">Quản lý prompt có cấu trúc.</text:p>
      <text:p text:style-name="P6">Ví dụ:</text:p>
      <text:p text:style-name="P10"><text:span text:style-name="Source_20_Text">You are a helpful assistant.</text:span></text:p>
      <text:p text:style-name="P10"/>
      <text:p text:style-name="P10"><text:span text:style-name="Source_20_Text">Context:</text:span></text:p>
      <text:p text:style-name="P10"><text:span text:style-name="Source_20_Text">{context}</text:span></text:p>
      <text:p text:style-name="P10"/>
      <text:p text:style-name="P10"><text:span text:style-name="Source_20_Text">Question:</text:span></text:p>
      <text:p text:style-name="P11"><text:span text:style-name="Source_20_Text">{question}</text:span></text:p>
      <text:p text:style-name="P12"/>
      <text:h text:style-name="P4" text:outline-level="2">3. Document Loader</text:h>
      <text:p text:style-name="P6">Đọc dữ liệu từ bên ngoài.</text:p>
      <text:p text:style-name="P6">Nguồn:</text:p>
      <text:list text:style-name="L5">
        <text:list-item>
          <text:p text:style-name="P17">PDF</text:p>
        </text:list-item>
        <text:list-item>
          <text:p text:style-name="P17">Word</text:p>
        </text:list-item>
        <text:list-item>
          <text:p text:style-name="P17">Website</text:p>
        </text:list-item>
        <text:list-item>
          <text:p text:style-name="P17">CSV</text:p>
        </text:list-item>
        <text:list-item>
          <text:p text:style-name="P17">Database</text:p>
        </text:list-item>
      </text:list>
      <text:p text:style-name="P6">Ví dụ:</text:p>
      <text:p text:style-name="P10"><text:span text:style-name="Source_20_Text">PDF</text:span></text:p>
      <text:p text:style-name="P10"><text:soft-page-break/><text:span text:style-name="Source_20_Text"><text:s/>|</text:span></text:p>
      <text:p text:style-name="P10"><text:span text:style-name="Source_20_Text"><text:s/>↓</text:span></text:p>
      <text:p text:style-name="P10"><text:span text:style-name="Source_20_Text">Document Loader</text:span></text:p>
      <text:p text:style-name="P10"><text:span text:style-name="Source_20_Text"><text:s/>|</text:span></text:p>
      <text:p text:style-name="P10"><text:span text:style-name="Source_20_Text"><text:s/>↓</text:span></text:p>
      <text:p text:style-name="P11"><text:span text:style-name="Source_20_Text">Document Object</text:span></text:p>
      <text:p text:style-name="P12"/>
      <text:h text:style-name="P4" text:outline-level="2">4. Text Splitter</text:h>
      <text:p text:style-name="P6">Chia document lớn thành các đoạn nhỏ.</text:p>
      <text:p text:style-name="P6">Ví dụ:</text:p>
      <text:p text:style-name="P6">PDF:</text:p>
      <text:p text:style-name="P10"><text:span text:style-name="Source_20_Text">20 pages</text:span></text:p>
      <text:p text:style-name="P11"><text:span text:style-name="Source_20_Text">10000 words</text:span></text:p>
      <text:p text:style-name="P6">Không thể gửi toàn bộ vào LLM.</text:p>
      <text:p text:style-name="P6">Cần:</text:p>
      <text:p text:style-name="P10"><text:span text:style-name="Source_20_Text">Chunk 1</text:span></text:p>
      <text:p text:style-name="P10"><text:span text:style-name="Source_20_Text">Chunk 2</text:span></text:p>
      <text:p text:style-name="P10"><text:span text:style-name="Source_20_Text">Chunk 3</text:span></text:p>
      <text:p text:style-name="P11"><text:span text:style-name="Source_20_Text">...</text:span></text:p>
      <text:p text:style-name="P12"/>
      <text:h text:style-name="P4" text:outline-level="2">5. Embedding</text:h>
      <text:p text:style-name="P6">Chuyển text thành vector.</text:p>
      <text:p text:style-name="P6">Ví dụ:</text:p>
      <text:p text:style-name="P6">Text:</text:p>
      <text:p text:style-name="P11"><text:span text:style-name="Source_20_Text">"Annual leave policy"</text:span></text:p>
      <text:p text:style-name="P6">↓</text:p>
      <text:p text:style-name="P6">Vector:</text:p>
      <text:p text:style-name="P10"><text:span text:style-name="Source_20_Text">[</text:span></text:p>
      <text:p text:style-name="P10"><text:span text:style-name="Source_20_Text">0.234,</text:span></text:p>
      <text:p text:style-name="P10"><text:span text:style-name="Source_20_Text">0.523,</text:span></text:p>
      <text:p text:style-name="P10"><text:span text:style-name="Source_20_Text">0.112,</text:span></text:p>
      <text:p text:style-name="P10"><text:span text:style-name="Source_20_Text">...</text:span></text:p>
      <text:p text:style-name="P11"><text:span text:style-name="Source_20_Text">]</text:span></text:p>
      <text:p text:style-name="P12"/>
      <text:h text:style-name="P4" text:outline-level="2"><text:soft-page-break/>6. Vector Database</text:h>
      <text:p text:style-name="P6">Lưu vector để tìm kiếm.</text:p>
      <text:p text:style-name="P6">Ví dụ:</text:p>
      <text:list text:style-name="L6">
        <text:list-item>
          <text:p text:style-name="P18">ChromaDB</text:p>
        </text:list-item>
        <text:list-item>
          <text:p text:style-name="P18">FAISS</text:p>
        </text:list-item>
        <text:list-item>
          <text:p text:style-name="P18">Qdrant</text:p>
        </text:list-item>
        <text:list-item>
          <text:p text:style-name="P18">Pinecone</text:p>
        </text:list-item>
      </text:list>
      <text:p text:style-name="P12"/>
      <text:h text:style-name="P4" text:outline-level="2">7. Retriever</text:h>
      <text:p text:style-name="P6">Tìm các document liên quan.</text:p>
      <text:p text:style-name="P6">Ví dụ:</text:p>
      <text:p text:style-name="P6">User hỏi:</text:p>
      <text:p text:style-name="P11"><text:span text:style-name="Source_20_Text">How many vacation days do employees get?</text:span></text:p>
      <text:p text:style-name="P6">Retriever tìm:</text:p>
      <text:p text:style-name="P11"><text:span text:style-name="Source_20_Text">HR_policy.pdf page 5</text:span></text:p>
      <text:p text:style-name="P12"/>
      <text:h text:style-name="P13" text:outline-level="1">2. Vai trò của LangChain trong LLM Application</text:h>
      <text:h text:style-name="P13" text:outline-level="1">2.1. Traditional LLM Application</text:h>
      <text:p text:style-name="P6">Kiến trúc đơn giản:</text:p>
      <text:p text:style-name="P10"><text:span text:style-name="Source_20_Text">User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Prompt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LLM</text:span></text:p>
      <text:p text:style-name="P10"/>
      <text:p text:style-name="P10"><text:span text:style-name="Source_20_Text"><text:s/>↓</text:span></text:p>
      <text:p text:style-name="P10"/>
      <text:p text:style-name="P11"><text:span text:style-name="Source_20_Text">Response</text:span></text:p>
      <text:p text:style-name="P6">Hạn chế:</text:p>
      <text:list text:style-name="L7">
        <text:list-item>
          <text:p text:style-name="P19"><text:soft-page-break/>Không có dữ liệu riêng</text:p>
        </text:list-item>
        <text:list-item>
          <text:p text:style-name="P19">Không cập nhật thông tin mới</text:p>
        </text:list-item>
        <text:list-item>
          <text:p text:style-name="P19">Không kiểm soát nguồn trả lời</text:p>
        </text:list-item>
      </text:list>
      <text:p text:style-name="P12"/>
      <text:h text:style-name="P13" text:outline-level="1">2.2. Modern LLM Application với LangChain</text:h>
      <text:p text:style-name="P10"><text:span text:style-name="Source_20_Text"><text:s text:c="16"/>Documents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3"/>Document Loader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4"/>Text Splitter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5"/>Embedding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2"/>Vector Database</text:span></text:p>
      <text:p text:style-name="P10"/>
      <text:p text:style-name="P10"/>
      <text:p text:style-name="P10"><text:span text:style-name="Source_20_Text">User Question</text:span></text:p>
      <text:p text:style-name="P10"/>
      <text:p text:style-name="P10"><text:span text:style-name="Source_20_Text"><text:s text:c="7"/>|</text:span></text:p>
      <text:p text:style-name="P10"><text:span text:style-name="Source_20_Text"><text:s text:c="7"/>↓</text:span></text:p>
      <text:p text:style-name="P10"/>
      <text:p text:style-name="P10"><text:span text:style-name="Source_20_Text"><text:s text:c="3"/>Retriever</text:span></text:p>
      <text:p text:style-name="P10"/>
      <text:p text:style-name="P10"><text:span text:style-name="Source_20_Text"><text:s text:c="7"/>|</text:span></text:p>
      <text:p text:style-name="P10"><text:span text:style-name="Source_20_Text"><text:s text:c="7"/>↓</text:span></text:p>
      <text:p text:style-name="P10"/>
      <text:p text:style-name="P10"><text:span text:style-name="Source_20_Text">Relevant Context</text:span></text:p>
      <text:p text:style-name="P10"/>
      <text:p text:style-name="P10"><text:span text:style-name="Source_20_Text"><text:s text:c="7"/>|</text:span></text:p>
      <text:p text:style-name="P10"><text:span text:style-name="Source_20_Text"><text:s text:c="7"/>↓</text:span></text:p>
      <text:p text:style-name="P10"/>
      <text:p text:style-name="P10"><text:span text:style-name="Source_20_Text"><text:s text:c="7"/>LLM</text:span></text:p>
      <text:p text:style-name="P10"/>
      <text:p text:style-name="P10"><text:soft-page-break/><text:span text:style-name="Source_20_Text"><text:s text:c="7"/>|</text:span></text:p>
      <text:p text:style-name="P10"><text:span text:style-name="Source_20_Text"><text:s text:c="7"/>↓</text:span></text:p>
      <text:p text:style-name="P10"/>
      <text:p text:style-name="P11"><text:span text:style-name="Source_20_Text"><text:s text:c="4"/>Answer</text:span></text:p>
      <text:p text:style-name="P12"/>
      <text:h text:style-name="P13" text:outline-level="1">3. Data Ingestion trong AI Application</text:h>
      <text:h text:style-name="P13" text:outline-level="1">3.1. Data Ingestion là gì?</text:h>
      <text:p text:style-name="P6"><text:span text:style-name="Strong_20_Emphasis">Data Ingestion</text:span> là quá trình thu thập và chuyển đổi dữ liệu từ nguồn bên ngoài thành format mà AI system có thể xử lý.</text:p>
      <text:p text:style-name="P6">Nguồn dữ liệu:</text:p>
      <text:h text:style-name="P4" text:outline-level="2">Structured Data</text:h>
      <text:p text:style-name="P6">Ví dụ:</text:p>
      <text:p text:style-name="P6">Database:</text:p>
      <text:p text:style-name="P10"><text:span text:style-name="Source_20_Text">Employee Table</text:span></text:p>
      <text:p text:style-name="P10"/>
      <text:p text:style-name="P10"><text:span text:style-name="Source_20_Text">ID | Name | Department</text:span></text:p>
      <text:p text:style-name="P10"><text:span text:style-name="Source_20_Text">----------------------</text:span></text:p>
      <text:p text:style-name="P11"><text:span text:style-name="Source_20_Text">01 | John | IT</text:span></text:p>
      <text:p text:style-name="P12"/>
      <text:h text:style-name="P4" text:outline-level="2">Semi Structured Data</text:h>
      <text:p text:style-name="P6">Ví dụ:</text:p>
      <text:p text:style-name="P6">JSON:</text:p>
      <text:p text:style-name="P10"><text:span text:style-name="Source_20_Text">{</text:span></text:p>
      <text:p text:style-name="P10"><text:span text:style-name="Source_20_Text">"name":"John",</text:span></text:p>
      <text:p text:style-name="P10"><text:span text:style-name="Source_20_Text">"role":"Developer"</text:span></text:p>
      <text:p text:style-name="P11"><text:span text:style-name="Source_20_Text">}</text:span></text:p>
      <text:p text:style-name="P12"/>
      <text:h text:style-name="P4" text:outline-level="2">Unstructured Data</text:h>
      <text:p text:style-name="P6">Ví dụ:</text:p>
      <text:list text:style-name="L8">
        <text:list-item>
          <text:p text:style-name="P20">PDF</text:p>
        </text:list-item>
        <text:list-item>
          <text:p text:style-name="P20">Word</text:p>
        </text:list-item>
        <text:list-item>
          <text:p text:style-name="P20"><text:soft-page-break/>Email</text:p>
        </text:list-item>
        <text:list-item>
          <text:p text:style-name="P20">Website</text:p>
        </text:list-item>
        <text:list-item>
          <text:p text:style-name="P20">Image</text:p>
        </text:list-item>
      </text:list>
      <text:p text:style-name="P6">Trong RAG, phần lớn dữ liệu là unstructured data.</text:p>
      <text:p text:style-name="P12"/>
      <text:h text:style-name="P13" text:outline-level="1">3.2. Data Ingestion Pipeline</text:h>
      <text:p text:style-name="P6">Ví dụ:</text:p>
      <text:p text:style-name="P6">Công ty có:</text:p>
      <text:p text:style-name="P11"><text:span text:style-name="Source_20_Text">1000 PDF documents</text:span></text:p>
      <text:p text:style-name="P6">Pipeline:</text:p>
      <text:p text:style-name="P10"><text:span text:style-name="Source_20_Text">Raw Documents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Load Data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Clean Text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Split Documents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Create Embeddings</text:span></text:p>
      <text:p text:style-name="P10"/>
      <text:p text:style-name="P10"><text:span text:style-name="Source_20_Text"><text:s text:c="6"/>↓</text:span></text:p>
      <text:p text:style-name="P10"/>
      <text:p text:style-name="P11"><text:span text:style-name="Source_20_Text">Store Vector DB</text:span></text:p>
      <text:p text:style-name="P6">Sau bước này hệ thống có thể search.</text:p>
      <text:p text:style-name="P12"/>
      <text:h text:style-name="P13" text:outline-level="1"><text:soft-page-break/>4. Document Loading trong RAG Pipeline</text:h>
      <text:h text:style-name="P13" text:outline-level="1">4.1. Document Loader là gì?</text:h>
      <text:p text:style-name="P6">Document Loader là component dùng để đọc dữ liệu từ nguồn bên ngoài và chuyển thành LangChain Document Object.</text:p>
      <text:p text:style-name="P6">Input:</text:p>
      <text:p text:style-name="P11"><text:span text:style-name="Source_20_Text">PDF File</text:span></text:p>
      <text:p text:style-name="P6">Output:</text:p>
      <text:p text:style-name="P11"><text:span text:style-name="Source_20_Text">Document Object</text:span></text:p>
      <text:p text:style-name="P12"/>
      <text:p text:style-name="P6">Ví dụ:</text:p>
      <text:p text:style-name="P6">PDF:</text:p>
      <text:p text:style-name="P11"><text:span text:style-name="Source_20_Text">company_policy.pdf</text:span></text:p>
      <text:p text:style-name="P6">Loader:</text:p>
      <text:p text:style-name="P11"><text:span text:style-name="Source_20_Text">PyPDFLoader</text:span></text:p>
      <text:p text:style-name="P6">Output:</text:p>
      <text:p text:style-name="P10"><text:span text:style-name="Source_20_Text">Document(</text:span></text:p>
      <text:p text:style-name="P10"><text:span text:style-name="Source_20_Text">page_content="Employees have 20 vacation days",</text:span></text:p>
      <text:p text:style-name="P10"><text:span text:style-name="Source_20_Text">metadata={</text:span></text:p>
      <text:p text:style-name="P10"><text:span text:style-name="Source_20_Text">"source":"company_policy.pdf",</text:span></text:p>
      <text:p text:style-name="P10"><text:span text:style-name="Source_20_Text">"page":5</text:span></text:p>
      <text:p text:style-name="P10"><text:span text:style-name="Source_20_Text">}</text:span></text:p>
      <text:p text:style-name="P11"><text:span text:style-name="Source_20_Text">)</text:span></text:p>
      <text:p text:style-name="P12"/>
      <text:h text:style-name="P13" text:outline-level="1">4.2. Document Object trong LangChain</text:h>
      <text:p text:style-name="P6">Document gồm 2 phần chính:</text:p>
      <text:h text:style-name="P4" text:outline-level="2">page_content</text:h>
      <text:p text:style-name="P6">Chứa nội dung text.</text:p>
      <text:p text:style-name="P6">Ví dụ:</text:p>
      <text:p text:style-name="P11"><text:span text:style-name="Source_20_Text">document.page_content</text:span></text:p>
      <text:p text:style-name="P6">Output:</text:p>
      <text:p text:style-name="P11"><text:soft-page-break/><text:span text:style-name="Source_20_Text">Employees receive 20 annual leave days.</text:span></text:p>
      <text:p text:style-name="P12"/>
      <text:h text:style-name="P4" text:outline-level="2">metadata</text:h>
      <text:p text:style-name="P6">Thông tin mô tả document.</text:p>
      <text:p text:style-name="P6">Ví dụ:</text:p>
      <text:p text:style-name="P11"><text:span text:style-name="Source_20_Text">document.metadata</text:span></text:p>
      <text:p text:style-name="P6">Output:</text:p>
      <text:p text:style-name="P10"><text:span text:style-name="Source_20_Text">{</text:span></text:p>
      <text:p text:style-name="P10"><text:span text:style-name="Source_20_Text">"source":"policy.pdf",</text:span></text:p>
      <text:p text:style-name="P10"><text:span text:style-name="Source_20_Text">"page":3</text:span></text:p>
      <text:p text:style-name="P11"><text:span text:style-name="Source_20_Text">}</text:span></text:p>
      <text:p text:style-name="P6">Metadata dùng để:</text:p>
      <text:list text:style-name="L9">
        <text:list-item>
          <text:p text:style-name="P21">Tracking nguồn</text:p>
        </text:list-item>
        <text:list-item>
          <text:p text:style-name="P21">Filter search</text:p>
        </text:list-item>
        <text:list-item>
          <text:p text:style-name="P21">Citation</text:p>
        </text:list-item>
        <text:list-item>
          <text:p text:style-name="P21">Debug</text:p>
        </text:list-item>
      </text:list>
      <text:p text:style-name="P12"/>
      <text:h text:style-name="P13" text:outline-level="1">5. RAG Pipeline Workflow</text:h>
      <text:h text:style-name="P4" text:outline-level="2">Tổng quan</text:h>
      <text:p text:style-name="P10"><text:span text:style-name="Source_20_Text">Data Source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Document Loader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Document Object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Chunking</text:span></text:p>
      <text:p text:style-name="P10"/>
      <text:p text:style-name="P10"><text:span text:style-name="Source_20_Text"><text:s text:c="4"/>↓</text:span></text:p>
      <text:p text:style-name="P10"/>
      <text:p text:style-name="P10"><text:soft-page-break/><text:span text:style-name="Source_20_Text">Embedding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Vector Database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Retriever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LLM</text:span></text:p>
      <text:p text:style-name="P10"/>
      <text:p text:style-name="P10"><text:span text:style-name="Source_20_Text"><text:s text:c="4"/>↓</text:span></text:p>
      <text:p text:style-name="P10"/>
      <text:p text:style-name="P11"><text:span text:style-name="Source_20_Text">Answer</text:span></text:p>
      <text:p text:style-name="P12"/>
      <text:h text:style-name="P13" text:outline-level="1">5.1. Data Source</text:h>
      <text:p text:style-name="P6">Nguồn dữ liệu:</text:p>
      <text:p text:style-name="P6">Ví dụ:</text:p>
      <text:p text:style-name="P10"><text:span text:style-name="Source_20_Text">PDF</text:span></text:p>
      <text:p text:style-name="P10"><text:span text:style-name="Source_20_Text">DOCX</text:span></text:p>
      <text:p text:style-name="P10"><text:span text:style-name="Source_20_Text">Website</text:span></text:p>
      <text:p text:style-name="P11"><text:span text:style-name="Source_20_Text">Database</text:span></text:p>
      <text:p text:style-name="P12"/>
      <text:h text:style-name="P13" text:outline-level="1">5.2. Document Loader</text:h>
      <text:p text:style-name="P6">Nhiệm vụ:</text:p>
      <text:p text:style-name="P6">Convert:</text:p>
      <text:p text:style-name="P11"><text:span text:style-name="Source_20_Text">Raw Data</text:span></text:p>
      <text:p text:style-name="P6">thành:</text:p>
      <text:p text:style-name="P11"><text:span text:style-name="Source_20_Text">Document Object</text:span></text:p>
      <text:p text:style-name="P6">Ví dụ:</text:p>
      <text:p text:style-name="P6">PDF:</text:p>
      <text:p text:style-name="P11"><text:span text:style-name="Source_20_Text">PyPDFLoader</text:span></text:p>
      <text:p text:style-name="P6"><text:soft-page-break/>Word:</text:p>
      <text:p text:style-name="P11"><text:span text:style-name="Source_20_Text">Docx2txtLoader</text:span></text:p>
      <text:p text:style-name="P6">Web:</text:p>
      <text:p text:style-name="P11"><text:span text:style-name="Source_20_Text">WebBaseLoader</text:span></text:p>
      <text:p text:style-name="P12"/>
      <text:h text:style-name="P13" text:outline-level="1">5.3. Chunking</text:h>
      <text:p text:style-name="P6">Vấn đề:</text:p>
      <text:p text:style-name="P6">LLM có giới hạn context.</text:p>
      <text:p text:style-name="P6">Ví dụ:</text:p>
      <text:p text:style-name="P6">Document:</text:p>
      <text:p text:style-name="P11"><text:span text:style-name="Source_20_Text">100 pages</text:span></text:p>
      <text:p text:style-name="P6">Không thể gửi toàn bộ.</text:p>
      <text:p text:style-name="P6">Giải pháp:</text:p>
      <text:p text:style-name="P6">Chia:</text:p>
      <text:p text:style-name="P10"><text:span text:style-name="Source_20_Text">Documen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Chunk 1</text:span></text:p>
      <text:p text:style-name="P10"><text:span text:style-name="Source_20_Text">Chunk 2</text:span></text:p>
      <text:p text:style-name="P11"><text:span text:style-name="Source_20_Text">Chunk 3</text:span></text:p>
      <text:p text:style-name="P12"/>
      <text:h text:style-name="P13" text:outline-level="1">5.4. Embedding</text:h>
      <text:p text:style-name="P6">Convert:</text:p>
      <text:p text:style-name="P11"><text:span text:style-name="Source_20_Text">Text</text:span></text:p>
      <text:p text:style-name="P6">thành:</text:p>
      <text:p text:style-name="P11"><text:span text:style-name="Source_20_Text">Vector</text:span></text:p>
      <text:p text:style-name="P6">Ví dụ:</text:p>
      <text:p text:style-name="P10"><text:span text:style-name="Source_20_Text">"Python programming"</text:span></text:p>
      <text:p text:style-name="P10"/>
      <text:p text:style-name="P10"><text:span text:style-name="Source_20_Text">↓</text:span></text:p>
      <text:p text:style-name="P10"><text:soft-page-break/></text:p>
      <text:p text:style-name="P11"><text:span text:style-name="Source_20_Text">[0.23,0.55,0.11]</text:span></text:p>
      <text:p text:style-name="P12"/>
      <text:h text:style-name="P13" text:outline-level="1">5.5. Vector Database</text:h>
      <text:p text:style-name="P6">Lưu:</text:p>
      <text:p text:style-name="P11"><text:span text:style-name="Source_20_Text">Vector + Metadata</text:span></text:p>
      <text:p text:style-name="P6">Ví dụ:</text:p>
      <text:p text:style-name="P10"><text:span text:style-name="Source_20_Text">Vector</text:span></text:p>
      <text:p text:style-name="P10"/>
      <text:p text:style-name="P10"><text:span text:style-name="Source_20_Text">0.23 0.55 0.11</text:span></text:p>
      <text:p text:style-name="P10"/>
      <text:p text:style-name="P10"/>
      <text:p text:style-name="P10"><text:span text:style-name="Source_20_Text">Metadata</text:span></text:p>
      <text:p text:style-name="P10"/>
      <text:p text:style-name="P10"><text:span text:style-name="Source_20_Text">source:</text:span></text:p>
      <text:p text:style-name="P10"><text:span text:style-name="Source_20_Text">python.pdf</text:span></text:p>
      <text:p text:style-name="P10"><text:span text:style-name="Source_20_Text">page:</text:span></text:p>
      <text:p text:style-name="P11"><text:span text:style-name="Source_20_Text">10</text:span></text:p>
      <text:p text:style-name="P12"/>
      <text:h text:style-name="P13" text:outline-level="1">5.6. Retriever</text:h>
      <text:p text:style-name="P6">Nhiệm vụ:</text:p>
      <text:p text:style-name="P6">Tìm document phù hợp nhất.</text:p>
      <text:p text:style-name="P6">Ví dụ:</text:p>
      <text:p text:style-name="P6">Question:</text:p>
      <text:p text:style-name="P11"><text:span text:style-name="Source_20_Text">How to reset password?</text:span></text:p>
      <text:p text:style-name="P6">Retriever:</text:p>
      <text:p text:style-name="P11"><text:span text:style-name="Source_20_Text">IT_policy.pdf page 8</text:span></text:p>
      <text:p text:style-name="P12"/>
      <text:h text:style-name="P13" text:outline-level="1">5.7. LLM Generation</text:h>
      <text:p text:style-name="P6">LLM nhận:</text:p>
      <text:p text:style-name="P10"><text:span text:style-name="Source_20_Text">Question</text:span></text:p>
      <text:p text:style-name="P10"/>
      <text:p text:style-name="P10"><text:soft-page-break/><text:span text:style-name="Source_20_Text">+</text:span></text:p>
      <text:p text:style-name="P10"/>
      <text:p text:style-name="P11"><text:span text:style-name="Source_20_Text">Retrieved Context</text:span></text:p>
      <text:p text:style-name="P6">Sinh:</text:p>
      <text:p text:style-name="P11"><text:span text:style-name="Source_20_Text">Answer</text:span></text:p>
      <text:p text:style-name="P12"/>
      <text:h text:style-name="P13" text:outline-level="1">6. Ví dụ thực tế: Company Knowledge Chatbot</text:h>
      <text:h text:style-name="P4" text:outline-level="2">Requirement</text:h>
      <text:p text:style-name="P6">Xây chatbot hỏi đáp tài liệu:</text:p>
      <text:p text:style-name="P6">Input:</text:p>
      <text:p text:style-name="P11"><text:span text:style-name="Source_20_Text">HR_policy.pdf</text:span></text:p>
      <text:p text:style-name="P6">Question:</text:p>
      <text:p text:style-name="P11"><text:span text:style-name="Source_20_Text">How many vacation days?</text:span></text:p>
      <text:p text:style-name="P6">Pipeline:</text:p>
      <text:p text:style-name="P10"><text:span text:style-name="Source_20_Text">HR PDF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PyPDFLoader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Document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Chunking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ChromaDB</text:span></text:p>
      <text:p text:style-name="P10"/>
      <text:p text:style-name="P10"><text:span text:style-name="Source_20_Text"><text:s/>↓</text:span></text:p>
      <text:p text:style-name="P10"/>
      <text:p text:style-name="P10"><text:span text:style-name="Source_20_Text">Retriever</text:span></text:p>
      <text:p text:style-name="P10"><text:soft-page-break/></text:p>
      <text:p text:style-name="P10"><text:span text:style-name="Source_20_Text"><text:s/>↓</text:span></text:p>
      <text:p text:style-name="P10"/>
      <text:p text:style-name="P10"><text:span text:style-name="Source_20_Text">GPT</text:span></text:p>
      <text:p text:style-name="P10"/>
      <text:p text:style-name="P10"><text:span text:style-name="Source_20_Text"><text:s/>↓</text:span></text:p>
      <text:p text:style-name="P10"/>
      <text:p text:style-name="P11"><text:span text:style-name="Source_20_Text">Answer</text:span></text:p>
      <text:p text:style-name="P12"/>
      <text:h text:style-name="P13" text:outline-level="1">7. Thực hành nhỏ: Load PDF bằng LangChain</text:h>
      <text:h text:style-name="P4" text:outline-level="2">7.1. Cài đặt</text:h>
      <text:p text:style-name="P10"><text:span text:style-name="Source_20_Text">pip install langchain</text:span></text:p>
      <text:p text:style-name="P10"><text:span text:style-name="Source_20_Text">pip install langchain-community</text:span></text:p>
      <text:p text:style-name="P11"><text:span text:style-name="Source_20_Text">pip install pypdf</text:span></text:p>
      <text:p text:style-name="P12"/>
      <text:h text:style-name="P13" text:outline-level="1">7.2. Project Structure</text:h>
      <text:p text:style-name="P10"><text:span text:style-name="Source_20_Text">document_loader_demo/</text:span></text:p>
      <text:p text:style-name="P10"/>
      <text:p text:style-name="P10"><text:span text:style-name="Source_20_Text">├── data/</text:span></text:p>
      <text:p text:style-name="P10"><text:span text:style-name="Source_20_Text">│ <text:s text:c="2"/>└── sample.pdf</text:span></text:p>
      <text:p text:style-name="P10"><text:span text:style-name="Source_20_Text">│</text:span></text:p>
      <text:p text:style-name="P11"><text:span text:style-name="Source_20_Text">└── main.py</text:span></text:p>
      <text:p text:style-name="P12"/>
      <text:h text:style-name="P13" text:outline-level="1">7.3. Code</text:h>
      <text:p text:style-name="P10"><text:span text:style-name="Source_20_Text">from langchain_community.document_loaders import PyPDFLoader</text:span></text:p>
      <text:p text:style-name="P10"/>
      <text:p text:style-name="P10"/>
      <text:p text:style-name="P10"><text:span text:style-name="Source_20_Text">file_path = "data/sample.pdf"</text:span></text:p>
      <text:p text:style-name="P10"/>
      <text:p text:style-name="P10"/>
      <text:p text:style-name="P10"><text:span text:style-name="Source_20_Text">loader = PyPDFLoader(file_path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"Number of documents:",</text:span></text:p>
      <text:p text:style-name="P10"><text:soft-page-break/><text:span text:style-name="Source_20_Text"><text:s text:c="4"/>len(documents)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"===================")</text:span></text:p>
      <text:p text:style-name="P10"/>
      <text:p text:style-name="P10"><text:span text:style-name="Source_20_Text"><text:s text:c="4"/>print(doc.metadata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[:300]</text:span></text:p>
      <text:p text:style-name="P11"><text:span text:style-name="Source_20_Text"><text:s text:c="4"/>)</text:span></text:p>
      <text:p text:style-name="P12"/>
      <text:h text:style-name="P13" text:outline-level="1">7.4. Output mẫu</text:h>
      <text:p text:style-name="P10"><text:span text:style-name="Source_20_Text">Number of documents: 5</text:span></text:p>
      <text:p text:style-name="P10"/>
      <text:p text:style-name="P10"/>
      <text:p text:style-name="P10"><text:span text:style-name="Source_20_Text">{</text:span></text:p>
      <text:p text:style-name="P10"><text:span text:style-name="Source_20_Text">'source':'sample.pdf',</text:span></text:p>
      <text:p text:style-name="P10"><text:span text:style-name="Source_20_Text">'page':0</text:span></text:p>
      <text:p text:style-name="P10"><text:span text:style-name="Source_20_Text">}</text:span></text:p>
      <text:p text:style-name="P10"/>
      <text:p text:style-name="P10"/>
      <text:p text:style-name="P11"><text:span text:style-name="Source_20_Text">Introduction to company policy...</text:span></text:p>
      <text:p text:style-name="P12"/>
      <text:h text:style-name="P13" text:outline-level="1">8. Các lỗi thường gặp</text:h>
      <text:h text:style-name="P4" text:outline-level="2">1. PDF không extract được text</text:h>
      <text:p text:style-name="P6">Nguyên nhân:</text:p>
      <text:list text:style-name="L10">
        <text:list-item>
          <text:p text:style-name="P22">PDF scan từ hình ảnh</text:p>
        </text:list-item>
        <text:list-item>
          <text:p text:style-name="P22">Không có text layer</text:p>
        </text:list-item>
      </text:list>
      <text:p text:style-name="P6">Giải pháp:</text:p>
      <text:list text:style-name="L11">
        <text:list-item>
          <text:p text:style-name="P23">OCR</text:p>
        </text:list-item>
        <text:list-item>
          <text:p text:style-name="P23">Tesseract</text:p>
        </text:list-item>
        <text:list-item>
          <text:p text:style-name="P23">Document AI</text:p>
        </text:list-item>
      </text:list>
      <text:p text:style-name="P12"/>
      <text:h text:style-name="P4" text:outline-level="2"><text:soft-page-break/>2. Document quá lớn</text:h>
      <text:p text:style-name="P6">Vấn đề:</text:p>
      <text:p text:style-name="P11"><text:span text:style-name="Source_20_Text">Context length exceeded</text:span></text:p>
      <text:p text:style-name="P6">Giải pháp:</text:p>
      <text:list text:style-name="L12">
        <text:list-item>
          <text:p text:style-name="P24">Chunking</text:p>
        </text:list-item>
        <text:list-item>
          <text:p text:style-name="P24">Retrieval</text:p>
        </text:list-item>
      </text:list>
      <text:p text:style-name="P12"/>
      <text:h text:style-name="P4" text:outline-level="2">3. Metadata thiếu</text:h>
      <text:p text:style-name="P6">Ảnh hưởng:</text:p>
      <text:list text:style-name="L13">
        <text:list-item>
          <text:p text:style-name="P25">Không biết nguồn</text:p>
        </text:list-item>
        <text:list-item>
          <text:p text:style-name="P25">Không citation được</text:p>
        </text:list-item>
      </text:list>
      <text:p text:style-name="P6">Giải pháp:</text:p>
      <text:p text:style-name="P6">Customize metadata.</text:p>
      <text:p text:style-name="P12"/>
      <text:h text:style-name="P4" text:outline-level="2">4. Website load sai nội dung</text:h>
      <text:p text:style-name="P6">Nguyên nhân:</text:p>
      <text:list text:style-name="L14">
        <text:list-item>
          <text:p text:style-name="P26">HTML nhiều noise</text:p>
        </text:list-item>
        <text:list-item>
          <text:p text:style-name="P26">Dynamic rendering</text:p>
        </text:list-item>
      </text:list>
      <text:p text:style-name="P6">Giải pháp:</text:p>
      <text:list text:style-name="L15">
        <text:list-item>
          <text:p text:style-name="P27">BeautifulSoup filtering</text:p>
        </text:list-item>
        <text:list-item>
          <text:p text:style-name="P27">Selenium</text:p>
        </text:list-item>
        <text:list-item>
          <text:p text:style-name="P27">Playwright</text:p>
        </text:list-item>
      </text:list>
      <text:p text:style-name="P12"/>
      <text:h text:style-name="P13" text:outline-level="1">9. Bài tập thực hành cho Intern</text:h>
      <text:h text:style-name="P4" text:outline-level="2">Task 1</text:h>
      <text:p text:style-name="P6">Load PDF:</text:p>
      <text:p text:style-name="P6">Yêu cầu:</text:p>
      <text:list text:style-name="L16">
        <text:list-item>
          <text:p text:style-name="P28">In số lượng document</text:p>
        </text:list-item>
        <text:list-item>
          <text:p text:style-name="P28"><text:soft-page-break/>In metadata</text:p>
        </text:list-item>
        <text:list-item>
          <text:p text:style-name="P28">In content</text:p>
        </text:list-item>
      </text:list>
      <text:p text:style-name="P12"/>
      <text:h text:style-name="P4" text:outline-level="2">Task 2</text:h>
      <text:p text:style-name="P6">Thay PDF bằng DOCX:</text:p>
      <text:p text:style-name="P6">So sánh:</text:p>
      <text:list text:style-name="L17">
        <text:list-item>
          <text:p text:style-name="P29">Output</text:p>
        </text:list-item>
        <text:list-item>
          <text:p text:style-name="P29">Metadata</text:p>
        </text:list-item>
        <text:list-item>
          <text:p text:style-name="P29">Content quality</text:p>
        </text:list-item>
      </text:list>
      <text:p text:style-name="P12"/>
      <text:h text:style-name="P4" text:outline-level="2">Task 3</text:h>
      <text:p text:style-name="P6">Vẽ lại RAG Pipeline:</text:p>
      <text:p text:style-name="P6">Giải thích:</text:p>
      <text:p text:style-name="P10"><text:span text:style-name="Source_20_Text">Data Source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Loader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Documen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Chunking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Vector DB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Retriever</text:span></text:p>
      <text:p text:style-name="P10"/>
      <text:p text:style-name="P10"><text:soft-page-break/><text:span text:style-name="Source_20_Text">↓</text:span></text:p>
      <text:p text:style-name="P10"/>
      <text:p text:style-name="P11"><text:span text:style-name="Source_20_Text">LLM</text:span></text:p>
      <text:p text:style-name="P12"/>
      <text:h text:style-name="P13" text:outline-level="1">Kết quả cần đạt sau bài học</text:h>
      <text:p text:style-name="P6">Sau khi hoàn thành bài học, AI Engineer Intern có thể:</text:p>
      <text:list text:style-name="L18">
        <text:list-item>
          <text:p text:style-name="P30">Hiểu vai trò của LangChain.</text:p>
        </text:list-item>
        <text:list-item>
          <text:p text:style-name="P30">Hiểu Data Ingestion trong AI Application.</text:p>
        </text:list-item>
        <text:list-item>
          <text:p text:style-name="P30">Hiểu Document Loading trong RAG.</text:p>
        </text:list-item>
        <text:list-item>
          <text:p text:style-name="P30">Hiểu Document Object.</text:p>
        </text:list-item>
        <text:list-item>
          <text:p text:style-name="P30">Biết workflow của RAG Pipeline.</text:p>
        </text:list-item>
        <text:list-item>
          <text:p text:style-name="P30">Load được dữ liệu PDF bằng LangChain.</text:p>
        </text:list-item>
        <text:list-item>
          <text:p text:style-name="P30">Chuẩn bị nền tảng cho bài tiếp theo:</text:p>
        </text:list-item>
      </text:list>
      <text:p text:style-name="P6"><text:span text:style-name="Strong_20_Emphasis">Text Splitting &amp; Chunking Strategies trong RAG Pipeline.</text:span></text:p>
      <text:p text:style-name="P1"/>
      <text:p text:style-name="P1"/>
      <text:h text:style-name="Heading_20_1" text:outline-level="1">2. Document Object &amp; Data Representation</text:h>
      <text:p text:style-name="P1"/>
      <text:h text:style-name="P3" text:outline-level="1">Giáo trình học: Document Object &amp; Data Representation in LangChain</text:h>
      <text:h text:style-name="P4" text:outline-level="2">1. Tổng quan về Document trong LangChain</text:h>
      <text:h text:style-name="P4" text:outline-level="2">1.1. Document Object là gì?</text:h>
      <text:p text:style-name="P6">Trong LangChain, <text:span text:style-name="Strong_20_Emphasis">Document Object</text:span> là một cấu trúc dữ liệu chuẩn dùng để biểu diễn một phần dữ liệu được lấy từ nguồn bên ngoài (external data source).</text:p>
      <text:p text:style-name="P6">Document Object giúp LangChain thống nhất cách xử lý dữ liệu từ nhiều nguồn khác nhau:</text:p>
      <text:list text:style-name="L19">
        <text:list-item>
          <text:p text:style-name="P31">PDF</text:p>
        </text:list-item>
        <text:list-item>
          <text:p text:style-name="P31">Word</text:p>
        </text:list-item>
        <text:list-item>
          <text:p text:style-name="P31">Website</text:p>
        </text:list-item>
        <text:list-item>
          <text:p text:style-name="P31">Database</text:p>
        </text:list-item>
        <text:list-item>
          <text:p text:style-name="P31">CSV</text:p>
        </text:list-item>
        <text:list-item>
          <text:p text:style-name="P31">API Response</text:p>
        </text:list-item>
      </text:list>
      <text:p text:style-name="P6"><text:soft-page-break/>Thay vì mỗi nguồn dữ liệu có format khác nhau:</text:p>
      <text:p text:style-name="P10"><text:span text:style-name="Source_20_Text">PDF</text:span></text:p>
      <text:p text:style-name="P10"><text:span text:style-name="Source_20_Text"><text:s/>└── Text + Page Number</text:span></text:p>
      <text:p text:style-name="P10"/>
      <text:p text:style-name="P10"><text:span text:style-name="Source_20_Text">DOCX</text:span></text:p>
      <text:p text:style-name="P10"><text:span text:style-name="Source_20_Text"><text:s/>└── Paragraph + File Info</text:span></text:p>
      <text:p text:style-name="P10"/>
      <text:p text:style-name="P10"><text:span text:style-name="Source_20_Text">Website</text:span></text:p>
      <text:p text:style-name="P11"><text:span text:style-name="Source_20_Text"><text:s/>└── HTML + URL</text:span></text:p>
      <text:p text:style-name="P6">LangChain chuyển tất cả thành một format chung:</text:p>
      <text:p text:style-name="P10"><text:span text:style-name="Source_20_Text">Document Object</text:span></text:p>
      <text:p text:style-name="P10"/>
      <text:p text:style-name="P10"><text:span text:style-name="Source_20_Text">{</text:span></text:p>
      <text:p text:style-name="P10"><text:span text:style-name="Source_20_Text"><text:s text:c="4"/>page_content: "text content",</text:span></text:p>
      <text:p text:style-name="P10"><text:span text:style-name="Source_20_Text"><text:s text:c="4"/>metadata: {</text:span></text:p>
      <text:p text:style-name="P10"><text:span text:style-name="Source_20_Text"><text:s text:c="8"/>"source": "...",</text:span></text:p>
      <text:p text:style-name="P10"><text:span text:style-name="Source_20_Text"><text:s text:c="8"/>"page": ...</text:span></text:p>
      <text:p text:style-name="P10"><text:span text:style-name="Source_20_Text"><text:s text:c="4"/>}</text:span></text:p>
      <text:p text:style-name="P11"><text:span text:style-name="Source_20_Text">}</text:span></text:p>
      <text:p text:style-name="P12"/>
      <text:h text:style-name="P13" text:outline-level="1">1.2. Vai trò của Document Object trong RAG</text:h>
      <text:p text:style-name="P6">Trong RAG Pipeline, Document Object là bước trung gian giữa dữ liệu gốc và hệ thống tìm kiếm.</text:p>
      <text:p text:style-name="P6">Workflow:</text:p>
      <text:p text:style-name="P10"><text:span text:style-name="Source_20_Text">Raw Data</text:span></text:p>
      <text:p text:style-name="P10"/>
      <text:p text:style-name="P10"><text:span text:style-name="Source_20_Text">(PDF, DOCX, Web)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Document Loader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Document Object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Text Splitter</text:span></text:p>
      <text:p text:style-name="P10"/>
      <text:p text:style-name="P10"><text:span text:style-name="Source_20_Text"><text:s text:c="8"/>↓</text:span></text:p>
      <text:p text:style-name="P10"/>
      <text:p text:style-name="P10"><text:soft-page-break/><text:span text:style-name="Source_20_Text">Document Chunks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<text:s text:c="8"/>↓</text:span></text:p>
      <text:p text:style-name="P10"/>
      <text:p text:style-name="P11"><text:span text:style-name="Source_20_Text">Vector Database</text:span></text:p>
      <text:p text:style-name="P6">Document Object giúp:</text:p>
      <text:list text:style-name="L20">
        <text:list-item>
          <text:p text:style-name="P32">Chuẩn hóa dữ liệu đầu vào.</text:p>
        </text:list-item>
        <text:list-item>
          <text:p text:style-name="P32">Lưu nội dung text.</text:p>
        </text:list-item>
        <text:list-item>
          <text:p text:style-name="P32">Lưu thông tin nguồn.</text:p>
        </text:list-item>
        <text:list-item>
          <text:p text:style-name="P32">Hỗ trợ tracking.</text:p>
        </text:list-item>
        <text:list-item>
          <text:p text:style-name="P32">Hỗ trợ retrieval.</text:p>
        </text:list-item>
      </text:list>
      <text:p text:style-name="P12"/>
      <text:h text:style-name="P13" text:outline-level="1">2. Cấu trúc của Document Object</text:h>
      <text:h text:style-name="P4" text:outline-level="2">2.1. Document Schema</text:h>
      <text:p text:style-name="P6">Một Document trong LangChain gồm hai thành phần chính:</text:p>
      <text:p text:style-name="P10"><text:span text:style-name="Source_20_Text">Document</text:span></text:p>
      <text:p text:style-name="P10"/>
      <text:p text:style-name="P10"><text:span text:style-name="Source_20_Text">├── page_content</text:span></text:p>
      <text:p text:style-name="P10"><text:span text:style-name="Source_20_Text">│</text:span></text:p>
      <text:p text:style-name="P11"><text:span text:style-name="Source_20_Text">└── metadata</text:span></text:p>
      <text:p text:style-name="P6">Ví dụ:</text:p>
      <text:p text:style-name="P10"><text:span text:style-name="Source_20_Text">Document(</text:span></text:p>
      <text:p text:style-name="P10"><text:span text:style-name="Source_20_Text"><text:s text:c="4"/>page_content="Employees receive 20 vacation days",</text:span></text:p>
      <text:p text:style-name="P10"><text:span text:style-name="Source_20_Text"><text:s text:c="4"/></text:span></text:p>
      <text:p text:style-name="P10"><text:span text:style-name="Source_20_Text"><text:s text:c="4"/>metadata={</text:span></text:p>
      <text:p text:style-name="P10"><text:span text:style-name="Source_20_Text"><text:s text:c="8"/>"source": "hr_policy.pdf",</text:span></text:p>
      <text:p text:style-name="P10"><text:span text:style-name="Source_20_Text"><text:s text:c="8"/>"page": 5</text:span></text:p>
      <text:p text:style-name="P10"><text:span text:style-name="Source_20_Text"><text:s text:c="4"/>}</text:span></text:p>
      <text:p text:style-name="P11"><text:span text:style-name="Source_20_Text">)</text:span></text:p>
      <text:p text:style-name="P12"/>
      <text:h text:style-name="P13" text:outline-level="1"><text:soft-page-break/>2.2. page_content</text:h>
      <text:h text:style-name="P4" text:outline-level="2">Khái niệm</text:h>
      <text:p text:style-name="P6"><text:span text:style-name="Source_20_Text">page_content</text:span> chứa nội dung text chính của document.</text:p>
      <text:p text:style-name="P6">Ví dụ:</text:p>
      <text:p text:style-name="P6">PDF:</text:p>
      <text:p text:style-name="P10"><text:span text:style-name="Source_20_Text">Page 5:</text:span></text:p>
      <text:p text:style-name="P10"/>
      <text:p text:style-name="P11"><text:span text:style-name="Source_20_Text">Employees receive 20 vacation days annually.</text:span></text:p>
      <text:p text:style-name="P6">Sau khi load:</text:p>
      <text:p text:style-name="P11"><text:span text:style-name="Source_20_Text">document.page_content</text:span></text:p>
      <text:p text:style-name="P6">Output:</text:p>
      <text:p text:style-name="P11"><text:span text:style-name="Source_20_Text">Employees receive 20 vacation days annually.</text:span></text:p>
      <text:p text:style-name="P12"/>
      <text:h text:style-name="P4" text:outline-level="2">Vai trò của page_content</text:h>
      <text:p text:style-name="P6">page_content được sử dụng trong:</text:p>
      <text:h text:style-name="P5" text:outline-level="3">1. Text Splitting</text:h>
      <text:p text:style-name="P6">Ví dụ:</text:p>
      <text:p text:style-name="P6">Document:</text:p>
      <text:p text:style-name="P11"><text:span text:style-name="Source_20_Text">5000 characters</text:span></text:p>
      <text:p text:style-name="P6">Chia thành:</text:p>
      <text:p text:style-name="P10"><text:span text:style-name="Source_20_Text">Chunk 1:</text:span></text:p>
      <text:p text:style-name="P10"><text:span text:style-name="Source_20_Text">Employees receive...</text:span></text:p>
      <text:p text:style-name="P10"/>
      <text:p text:style-name="P10"><text:span text:style-name="Source_20_Text">Chunk 2:</text:span></text:p>
      <text:p text:style-name="P11"><text:span text:style-name="Source_20_Text">Leave request process...</text:span></text:p>
      <text:p text:style-name="P12"/>
      <text:h text:style-name="P5" text:outline-level="3">2. Embedding</text:h>
      <text:p text:style-name="P6">Text được convert thành vector:</text:p>
      <text:p text:style-name="P10"><text:span text:style-name="Source_20_Text">page_content</text:span></text:p>
      <text:p text:style-name="P10"/>
      <text:p text:style-name="P10"><text:span text:style-name="Source_20_Text"><text:s text:c="8"/>↓</text:span></text:p>
      <text:p text:style-name="P10"><text:soft-page-break/></text:p>
      <text:p text:style-name="P10"><text:span text:style-name="Source_20_Text">Embedding Model</text:span></text:p>
      <text:p text:style-name="P10"/>
      <text:p text:style-name="P10"><text:span text:style-name="Source_20_Text"><text:s text:c="8"/>↓</text:span></text:p>
      <text:p text:style-name="P10"/>
      <text:p text:style-name="P11"><text:span text:style-name="Source_20_Text">[0.234,0.523,0.111,...]</text:span></text:p>
      <text:p text:style-name="P12"/>
      <text:h text:style-name="P5" text:outline-level="3">3. LLM Context</text:h>
      <text:p text:style-name="P6">Retriever lấy chunk phù hợp:</text:p>
      <text:p text:style-name="P10"><text:span text:style-name="Source_20_Text">Question:</text:span></text:p>
      <text:p text:style-name="P10"/>
      <text:p text:style-name="P10"><text:span text:style-name="Source_20_Text">How many vacation days?</text:span></text:p>
      <text:p text:style-name="P10"/>
      <text:p text:style-name="P10"/>
      <text:p text:style-name="P10"><text:span text:style-name="Source_20_Text">Retrieved Document:</text:span></text:p>
      <text:p text:style-name="P10"/>
      <text:p text:style-name="P11"><text:span text:style-name="Source_20_Text">Employees receive 20 vacation days.</text:span></text:p>
      <text:p text:style-name="P6">Gửi vào LLM:</text:p>
      <text:p text:style-name="P10"><text:span text:style-name="Source_20_Text">Context:</text:span></text:p>
      <text:p text:style-name="P10"><text:span text:style-name="Source_20_Text">Employees receive 20 vacation days.</text:span></text:p>
      <text:p text:style-name="P10"/>
      <text:p text:style-name="P10"><text:span text:style-name="Source_20_Text">Question:</text:span></text:p>
      <text:p text:style-name="P11"><text:span text:style-name="Source_20_Text">How many vacation days?</text:span></text:p>
      <text:p text:style-name="P12"/>
      <text:h text:style-name="P13" text:outline-level="1">2.3. Metadata</text:h>
      <text:h text:style-name="P4" text:outline-level="2">Metadata là gì?</text:h>
      <text:p text:style-name="P6">Metadata là thông tin mô tả document.</text:p>
      <text:p text:style-name="P6">Nó không phải nội dung chính, mà là dữ liệu đi kèm để quản lý document.</text:p>
      <text:p text:style-name="P6">Ví dụ:</text:p>
      <text:p text:style-name="P10"><text:span text:style-name="Source_20_Text">metadata={</text:span></text:p>
      <text:p text:style-name="P10"><text:span text:style-name="Source_20_Text"><text:s text:c="4"/>"source":"hr_policy.pdf",</text:span></text:p>
      <text:p text:style-name="P10"><text:span text:style-name="Source_20_Text"><text:s text:c="4"/>"page":5,</text:span></text:p>
      <text:p text:style-name="P10"><text:span text:style-name="Source_20_Text"><text:s text:c="4"/>"department":"HR"</text:span></text:p>
      <text:p text:style-name="P11"><text:span text:style-name="Source_20_Text">}</text:span></text:p>
      <text:p text:style-name="P12"/>
      <text:h text:style-name="P13" text:outline-level="1"><text:soft-page-break/>3. Vai trò của Metadata trong Retrieval</text:h>
      <text:p text:style-name="P6">Metadata rất quan trọng trong hệ thống RAG.</text:p>
      <text:h text:style-name="P4" text:outline-level="2">3.1. Source Tracking</text:h>
      <text:p text:style-name="P6">Ví dụ:</text:p>
      <text:p text:style-name="P6">User hỏi:</text:p>
      <text:p text:style-name="P11"><text:span text:style-name="Source_20_Text">Where did this answer come from?</text:span></text:p>
      <text:p text:style-name="P6">Metadata giúp biết:</text:p>
      <text:p text:style-name="P10"><text:span text:style-name="Source_20_Text">Source:</text:span></text:p>
      <text:p text:style-name="P10"/>
      <text:p text:style-name="P10"><text:span text:style-name="Source_20_Text">hr_policy.pdf</text:span></text:p>
      <text:p text:style-name="P10"/>
      <text:p text:style-name="P10"><text:span text:style-name="Source_20_Text">Page:</text:span></text:p>
      <text:p text:style-name="P10"/>
      <text:p text:style-name="P11"><text:span text:style-name="Source_20_Text">5</text:span></text:p>
      <text:p text:style-name="P12"/>
      <text:h text:style-name="P4" text:outline-level="2">3.2. Filtering Retrieval</text:h>
      <text:p text:style-name="P6">Ví dụ:</text:p>
      <text:p text:style-name="P6">Công ty có:</text:p>
      <text:p text:style-name="P10"><text:span text:style-name="Source_20_Text">HR Documents</text:span></text:p>
      <text:p text:style-name="P10"/>
      <text:p text:style-name="P10"><text:span text:style-name="Source_20_Text">IT Documents</text:span></text:p>
      <text:p text:style-name="P10"/>
      <text:p text:style-name="P11"><text:span text:style-name="Source_20_Text">Finance Documents</text:span></text:p>
      <text:p text:style-name="P6">User hỏi:</text:p>
      <text:p text:style-name="P11"><text:span text:style-name="Source_20_Text">Password reset process</text:span></text:p>
      <text:p text:style-name="P6">Có thể filter:</text:p>
      <text:p text:style-name="P10"><text:span text:style-name="Source_20_Text">{</text:span></text:p>
      <text:p text:style-name="P10"><text:span text:style-name="Source_20_Text">"department":"IT"</text:span></text:p>
      <text:p text:style-name="P11"><text:span text:style-name="Source_20_Text">}</text:span></text:p>
      <text:p text:style-name="P6">Chỉ tìm trong IT documents.</text:p>
      <text:p text:style-name="P12"/>
      <text:h text:style-name="P4" text:outline-level="2">3.3. Citation</text:h>
      <text:p text:style-name="P6">Ví dụ chatbot trả lời:</text:p>
      <text:p text:style-name="P10"><text:soft-page-break/><text:span text:style-name="Source_20_Text">Employees have 20 vacation days.</text:span></text:p>
      <text:p text:style-name="P10"/>
      <text:p text:style-name="P10"><text:span text:style-name="Source_20_Text">Source:</text:span></text:p>
      <text:p text:style-name="P11"><text:span text:style-name="Source_20_Text">HR_policy.pdf page 5</text:span></text:p>
      <text:p text:style-name="P6">Thông tin này lấy từ metadata.</text:p>
      <text:p text:style-name="P12"/>
      <text:h text:style-name="P4" text:outline-level="2">3.4. Debugging</text:h>
      <text:p text:style-name="P6">Khi RAG trả lời sai:</text:p>
      <text:p text:style-name="P6">Không có metadata:</text:p>
      <text:p text:style-name="P11"><text:span text:style-name="Source_20_Text">Unknown document</text:span></text:p>
      <text:p text:style-name="P6">Có metadata:</text:p>
      <text:p text:style-name="P10"><text:span text:style-name="Source_20_Text">answer came from:</text:span></text:p>
      <text:p text:style-name="P10"/>
      <text:p text:style-name="P10"><text:span text:style-name="Source_20_Text">policy_2025.pdf</text:span></text:p>
      <text:p text:style-name="P11"><text:span text:style-name="Source_20_Text">page 13</text:span></text:p>
      <text:p text:style-name="P6">Dễ kiểm tra hơn.</text:p>
      <text:p text:style-name="P12"/>
      <text:h text:style-name="P13" text:outline-level="1">4. Raw Data vs Document Object</text:h>
      <text:h text:style-name="P4" text:outline-level="2">4.1. Raw Data</text:h>
      <text:p text:style-name="P6">Raw data là dữ liệu ban đầu.</text:p>
      <text:p text:style-name="P6">Ví dụ PDF:</text:p>
      <text:p text:style-name="P10"><text:span text:style-name="Source_20_Text">company_policy.pdf</text:span></text:p>
      <text:p text:style-name="P10"/>
      <text:p text:style-name="P10"><text:span text:style-name="Source_20_Text">Page 1:</text:span></text:p>
      <text:p text:style-name="P10"><text:span text:style-name="Source_20_Text">Company vacation policy...</text:span></text:p>
      <text:p text:style-name="P10"/>
      <text:p text:style-name="P10"><text:span text:style-name="Source_20_Text">Page 2:</text:span></text:p>
      <text:p text:style-name="P11"><text:span text:style-name="Source_20_Text">Employees receive 20 days...</text:span></text:p>
      <text:p text:style-name="P6">Đặc điểm:</text:p>
      <text:list text:style-name="L21">
        <text:list-item>
          <text:p text:style-name="P33">Không có format chuẩn.</text:p>
        </text:list-item>
        <text:list-item>
          <text:p text:style-name="P33">Khó xử lý trực tiếp.</text:p>
        </text:list-item>
        <text:list-item>
          <text:p text:style-name="P33">Không phù hợp để embedding.</text:p>
        </text:list-item>
      </text:list>
      <text:p text:style-name="P12"/>
      <text:h text:style-name="P4" text:outline-level="2"><text:soft-page-break/>4.2. Document Object</text:h>
      <text:p text:style-name="P6">Sau khi qua Loader:</text:p>
      <text:p text:style-name="P10"><text:span text:style-name="Source_20_Text">Document(</text:span></text:p>
      <text:p text:style-name="P10"><text:span text:style-name="Source_20_Text">page_content=</text:span></text:p>
      <text:p text:style-name="P10"><text:span text:style-name="Source_20_Text">"""</text:span></text:p>
      <text:p text:style-name="P10"><text:span text:style-name="Source_20_Text">Employees receive 20 days vacation.</text:span></text:p>
      <text:p text:style-name="P10"><text:span text:style-name="Source_20_Text">""",</text:span></text:p>
      <text:p text:style-name="P10"/>
      <text:p text:style-name="P10"><text:span text:style-name="Source_20_Text">metadata={</text:span></text:p>
      <text:p text:style-name="P10"><text:span text:style-name="Source_20_Text">"source":"company_policy.pdf",</text:span></text:p>
      <text:p text:style-name="P10"><text:span text:style-name="Source_20_Text">"page":2</text:span></text:p>
      <text:p text:style-name="P10"><text:span text:style-name="Source_20_Text">}</text:span></text:p>
      <text:p text:style-name="P11"><text:span text:style-name="Source_20_Text">)</text:span></text:p>
      <text:p text:style-name="P6">Đặc điểm:</text:p>
      <text:list text:style-name="L22">
        <text:list-item>
          <text:p text:style-name="P34">Có cấu trúc.</text:p>
        </text:list-item>
        <text:list-item>
          <text:p text:style-name="P34">Có metadata.</text:p>
        </text:list-item>
        <text:list-item>
          <text:p text:style-name="P34">Có thể split.</text:p>
        </text:list-item>
        <text:list-item>
          <text:p text:style-name="P34">Có thể embedding.</text:p>
        </text:list-item>
      </text:list>
      <text:p text:style-name="P12"/>
      <text:h text:style-name="P13" text:outline-level="1">So sánh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Raw Data</text:p>
            </table:table-cell>
            <table:table-cell table:style-name="Table1.A1" office:value-type="string">
              <text:p text:style-name="Table_20_Heading">Document Object</text:p>
            </table:table-cell>
          </table:table-row>
        </table:table-header-rows>
        <table:table-row>
          <table:table-cell table:style-name="Table1.A1" office:value-type="string">
            <text:p text:style-name="Table_20_Contents">Format</text:p>
          </table:table-cell>
          <table:table-cell table:style-name="Table1.A1" office:value-type="string">
            <text:p text:style-name="Table_20_Contents">Không cố định</text:p>
          </table:table-cell>
          <table:table-cell table:style-name="Table1.A1" office:value-type="string">
            <text:p text:style-name="Table_20_Contents">Chuẩn LangChain</text:p>
          </table:table-cell>
        </table:table-row>
        <table:table-row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Có thể chưa extract</text:p>
          </table:table-cell>
          <table:table-cell table:style-name="Table1.A1" office:value-type="string">
            <text:p text:style-name="Table_20_Contents">Đã extract</text:p>
          </table:table-cell>
        </table:table-row>
        <table:table-row>
          <table:table-cell table:style-name="Table1.A1" office:value-type="string">
            <text:p text:style-name="Table_20_Contents">Metadata</text:p>
          </table:table-cell>
          <table:table-cell table:style-name="Table1.A1" office:value-type="string">
            <text:p text:style-name="Table_20_Contents">Thường không có</text:p>
          </table:table-cell>
          <table:table-cell table:style-name="Table1.A1" office:value-type="string">
            <text:p text:style-name="Table_20_Contents">Có</text:p>
          </table:table-cell>
        </table:table-row>
        <table:table-row>
          <table:table-cell table:style-name="Table1.A1" office:value-type="string">
            <text:p text:style-name="Table_20_Contents">Embedding</text:p>
          </table:table-cell>
          <table:table-cell table:style-name="Table1.A1" office:value-type="string">
            <text:p text:style-name="Table_20_Contents">Khó sử dụng</text:p>
          </table:table-cell>
          <table:table-cell table:style-name="Table1.A1" office:value-type="string">
            <text:p text:style-name="Table_20_Contents">Sẵn sàng</text:p>
          </table:table-cell>
        </table:table-row>
        <table:table-row>
          <table:table-cell table:style-name="Table1.A1" office:value-type="string">
            <text:p text:style-name="Table_20_Contents">Retrieval</text:p>
          </table:table-cell>
          <table:table-cell table:style-name="Table1.A1" office:value-type="string">
            <text:p text:style-name="Table_20_Contents">Không hỗ trợ</text:p>
          </table:table-cell>
          <table:table-cell table:style-name="Table1.A1" office:value-type="string">
            <text:p text:style-name="Table_20_Contents">Hỗ trợ</text:p>
          </table:table-cell>
        </table:table-row>
        <table:table-row>
          <table:table-cell table:style-name="Table1.A1" office:value-type="string">
            <text:p text:style-name="Table_20_Contents">Tracking</text:p>
          </table:table-cell>
          <table:table-cell table:style-name="Table1.A1" office:value-type="string">
            <text:p text:style-name="Table_20_Contents">Khó</text:p>
          </table:table-cell>
          <table:table-cell table:style-name="Table1.A1" office:value-type="string">
            <text:p text:style-name="Table_20_Contents">Dễ</text:p>
          </table:table-cell>
        </table:table-row>
      </table:table>
      <text:p text:style-name="P12"/>
      <text:h text:style-name="P13" text:outline-level="1">5. Document Lifecycle trong RAG Pipeline</text:h>
      <text:h text:style-name="P4" text:outline-level="2">Phase 1: Raw Data</text:h>
      <text:p text:style-name="P6">Nguồn:</text:p>
      <text:p text:style-name="P10"><text:span text:style-name="Source_20_Text">PDF</text:span></text:p>
      <text:p text:style-name="P10"><text:span text:style-name="Source_20_Text">DOCX</text:span></text:p>
      <text:p text:style-name="P10"><text:span text:style-name="Source_20_Text">Website</text:span></text:p>
      <text:p text:style-name="P11"><text:span text:style-name="Source_20_Text">Database</text:span></text:p>
      <text:p text:style-name="P6">Ví dụ:</text:p>
      <text:p text:style-name="P11"><text:soft-page-break/><text:span text:style-name="Source_20_Text">hr_policy.pdf</text:span></text:p>
      <text:p text:style-name="P12"/>
      <text:h text:style-name="P13" text:outline-level="1">Phase 2: Document Loading</text:h>
      <text:p text:style-name="P6">Loader:</text:p>
      <text:p text:style-name="P11"><text:span text:style-name="Source_20_Text">PyPDFLoader</text:span></text:p>
      <text:p text:style-name="P6">Input:</text:p>
      <text:p text:style-name="P11"><text:span text:style-name="Source_20_Text">hr_policy.pdf</text:span></text:p>
      <text:p text:style-name="P6">Output:</text:p>
      <text:p text:style-name="P11"><text:span text:style-name="Source_20_Text">Document Object</text:span></text:p>
      <text:p text:style-name="P12"/>
      <text:p text:style-name="P6">Ví dụ:</text:p>
      <text:p text:style-name="P10"><text:span text:style-name="Source_20_Text">Document(</text:span></text:p>
      <text:p text:style-name="P10"><text:span text:style-name="Source_20_Text">page_content="Annual leave is 20 days",</text:span></text:p>
      <text:p text:style-name="P10"/>
      <text:p text:style-name="P10"><text:span text:style-name="Source_20_Text">metadata={</text:span></text:p>
      <text:p text:style-name="P10"><text:span text:style-name="Source_20_Text">"source":"hr_policy.pdf",</text:span></text:p>
      <text:p text:style-name="P10"><text:span text:style-name="Source_20_Text">"page":1</text:span></text:p>
      <text:p text:style-name="P10"><text:span text:style-name="Source_20_Text">}</text:span></text:p>
      <text:p text:style-name="P11"><text:span text:style-name="Source_20_Text">)</text:span></text:p>
      <text:p text:style-name="P12"/>
      <text:h text:style-name="P13" text:outline-level="1">Phase 3: Document Processing</text:h>
      <text:p text:style-name="P6">Document được xử lý:</text:p>
      <text:p text:style-name="P10"><text:span text:style-name="Source_20_Text">Documen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Cleaning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Removing noise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Text normalization</text:span></text:p>
      <text:p text:style-name="P12"><text:soft-page-break/></text:p>
      <text:h text:style-name="P13" text:outline-level="1">Phase 4: Text Splitting</text:h>
      <text:p text:style-name="P6">Document lớn:</text:p>
      <text:p text:style-name="P11"><text:span text:style-name="Source_20_Text">10000 characters</text:span></text:p>
      <text:p text:style-name="P6">Thành:</text:p>
      <text:p text:style-name="P10"><text:span text:style-name="Source_20_Text">Chunk 1</text:span></text:p>
      <text:p text:style-name="P10"/>
      <text:p text:style-name="P10"><text:span text:style-name="Source_20_Text">Chunk 2</text:span></text:p>
      <text:p text:style-name="P10"/>
      <text:p text:style-name="P11"><text:span text:style-name="Source_20_Text">Chunk 3</text:span></text:p>
      <text:p text:style-name="P6">Ví dụ:</text:p>
      <text:p text:style-name="P6">Before:</text:p>
      <text:p text:style-name="P10"><text:span text:style-name="Source_20_Text">Document(</text:span></text:p>
      <text:p text:style-name="P10"><text:span text:style-name="Source_20_Text">page_content="5000 chars"</text:span></text:p>
      <text:p text:style-name="P11"><text:span text:style-name="Source_20_Text">)</text:span></text:p>
      <text:p text:style-name="P6">After:</text:p>
      <text:p text:style-name="P10"><text:span text:style-name="Source_20_Text">[</text:span></text:p>
      <text:p text:style-name="P10"><text:span text:style-name="Source_20_Text">Document(chunk1),</text:span></text:p>
      <text:p text:style-name="P10"><text:span text:style-name="Source_20_Text">Document(chunk2),</text:span></text:p>
      <text:p text:style-name="P10"><text:span text:style-name="Source_20_Text">Document(chunk3)</text:span></text:p>
      <text:p text:style-name="P11"><text:span text:style-name="Source_20_Text">]</text:span></text:p>
      <text:p text:style-name="P12"/>
      <text:h text:style-name="P13" text:outline-level="1">Phase 5: Embedding</text:h>
      <text:p text:style-name="P6">Mỗi chunk:</text:p>
      <text:p text:style-name="P10"><text:span text:style-name="Source_20_Text">Tex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Embedding Model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Vector</text:span></text:p>
      <text:p text:style-name="P6">Ví dụ:</text:p>
      <text:p text:style-name="P10"><text:span text:style-name="Source_20_Text">Vacation policy</text:span></text:p>
      <text:p text:style-name="P10"><text:soft-page-break/></text:p>
      <text:p text:style-name="P10"><text:span text:style-name="Source_20_Text">↓</text:span></text:p>
      <text:p text:style-name="P10"/>
      <text:p text:style-name="P10"><text:span text:style-name="Source_20_Text">[</text:span></text:p>
      <text:p text:style-name="P10"><text:span text:style-name="Source_20_Text">0.23,</text:span></text:p>
      <text:p text:style-name="P10"><text:span text:style-name="Source_20_Text">0.51,</text:span></text:p>
      <text:p text:style-name="P10"><text:span text:style-name="Source_20_Text">0.88</text:span></text:p>
      <text:p text:style-name="P11"><text:span text:style-name="Source_20_Text">]</text:span></text:p>
      <text:p text:style-name="P12"/>
      <text:h text:style-name="P13" text:outline-level="1">Phase 6: Vector Database</text:h>
      <text:p text:style-name="P6">Lưu:</text:p>
      <text:p text:style-name="P10"><text:span text:style-name="Source_20_Text">Vector</text:span></text:p>
      <text:p text:style-name="P10"/>
      <text:p text:style-name="P10"><text:span text:style-name="Source_20_Text">+</text:span></text:p>
      <text:p text:style-name="P10"/>
      <text:p text:style-name="P11"><text:span text:style-name="Source_20_Text">Metadata</text:span></text:p>
      <text:p text:style-name="P6">Ví dụ:</text:p>
      <text:p text:style-name="P10"><text:span text:style-name="Source_20_Text">Vector:</text:span></text:p>
      <text:p text:style-name="P10"/>
      <text:p text:style-name="P10"><text:span text:style-name="Source_20_Text">[0.23,0.51]</text:span></text:p>
      <text:p text:style-name="P10"/>
      <text:p text:style-name="P10"/>
      <text:p text:style-name="P10"><text:span text:style-name="Source_20_Text">Metadata:</text:span></text:p>
      <text:p text:style-name="P10"/>
      <text:p text:style-name="P10"><text:span text:style-name="Source_20_Text">{</text:span></text:p>
      <text:p text:style-name="P10"><text:span text:style-name="Source_20_Text">source:"hr.pdf",</text:span></text:p>
      <text:p text:style-name="P10"><text:span text:style-name="Source_20_Text">page:5</text:span></text:p>
      <text:p text:style-name="P11"><text:span text:style-name="Source_20_Text">}</text:span></text:p>
      <text:p text:style-name="P12"/>
      <text:h text:style-name="P13" text:outline-level="1">Phase 7: Retrieval</text:h>
      <text:p text:style-name="P6">User:</text:p>
      <text:p text:style-name="P11"><text:span text:style-name="Source_20_Text">How many vacation days?</text:span></text:p>
      <text:p text:style-name="P6">Retriever:</text:p>
      <text:p text:style-name="P10"><text:span text:style-name="Source_20_Text">Search vector similarity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Return Documents</text:span></text:p>
      <text:p text:style-name="P6"><text:soft-page-break/>Output:</text:p>
      <text:p text:style-name="P10"><text:span text:style-name="Source_20_Text">Document:</text:span></text:p>
      <text:p text:style-name="P10"/>
      <text:p text:style-name="P11"><text:span text:style-name="Source_20_Text">Employees receive 20 vacation days.</text:span></text:p>
      <text:p text:style-name="P12"/>
      <text:h text:style-name="P13" text:outline-level="1">6. Tạo Document Object bằng Python</text:h>
      <text:h text:style-name="P4" text:outline-level="2">6.1. Cài đặt</text:h>
      <text:p text:style-name="P11"><text:span text:style-name="Source_20_Text">pip install langchain</text:span></text:p>
      <text:p text:style-name="P12"/>
      <text:h text:style-name="P13" text:outline-level="1">6.2. Import Document</text:h>
      <text:p text:style-name="P11"><text:span text:style-name="Source_20_Text">from langchain_core.documents import Document</text:span></text:p>
      <text:p text:style-name="P12"/>
      <text:h text:style-name="P13" text:outline-level="1">6.3. Tạo Document</text:h>
      <text:p text:style-name="P10"><text:span text:style-name="Source_20_Text">document = Document(</text:span></text:p>
      <text:p text:style-name="P10"><text:span text:style-name="Source_20_Text"><text:s text:c="4"/>page_content=</text:span></text:p>
      <text:p text:style-name="P10"><text:span text:style-name="Source_20_Text"><text:s text:c="4"/>"Employees receive 20 vacation days annually.",</text:span></text:p>
      <text:p text:style-name="P10"/>
      <text:p text:style-name="P10"><text:span text:style-name="Source_20_Text"><text:s text:c="4"/>metadata={</text:span></text:p>
      <text:p text:style-name="P10"><text:span text:style-name="Source_20_Text"><text:s text:c="8"/>"source":"hr_policy.pdf",</text:span></text:p>
      <text:p text:style-name="P10"><text:span text:style-name="Source_20_Text"><text:s text:c="8"/>"page":5,</text:span></text:p>
      <text:p text:style-name="P10"><text:span text:style-name="Source_20_Text"><text:s text:c="8"/>"department":"HR"</text:span></text:p>
      <text:p text:style-name="P10"><text:span text:style-name="Source_20_Text"><text:s text:c="4"/>}</text:span></text:p>
      <text:p text:style-name="P10"><text:span text:style-name="Source_20_Text">)</text:span></text:p>
      <text:p text:style-name="P10"/>
      <text:p text:style-name="P10"/>
      <text:p text:style-name="P11"><text:span text:style-name="Source_20_Text">print(document)</text:span></text:p>
      <text:p text:style-name="P6">Output:</text:p>
      <text:p text:style-name="P10"><text:span text:style-name="Source_20_Text">page_content='Employees receive 20 vacation days annually.'</text:span></text:p>
      <text:p text:style-name="P10"/>
      <text:p text:style-name="P10"><text:span text:style-name="Source_20_Text">metadata={</text:span></text:p>
      <text:p text:style-name="P10"><text:span text:style-name="Source_20_Text">source:'hr_policy.pdf',</text:span></text:p>
      <text:p text:style-name="P10"><text:span text:style-name="Source_20_Text">page:5,</text:span></text:p>
      <text:p text:style-name="P10"><text:span text:style-name="Source_20_Text">department:'HR'</text:span></text:p>
      <text:p text:style-name="P11"><text:span text:style-name="Source_20_Text">}</text:span></text:p>
      <text:p text:style-name="P12"/>
      <text:h text:style-name="P13" text:outline-level="1"><text:soft-page-break/>7. Xử lý nhiều Documents</text:h>
      <text:p text:style-name="P10"><text:span text:style-name="Source_20_Text">documents = [</text:span></text:p>
      <text:p text:style-name="P10"/>
      <text:p text:style-name="P10"><text:span text:style-name="Source_20_Text">Document(</text:span></text:p>
      <text:p text:style-name="P10"><text:span text:style-name="Source_20_Text">page_content="Python is programming language",</text:span></text:p>
      <text:p text:style-name="P10"><text:span text:style-name="Source_20_Text">metadata={</text:span></text:p>
      <text:p text:style-name="P10"><text:span text:style-name="Source_20_Text">"source":"python.pdf",</text:span></text:p>
      <text:p text:style-name="P10"><text:span text:style-name="Source_20_Text">"page":1</text:span></text:p>
      <text:p text:style-name="P10"><text:span text:style-name="Source_20_Text">}</text:span></text:p>
      <text:p text:style-name="P10"><text:span text:style-name="Source_20_Text">),</text:span></text:p>
      <text:p text:style-name="P10"/>
      <text:p text:style-name="P10"/>
      <text:p text:style-name="P10"><text:span text:style-name="Source_20_Text">Document(</text:span></text:p>
      <text:p text:style-name="P10"><text:span text:style-name="Source_20_Text">page_content="LangChain builds LLM applications",</text:span></text:p>
      <text:p text:style-name="P10"><text:span text:style-name="Source_20_Text">metadata={</text:span></text:p>
      <text:p text:style-name="P10"><text:span text:style-name="Source_20_Text">"source":"langchain.pdf",</text:span></text:p>
      <text:p text:style-name="P10"><text:span text:style-name="Source_20_Text">"page":2</text:span></text:p>
      <text:p text:style-name="P10"><text:span text:style-name="Source_20_Text">}</text:span></text:p>
      <text:p text:style-name="P10"><text:span text:style-name="Source_20_Text">)</text:span></text:p>
      <text:p text:style-name="P10"/>
      <text:p text:style-name="P10"><text:span text:style-name="Source_20_Text">]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metadata["source"]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</text:span></text:p>
      <text:p text:style-name="P10"><text:span text:style-name="Source_20_Text"><text:s text:c="4"/>)</text:span></text:p>
      <text:p text:style-name="P11"/>
      <text:p text:style-name="P6">Output:</text:p>
      <text:p text:style-name="P10"><text:span text:style-name="Source_20_Text">python.pdf</text:span></text:p>
      <text:p text:style-name="P10"/>
      <text:p text:style-name="P10"><text:span text:style-name="Source_20_Text">Python is programming language</text:span></text:p>
      <text:p text:style-name="P10"/>
      <text:p text:style-name="P10"/>
      <text:p text:style-name="P10"><text:span text:style-name="Source_20_Text">langchain.pdf</text:span></text:p>
      <text:p text:style-name="P10"/>
      <text:p text:style-name="P11"><text:span text:style-name="Source_20_Text">LangChain builds LLM applications</text:span></text:p>
      <text:p text:style-name="P12"/>
      <text:h text:style-name="P13" text:outline-level="1"><text:soft-page-break/>8. Thực hành: Document Object Processing</text:h>
      <text:h text:style-name="P4" text:outline-level="2">Bài tập 1: Create Document</text:h>
      <text:p text:style-name="P6">Yêu cầu:</text:p>
      <text:p text:style-name="P6">Tạo 3 Document:</text:p>
      <text:p text:style-name="P6">Document 1:</text:p>
      <text:p text:style-name="P10"><text:span text:style-name="Source_20_Text">Source:</text:span></text:p>
      <text:p text:style-name="P10"><text:span text:style-name="Source_20_Text">company_policy.pdf</text:span></text:p>
      <text:p text:style-name="P10"><text:span text:style-name="Source_20_Text">Page:</text:span></text:p>
      <text:p text:style-name="P11"><text:span text:style-name="Source_20_Text">1</text:span></text:p>
      <text:p text:style-name="P6">Content:</text:p>
      <text:p text:style-name="P11"><text:span text:style-name="Source_20_Text">Company working hours</text:span></text:p>
      <text:p text:style-name="P6">Document 2:</text:p>
      <text:p text:style-name="P10"><text:span text:style-name="Source_20_Text">Source:</text:span></text:p>
      <text:p text:style-name="P10"><text:span text:style-name="Source_20_Text">security_policy.pdf</text:span></text:p>
      <text:p text:style-name="P10"><text:span text:style-name="Source_20_Text">Page:</text:span></text:p>
      <text:p text:style-name="P11"><text:span text:style-name="Source_20_Text">5</text:span></text:p>
      <text:p text:style-name="P6">Content:</text:p>
      <text:p text:style-name="P11"><text:span text:style-name="Source_20_Text">Password security rules</text:span></text:p>
      <text:p text:style-name="P6">Document 3:</text:p>
      <text:p text:style-name="P10"><text:span text:style-name="Source_20_Text">Source:</text:span></text:p>
      <text:p text:style-name="P10"><text:span text:style-name="Source_20_Text">hr_policy.pdf</text:span></text:p>
      <text:p text:style-name="P10"><text:span text:style-name="Source_20_Text">Page:</text:span></text:p>
      <text:p text:style-name="P11"><text:span text:style-name="Source_20_Text">3</text:span></text:p>
      <text:p text:style-name="P6">Content:</text:p>
      <text:p text:style-name="P11"><text:span text:style-name="Source_20_Text">Annual leave policy</text:span></text:p>
      <text:p text:style-name="P12"/>
      <text:h text:style-name="P13" text:outline-level="1">Bài tập 2: Metadata Filtering</text:h>
      <text:p text:style-name="P6">Viết chương trình:</text:p>
      <text:p text:style-name="P6">Input:</text:p>
      <text:p text:style-name="P11"><text:span text:style-name="Source_20_Text">department="HR"</text:span></text:p>
      <text:p text:style-name="P6">Output:</text:p>
      <text:p text:style-name="P11"><text:soft-page-break/><text:span text:style-name="Source_20_Text">Only HR documents</text:span></text:p>
      <text:p text:style-name="P12"/>
      <text:h text:style-name="P13" text:outline-level="1">Bài tập 3: Document Analysis</text:h>
      <text:p text:style-name="P6">Viết function:</text:p>
      <text:p text:style-name="P11"><text:span text:style-name="Source_20_Text">analyze_documents(documents)</text:span></text:p>
      <text:p text:style-name="P6">Output:</text:p>
      <text:p text:style-name="P10"><text:span text:style-name="Source_20_Text">Total documents:</text:span></text:p>
      <text:p text:style-name="P10"/>
      <text:p text:style-name="P10"><text:span text:style-name="Source_20_Text">3</text:span></text:p>
      <text:p text:style-name="P10"/>
      <text:p text:style-name="P10"/>
      <text:p text:style-name="P10"><text:span text:style-name="Source_20_Text">Sources:</text:span></text:p>
      <text:p text:style-name="P10"/>
      <text:p text:style-name="P10"><text:span text:style-name="Source_20_Text">hr_policy.pdf</text:span></text:p>
      <text:p text:style-name="P10"><text:span text:style-name="Source_20_Text">security_policy.pdf</text:span></text:p>
      <text:p text:style-name="P10"/>
      <text:p text:style-name="P10"/>
      <text:p text:style-name="P10"><text:span text:style-name="Source_20_Text">Average content length:</text:span></text:p>
      <text:p text:style-name="P10"/>
      <text:p text:style-name="P11"><text:span text:style-name="Source_20_Text">xxx characters</text:span></text:p>
      <text:p text:style-name="P12"/>
      <text:h text:style-name="P13" text:outline-level="1">9. Các lỗi thường gặp</text:h>
      <text:h text:style-name="P4" text:outline-level="2">1. Metadata không đầy đủ</text:h>
      <text:p text:style-name="P6">Ví dụ:</text:p>
      <text:p text:style-name="P10"><text:span text:style-name="Source_20_Text">Document(</text:span></text:p>
      <text:p text:style-name="P10"><text:span text:style-name="Source_20_Text">page_content="text"</text:span></text:p>
      <text:p text:style-name="P11"><text:span text:style-name="Source_20_Text">)</text:span></text:p>
      <text:p text:style-name="P6">Không có:</text:p>
      <text:p text:style-name="P10"><text:span text:style-name="Source_20_Text">source</text:span></text:p>
      <text:p text:style-name="P11"><text:span text:style-name="Source_20_Text">page</text:span></text:p>
      <text:p text:style-name="P6">Hậu quả:</text:p>
      <text:list text:style-name="L23">
        <text:list-item>
          <text:p text:style-name="P35">Không biết nguồn.</text:p>
        </text:list-item>
        <text:list-item>
          <text:p text:style-name="P35">Khó debug.</text:p>
        </text:list-item>
      </text:list>
      <text:p text:style-name="P12"/>
      <text:h text:style-name="P4" text:outline-level="2"><text:soft-page-break/>2. page_content quá dài</text:h>
      <text:p text:style-name="P6">Vấn đề:</text:p>
      <text:p text:style-name="P11"><text:span text:style-name="Source_20_Text">Context length exceeded</text:span></text:p>
      <text:p text:style-name="P6">Giải pháp:</text:p>
      <text:list text:style-name="L24">
        <text:list-item>
          <text:p text:style-name="P36">Text splitting.</text:p>
        </text:list-item>
      </text:list>
      <text:p text:style-name="P12"/>
      <text:h text:style-name="P4" text:outline-level="2">3. Metadata sai format</text:h>
      <text:p text:style-name="P6">Ví dụ:</text:p>
      <text:p text:style-name="P11"><text:span text:style-name="Source_20_Text">metadata="pdf"</text:span></text:p>
      <text:p text:style-name="P6">Nên:</text:p>
      <text:p text:style-name="P10"><text:span text:style-name="Source_20_Text">metadata={</text:span></text:p>
      <text:p text:style-name="P10"><text:span text:style-name="Source_20_Text">"source":"file.pdf"</text:span></text:p>
      <text:p text:style-name="P11"><text:span text:style-name="Source_20_Text">}</text:span></text:p>
      <text:p text:style-name="P12"/>
      <text:h text:style-name="P4" text:outline-level="2">4. Mất metadata khi xử lý</text:h>
      <text:p text:style-name="P6">Ví dụ:</text:p>
      <text:p text:style-name="P6">Sau chunking:</text:p>
      <text:p text:style-name="P10"><text:span text:style-name="Source_20_Text">Chunk</text:span></text:p>
      <text:p text:style-name="P10"/>
      <text:p text:style-name="P11"><text:span text:style-name="Source_20_Text">Không còn source</text:span></text:p>
      <text:p text:style-name="P6">Ảnh hưởng:</text:p>
      <text:list text:style-name="L25">
        <text:list-item>
          <text:p text:style-name="P37">Không citation được.</text:p>
        </text:list-item>
        <text:list-item>
          <text:p text:style-name="P37">Không tracking được.</text:p>
        </text:list-item>
      </text:list>
      <text:p text:style-name="P12"/>
      <text:h text:style-name="P13" text:outline-level="1">10. Kết quả cần đạt sau bài học</text:h>
      <text:p text:style-name="P6">Sau khi hoàn thành bài học, AI Engineer Intern có thể:</text:p>
      <text:h text:style-name="P4" text:outline-level="2">Kiến thức</text:h>
      <text:list text:style-name="L26">
        <text:list-item>
          <text:p text:style-name="P38">Hiểu Document Object trong LangChain.</text:p>
        </text:list-item>
        <text:list-item>
          <text:p text:style-name="P38">Hiểu page_content.</text:p>
        </text:list-item>
        <text:list-item>
          <text:p text:style-name="P38"><text:soft-page-break/>Hiểu metadata.</text:p>
        </text:list-item>
        <text:list-item>
          <text:p text:style-name="P38">Hiểu lifecycle của document trong RAG.</text:p>
        </text:list-item>
      </text:list>
      <text:h text:style-name="P4" text:outline-level="2">Kỹ năng</text:h>
      <text:p text:style-name="P6">Có thể:</text:p>
      <text:list text:style-name="L27">
        <text:list-item>
          <text:p text:style-name="P39">Tạo Document bằng Python.</text:p>
        </text:list-item>
        <text:list-item>
          <text:p text:style-name="P39">Đọc metadata.</text:p>
        </text:list-item>
        <text:list-item>
          <text:p text:style-name="P39">Xử lý nhiều documents.</text:p>
        </text:list-item>
        <text:list-item>
          <text:p text:style-name="P39">Chuẩn bị dữ liệu cho Text Splitting.</text:p>
        </text:list-item>
        <text:list-item>
          <text:p text:style-name="P39">Debug lỗi trong Data Ingestion Pipeline.</text:p>
        </text:list-item>
      </text:list>
      <text:h text:style-name="P4" text:outline-level="2">Kiến thức chuẩn bị cho bài tiếp theo:</text:h>
      <text:p text:style-name="P10"><text:span text:style-name="Source_20_Text">Document Object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Text Splitting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Chunk Strategy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<text:s text:c="8"/>↓</text:span></text:p>
      <text:p text:style-name="P10"/>
      <text:p text:style-name="P11"><text:span text:style-name="Source_20_Text">Vector Database</text:span></text:p>
      <text:p text:style-name="P1"/>
      <text:h text:style-name="Heading_20_1" text:outline-level="1">3. <text:s/><text:span text:style-name="T4">LangChain Document Loaders</text:span></text:h>
      <text:p text:style-name="P1"/>
      <text:h text:style-name="P3" text:outline-level="1"><text:soft-page-break/>Giáo trình chuyên sâu: LangChain Document Loaders</text:h>
      <text:h text:style-name="P4" text:outline-level="2">1. Tổng quan về Document Loader trong LangChain</text:h>
      <text:h text:style-name="P4" text:outline-level="2">1.1. Document Loader là gì?</text:h>
      <text:p text:style-name="P6"><text:span text:style-name="Strong_20_Emphasis">Document Loader</text:span> là một component trong LangChain dùng để kết nối với các nguồn dữ liệu bên ngoài (external data sources), đọc dữ liệu và chuyển đổi chúng thành <text:span text:style-name="Strong_20_Emphasis">LangChain Document Object</text:span>.</text:p>
      <text:p text:style-name="P6">Mục tiêu chính:</text:p>
      <text:p text:style-name="P14">Biến dữ liệu không có cấu trúc (PDF, Word, HTML, CSV...) thành format chuẩn để phục vụ các bước tiếp theo trong RAG Pipeline.</text:p>
      <text:p text:style-name="P12"/>
      <text:p text:style-name="P6">Ví dụ:</text:p>
      <text:h text:style-name="P5" text:outline-level="3">Input</text:h>
      <text:p text:style-name="P6">File PDF:</text:p>
      <text:p text:style-name="P10"><text:span text:style-name="Source_20_Text">company_policy.pdf</text:span></text:p>
      <text:p text:style-name="P10"/>
      <text:p text:style-name="P10"><text:span text:style-name="Source_20_Text">Page 1:</text:span></text:p>
      <text:p text:style-name="P10"><text:span text:style-name="Source_20_Text">Employees have 20 vacation days.</text:span></text:p>
      <text:p text:style-name="P10"/>
      <text:p text:style-name="P10"><text:span text:style-name="Source_20_Text">Page 2:</text:span></text:p>
      <text:p text:style-name="P11"><text:span text:style-name="Source_20_Text">Security rules...</text:span></text:p>
      <text:p text:style-name="P12"/>
      <text:h text:style-name="P5" text:outline-level="3">Document Loader</text:h>
      <text:p text:style-name="P11"><text:span text:style-name="Source_20_Text">PyPDFLoader</text:span></text:p>
      <text:p text:style-name="P12"/>
      <text:h text:style-name="P5" text:outline-level="3">Output</text:h>
      <text:p text:style-name="P10"><text:span text:style-name="Source_20_Text">[</text:span></text:p>
      <text:p text:style-name="P10"><text:span text:style-name="Source_20_Text"><text:s text:c="4"/>Document(</text:span></text:p>
      <text:p text:style-name="P10"><text:span text:style-name="Source_20_Text"><text:s text:c="8"/>page_content="Employees have 20 vacation days.",</text:span></text:p>
      <text:p text:style-name="P10"><text:span text:style-name="Source_20_Text"><text:s text:c="8"/>metadata={</text:span></text:p>
      <text:p text:style-name="P10"><text:span text:style-name="Source_20_Text"><text:s text:c="12"/>"source":"company_policy.pdf",</text:span></text:p>
      <text:p text:style-name="P10"><text:span text:style-name="Source_20_Text"><text:s text:c="12"/>"page":0</text:span></text:p>
      <text:p text:style-name="P10"><text:span text:style-name="Source_20_Text"><text:s text:c="8"/>}</text:span></text:p>
      <text:p text:style-name="P10"><text:span text:style-name="Source_20_Text"><text:s text:c="4"/>),</text:span></text:p>
      <text:p text:style-name="P10"/>
      <text:p text:style-name="P10"><text:span text:style-name="Source_20_Text"><text:s text:c="4"/>Document(</text:span></text:p>
      <text:p text:style-name="P10"><text:soft-page-break/><text:span text:style-name="Source_20_Text"><text:s text:c="8"/>page_content="Security rules...",</text:span></text:p>
      <text:p text:style-name="P10"><text:span text:style-name="Source_20_Text"><text:s text:c="8"/>metadata={</text:span></text:p>
      <text:p text:style-name="P10"><text:span text:style-name="Source_20_Text"><text:s text:c="12"/>"source":"company_policy.pdf",</text:span></text:p>
      <text:p text:style-name="P10"><text:span text:style-name="Source_20_Text"><text:s text:c="12"/>"page":1</text:span></text:p>
      <text:p text:style-name="P10"><text:span text:style-name="Source_20_Text"><text:s text:c="8"/>}</text:span></text:p>
      <text:p text:style-name="P10"><text:span text:style-name="Source_20_Text"><text:s text:c="4"/>)</text:span></text:p>
      <text:p text:style-name="P11"><text:span text:style-name="Source_20_Text">]</text:span></text:p>
      <text:p text:style-name="P12"/>
      <text:h text:style-name="P13" text:outline-level="1">2. Vị trí của Document Loader trong RAG Architecture</text:h>
      <text:p text:style-name="P6">Document Loader nằm ở bước đầu tiên của Data Ingestion Pipeline.</text:p>
      <text:p text:style-name="P10"><text:span text:style-name="Source_20_Text"><text:s text:c="16"/>External Data</text:span></text:p>
      <text:p text:style-name="P10"/>
      <text:p text:style-name="P10"><text:span text:style-name="Source_20_Text"><text:s text:c="8"/>PDF / DOCX / Web / Database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1"/>Document Loader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0"/>LangChain Document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2"/>Text Splitter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4"/>Embedding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0"/>Vector Database</text:span></text:p>
      <text:p text:style-name="P10"/>
      <text:p text:style-name="P10"><text:span text:style-name="Source_20_Text"><text:s text:c="20"/>|</text:span></text:p>
      <text:p text:style-name="P10"><text:span text:style-name="Source_20_Text"><text:s text:c="20"/>↓</text:span></text:p>
      <text:p text:style-name="P10"/>
      <text:p text:style-name="P10"><text:span text:style-name="Source_20_Text"><text:s text:c="13"/>Retriever</text:span></text:p>
      <text:p text:style-name="P10"/>
      <text:p text:style-name="P10"><text:span text:style-name="Source_20_Text"><text:s text:c="20"/>|</text:span></text:p>
      <text:p text:style-name="P10"><text:soft-page-break/><text:span text:style-name="Source_20_Text"><text:s text:c="20"/>↓</text:span></text:p>
      <text:p text:style-name="P10"/>
      <text:p text:style-name="P11"><text:span text:style-name="Source_20_Text"><text:s text:c="17"/>LLM</text:span></text:p>
      <text:p text:style-name="P12"/>
      <text:h text:style-name="P13" text:outline-level="1">3. Document Loader Architecture</text:h>
      <text:h text:style-name="P4" text:outline-level="2">3.1. Kiến trúc tổng quát</text:h>
      <text:p text:style-name="P10"><text:span text:style-name="Source_20_Text"><text:s text:c="14"/>Data Source</text:span></text:p>
      <text:p text:style-name="P10"/>
      <text:p text:style-name="P10"><text:span text:style-name="Source_20_Text"><text:s text:c="18"/>|</text:span></text:p>
      <text:p text:style-name="P10"><text:span text:style-name="Source_20_Text"><text:s text:c="18"/>|</text:span></text:p>
      <text:p text:style-name="P10"/>
      <text:p text:style-name="P10"><text:span text:style-name="Source_20_Text"><text:s text:c="10"/>Document Loader Interface</text:span></text:p>
      <text:p text:style-name="P10"/>
      <text:p text:style-name="P10"><text:span text:style-name="Source_20_Text"><text:s text:c="18"/>|</text:span></text:p>
      <text:p text:style-name="P10"><text:span text:style-name="Source_20_Text"><text:s text:c="8"/>-----------------------</text:span></text:p>
      <text:p text:style-name="P10"/>
      <text:p text:style-name="P10"><text:span text:style-name="Source_20_Text"><text:s text:c="8"/>| <text:s text:c="9"/>| <text:s text:c="9"/>|</text:span></text:p>
      <text:p text:style-name="P10"/>
      <text:p text:style-name="P10"><text:span text:style-name="Source_20_Text"><text:s text:c="6"/>PDF <text:s text:c="6"/>Word <text:s text:c="6"/>Web</text:span></text:p>
      <text:p text:style-name="P10"/>
      <text:p text:style-name="P10"><text:span text:style-name="Source_20_Text"><text:s text:c="4"/>Loader <text:s text:c="4"/>Loader <text:s text:c="3"/>Loader</text:span></text:p>
      <text:p text:style-name="P10"/>
      <text:p text:style-name="P10"><text:span text:style-name="Source_20_Text"><text:s text:c="8"/>| <text:s text:c="9"/>| <text:s text:c="9"/>|</text:span></text:p>
      <text:p text:style-name="P10"/>
      <text:p text:style-name="P10"><text:span text:style-name="Source_20_Text"><text:s text:c="8"/>-----------------------</text:span></text:p>
      <text:p text:style-name="P10"/>
      <text:p text:style-name="P10"><text:span text:style-name="Source_20_Text"><text:s text:c="18"/>|</text:span></text:p>
      <text:p text:style-name="P10"/>
      <text:p text:style-name="P10"><text:span text:style-name="Source_20_Text"><text:s text:c="10"/>Document Objects</text:span></text:p>
      <text:p text:style-name="P11"/>
      <text:p text:style-name="P12"/>
      <text:h text:style-name="P13" text:outline-level="1">3.2. Base Loader Interface</text:h>
      <text:p text:style-name="P6">Trong LangChain, các loader đều tuân theo một interface chung.</text:p>
      <text:p text:style-name="P6">Các method quan trọng:</text:p>
      <text:h text:style-name="P4" text:outline-level="2">load()</text:h>
      <text:p text:style-name="P6">Load toàn bộ dữ liệu vào memory.</text:p>
      <text:h text:style-name="P4" text:outline-level="2"><text:soft-page-break/>lazy_load()</text:h>
      <text:p text:style-name="P6">Load dữ liệu từng phần.</text:p>
      <text:p text:style-name="P6">Ví dụ:</text:p>
      <text:p text:style-name="P11"><text:span text:style-name="Source_20_Text">loader.load()</text:span></text:p>
      <text:p text:style-name="P6">hoặc:</text:p>
      <text:p text:style-name="P11"><text:span text:style-name="Source_20_Text">loader.lazy_load()</text:span></text:p>
      <text:p text:style-name="P12"/>
      <text:h text:style-name="P13" text:outline-level="1">4. Cách Document Loader hoạt động</text:h>
      <text:h text:style-name="P4" text:outline-level="2">Bước 1: Nhận Input</text:h>
      <text:p text:style-name="P6">Ví dụ:</text:p>
      <text:p text:style-name="P6">PDF:</text:p>
      <text:p text:style-name="P11"><text:span text:style-name="Source_20_Text">document.pdf</text:span></text:p>
      <text:p text:style-name="P12"/>
      <text:h text:style-name="P4" text:outline-level="2">Bước 2: Parse dữ liệu</text:h>
      <text:p text:style-name="P6">Loader sử dụng thư viện bên dưới:</text:p>
      <text:p text:style-name="P6">Ví dụ:</text:p>
      <text:p text:style-name="P6">PDF:</text:p>
      <text:p text:style-name="P10"><text:span text:style-name="Source_20_Text">PyPDFLoader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pypdf</text:span></text:p>
      <text:p text:style-name="P6">DOCX:</text:p>
      <text:p text:style-name="P10"><text:span text:style-name="Source_20_Text">Docx2txtLoader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docx2txt</text:span></text:p>
      <text:p text:style-name="P6">Web:</text:p>
      <text:p text:style-name="P10"><text:span text:style-name="Source_20_Text">WebBaseLoader</text:span></text:p>
      <text:p text:style-name="P10"/>
      <text:p text:style-name="P10"><text:span text:style-name="Source_20_Text">↓</text:span></text:p>
      <text:p text:style-name="P10"><text:soft-page-break/></text:p>
      <text:p text:style-name="P11"><text:span text:style-name="Source_20_Text">BeautifulSoup</text:span></text:p>
      <text:p text:style-name="P12"/>
      <text:h text:style-name="P4" text:outline-level="2">Bước 3: Extract Content</text:h>
      <text:p text:style-name="P6">Ví dụ:</text:p>
      <text:p text:style-name="P6">PDF:</text:p>
      <text:p text:style-name="P10"><text:span text:style-name="Source_20_Text">Page 1</text:span></text:p>
      <text:p text:style-name="P10"/>
      <text:p text:style-name="P11"><text:span text:style-name="Source_20_Text">Hello LangChain</text:span></text:p>
      <text:p text:style-name="P6">Extract:</text:p>
      <text:p text:style-name="P10"><text:span text:style-name="Source_20_Text">page_content=</text:span></text:p>
      <text:p text:style-name="P11"><text:span text:style-name="Source_20_Text">"Hello LangChain"</text:span></text:p>
      <text:p text:style-name="P12"/>
      <text:h text:style-name="P4" text:outline-level="2">Bước 4: Create Document Object</text:h>
      <text:p text:style-name="P6">Output:</text:p>
      <text:p text:style-name="P10"><text:span text:style-name="Source_20_Text">Document(</text:span></text:p>
      <text:p text:style-name="P10"><text:span text:style-name="Source_20_Text"><text:s text:c="4"/>page_content="Hello LangChain",</text:span></text:p>
      <text:p text:style-name="P10"/>
      <text:p text:style-name="P10"><text:span text:style-name="Source_20_Text"><text:s text:c="4"/>metadata={</text:span></text:p>
      <text:p text:style-name="P10"><text:span text:style-name="Source_20_Text"><text:s text:c="8"/>"source":"file.pdf",</text:span></text:p>
      <text:p text:style-name="P10"><text:span text:style-name="Source_20_Text"><text:s text:c="8"/>"page":1</text:span></text:p>
      <text:p text:style-name="P10"><text:span text:style-name="Source_20_Text"><text:s text:c="4"/>}</text:span></text:p>
      <text:p text:style-name="P11"><text:span text:style-name="Source_20_Text">)</text:span></text:p>
      <text:p text:style-name="P12"/>
      <text:h text:style-name="P13" text:outline-level="1">5. load() và lazy_load()</text:h>
      <text:h text:style-name="P13" text:outline-level="1">5.1. load()</text:h>
      <text:h text:style-name="P4" text:outline-level="2">Khái niệm</text:h>
      <text:p text:style-name="P6"><text:span text:style-name="Source_20_Text">load()</text:span> đọc toàn bộ dữ liệu và trả về list Document.</text:p>
      <text:p text:style-name="P6">Ví dụ:</text:p>
      <text:p text:style-name="P11"><text:span text:style-name="Source_20_Text">documents = loader.load()</text:span></text:p>
      <text:p text:style-name="P6">Output:</text:p>
      <text:p text:style-name="P10"><text:soft-page-break/><text:span text:style-name="Source_20_Text">[</text:span></text:p>
      <text:p text:style-name="P10"><text:span text:style-name="Source_20_Text"><text:s/>Document(...),</text:span></text:p>
      <text:p text:style-name="P10"><text:span text:style-name="Source_20_Text"><text:s/>Document(...),</text:span></text:p>
      <text:p text:style-name="P10"><text:span text:style-name="Source_20_Text"><text:s/>Document(...)</text:span></text:p>
      <text:p text:style-name="P11"><text:span text:style-name="Source_20_Text">]</text:span></text:p>
      <text:p text:style-name="P12"/>
      <text:h text:style-name="P4" text:outline-level="2">Đặc điểm</text:h>
      <text:p text:style-name="P6">Ưu điểm:</text:p>
      <text:list text:style-name="L28">
        <text:list-item>
          <text:p text:style-name="P40">Đơn giản.</text:p>
        </text:list-item>
        <text:list-item>
          <text:p text:style-name="P40">Dễ debug.</text:p>
        </text:list-item>
        <text:list-item>
          <text:p text:style-name="P40">Phù hợp file nhỏ.</text:p>
        </text:list-item>
      </text:list>
      <text:p text:style-name="P6">Nhược điểm:</text:p>
      <text:list text:style-name="L29">
        <text:list-item>
          <text:p text:style-name="P41">Tốn RAM.</text:p>
        </text:list-item>
        <text:list-item>
          <text:p text:style-name="P41">Không phù hợp dữ liệu lớn.</text:p>
        </text:list-item>
      </text:list>
      <text:p text:style-name="P12"/>
      <text:p text:style-name="P6">Ví dụ:</text:p>
      <text:p text:style-name="P6">File:</text:p>
      <text:p text:style-name="P11"><text:span text:style-name="Source_20_Text">1000 pages PDF</text:span></text:p>
      <text:p text:style-name="P6">load():</text:p>
      <text:p text:style-name="P10"><text:span text:style-name="Source_20_Text">1000 pages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Memory</text:span></text:p>
      <text:p text:style-name="P12"/>
      <text:h text:style-name="P13" text:outline-level="1">5.2. lazy_load()</text:h>
      <text:h text:style-name="P4" text:outline-level="2">Khái niệm</text:h>
      <text:p text:style-name="P6"><text:span text:style-name="Source_20_Text">lazy_load()</text:span> trả về generator.</text:p>
      <text:p text:style-name="P6">Dữ liệu được đọc từng phần khi cần.</text:p>
      <text:p text:style-name="P6">Ví dụ:</text:p>
      <text:p text:style-name="P10"><text:span text:style-name="Source_20_Text">documents = loader.lazy_load()</text:span></text:p>
      <text:p text:style-name="P10"><text:soft-page-break/></text:p>
      <text:p text:style-name="P10"/>
      <text:p text:style-name="P10"><text:span text:style-name="Source_20_Text">for doc in documents:</text:span></text:p>
      <text:p text:style-name="P11"><text:span text:style-name="Source_20_Text"><text:s text:c="4"/>print(doc)</text:span></text:p>
      <text:p text:style-name="P12"/>
      <text:p text:style-name="P6">Output:</text:p>
      <text:p text:style-name="P10"><text:span text:style-name="Source_20_Text">Load page 1</text:span></text:p>
      <text:p text:style-name="P10"/>
      <text:p text:style-name="P10"><text:span text:style-name="Source_20_Text">Process</text:span></text:p>
      <text:p text:style-name="P10"/>
      <text:p text:style-name="P10"><text:span text:style-name="Source_20_Text">Load page 2</text:span></text:p>
      <text:p text:style-name="P10"/>
      <text:p text:style-name="P10"><text:span text:style-name="Source_20_Text">Process</text:span></text:p>
      <text:p text:style-name="P10"/>
      <text:p text:style-name="P11"><text:span text:style-name="Source_20_Text">Load page 3</text:span></text:p>
      <text:p text:style-name="P12"/>
      <text:h text:style-name="P4" text:outline-level="2">Ưu điểm</text:h>
      <text:list text:style-name="L30">
        <text:list-item>
          <text:p text:style-name="P42">Tiết kiệm memory.</text:p>
        </text:list-item>
        <text:list-item>
          <text:p text:style-name="P42">Xử lý dataset lớn.</text:p>
        </text:list-item>
        <text:list-item>
          <text:p text:style-name="P42">Streaming processing.</text:p>
        </text:list-item>
      </text:list>
      <text:p text:style-name="P12"/>
      <text:h text:style-name="P4" text:outline-level="2">Nhược điểm</text:h>
      <text:list text:style-name="L31">
        <text:list-item>
          <text:p text:style-name="P43">Code phức tạp hơn.</text:p>
        </text:list-item>
        <text:list-item>
          <text:p text:style-name="P43">Không thể truy cập random.</text:p>
        </text:list-item>
      </text:list>
      <text:p text:style-name="P12"/>
      <text:h text:style-name="P13" text:outline-level="1">So sánh load vs lazy_load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load()</text:p>
            </table:table-cell>
            <table:table-cell table:style-name="Table2.A1" office:value-type="string">
              <text:p text:style-name="Table_20_Heading">lazy_load()</text:p>
            </table:table-cell>
          </table:table-row>
        </table:table-header-rows>
        <table:table-row>
          <table:table-cell table:style-name="Table2.A1" office:value-type="string">
            <text:p text:style-name="Table_20_Contents">Loading</text:p>
          </table:table-cell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Table_20_Contents">Incremental</text:p>
          </table:table-cell>
        </table:table-row>
        <table:table-row>
          <table:table-cell table:style-name="Table2.A1" office:value-type="string">
            <text:p text:style-name="Table_20_Contents">Memory</text:p>
          </table:table-cell>
          <table:table-cell table:style-name="Table2.A1" office:value-type="string">
            <text:p text:style-name="Table_20_Contents">Cao</text:p>
          </table:table-cell>
          <table:table-cell table:style-name="Table2.A1" office:value-type="string">
            <text:p text:style-name="Table_20_Contents">Thấp</text:p>
          </table:table-cell>
        </table:table-row>
        <table:table-row>
          <table:table-cell table:style-name="Table2.A1" office:value-type="string">
            <text:p text:style-name="Table_20_Contents">Speed</text:p>
          </table:table-cell>
          <table:table-cell table:style-name="Table2.A1" office:value-type="string">
            <text:p text:style-name="Table_20_Contents">Nhanh với file nhỏ</text:p>
          </table:table-cell>
          <table:table-cell table:style-name="Table2.A1" office:value-type="string">
            <text:p text:style-name="Table_20_Contents">Tốt với file lớn</text:p>
          </table:table-cell>
        </table:table-row>
        <table:table-row>
          <table:table-cell table:style-name="Table2.A1" office:value-type="string">
            <text:p text:style-name="Table_20_Contents">Output</text:p>
          </table:table-cell>
          <table:table-cell table:style-name="Table2.A1" office:value-type="string">
            <text:p text:style-name="Table_20_Contents">List</text:p>
          </table:table-cell>
          <table:table-cell table:style-name="Table2.A1" office:value-type="string">
            <text:p text:style-name="Table_20_Contents">Generator</text:p>
          </table:table-cell>
        </table:table-row>
        <table:table-row>
          <table:table-cell table:style-name="Table2.A1" office:value-type="string">
            <text:p text:style-name="Table_20_Contents">Debug</text:p>
          </table:table-cell>
          <table:table-cell table:style-name="Table2.A1" office:value-type="string">
            <text:p text:style-name="Table_20_Contents">Dễ</text:p>
          </table:table-cell>
          <table:table-cell table:style-name="Table2.A1" office:value-type="string">
            <text:p text:style-name="Table_20_Contents">Khó hơn</text:p>
          </table:table-cell>
        </table:table-row>
      </table:table>
      <text:p text:style-name="P12"/>
      <text:h text:style-name="P13" text:outline-level="1"><text:soft-page-break/>6. PyPDFLoader</text:h>
      <text:h text:style-name="P13" text:outline-level="1">6.1. Tổng quan</text:h>
      <text:p text:style-name="P6"><text:span text:style-name="Source_20_Text">PyPDFLoader</text:span> dùng để đọc file PDF.</text:p>
      <text:p text:style-name="P6">Library:</text:p>
      <text:p text:style-name="P11"><text:span text:style-name="Source_20_Text">pypdf</text:span></text:p>
      <text:p text:style-name="P6">Use case:</text:p>
      <text:list text:style-name="L32">
        <text:list-item>
          <text:p text:style-name="P44">Company documents</text:p>
        </text:list-item>
        <text:list-item>
          <text:p text:style-name="P44">Research papers</text:p>
        </text:list-item>
        <text:list-item>
          <text:p text:style-name="P44">Manuals</text:p>
        </text:list-item>
        <text:list-item>
          <text:p text:style-name="P44">Reports</text:p>
        </text:list-item>
      </text:list>
      <text:p text:style-name="P12"/>
      <text:h text:style-name="P13" text:outline-level="1">6.2. Cài đặt</text:h>
      <text:p text:style-name="P10"><text:span text:style-name="Source_20_Text">pip install pypdf</text:span></text:p>
      <text:p text:style-name="P11"><text:span text:style-name="Source_20_Text">pip install langchain-community</text:span></text:p>
      <text:p text:style-name="P12"/>
      <text:h text:style-name="P13" text:outline-level="1">6.3. Import</text:h>
      <text:p text:style-name="P11"><text:span text:style-name="Source_20_Text">from langchain_community.document_loaders import PyPDFLoader</text:span></text:p>
      <text:p text:style-name="P12"/>
      <text:h text:style-name="P13" text:outline-level="1">6.4. Input</text:h>
      <text:p text:style-name="P6">File:</text:p>
      <text:p text:style-name="P11"><text:span text:style-name="Source_20_Text">data/company_policy.pdf</text:span></text:p>
      <text:p text:style-name="P12"/>
      <text:h text:style-name="P13" text:outline-level="1">6.5. Code</text:h>
      <text:p text:style-name="P10"><text:span text:style-name="Source_20_Text">from langchain_community.document_loaders import PyPDFLoader</text:span></text:p>
      <text:p text:style-name="P10"/>
      <text:p text:style-name="P10"/>
      <text:p text:style-name="P10"><text:span text:style-name="Source_20_Text">loader = PyPDFLoader(</text:span></text:p>
      <text:p text:style-name="P10"><text:span text:style-name="Source_20_Text"><text:s text:c="4"/>"data/company_policy.pdf"</text:span></text:p>
      <text:p text:style-name="P10"><text:span text:style-name="Source_20_Text">)</text:span></text:p>
      <text:p text:style-name="P10"><text:soft-page-break/></text:p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len(documents)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doc.metadata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[:200]</text:span></text:p>
      <text:p text:style-name="P11"><text:span text:style-name="Source_20_Text"><text:s text:c="4"/>)</text:span></text:p>
      <text:p text:style-name="P12"/>
      <text:h text:style-name="P13" text:outline-level="1">6.6. Output</text:h>
      <text:p text:style-name="P6">Ví dụ:</text:p>
      <text:p text:style-name="P10"><text:span text:style-name="Source_20_Text">5</text:span></text:p>
      <text:p text:style-name="P10"/>
      <text:p text:style-name="P10"/>
      <text:p text:style-name="P10"><text:span text:style-name="Source_20_Text">{</text:span></text:p>
      <text:p text:style-name="P10"><text:span text:style-name="Source_20_Text">'source':'company_policy.pdf',</text:span></text:p>
      <text:p text:style-name="P10"><text:span text:style-name="Source_20_Text">'page':0</text:span></text:p>
      <text:p text:style-name="P10"><text:span text:style-name="Source_20_Text">}</text:span></text:p>
      <text:p text:style-name="P10"/>
      <text:p text:style-name="P10"/>
      <text:p text:style-name="P11"><text:span text:style-name="Source_20_Text">Employees have 20 vacation days...</text:span></text:p>
      <text:p text:style-name="P12"/>
      <text:h text:style-name="P13" text:outline-level="1">6.7. Metadata tạo ra</text:h>
      <text:p text:style-name="P6">Ví dụ:</text:p>
      <text:p text:style-name="P10"><text:span text:style-name="Source_20_Text">{</text:span></text:p>
      <text:p text:style-name="P10"><text:span text:style-name="Source_20_Text">"source":"company_policy.pdf",</text:span></text:p>
      <text:p text:style-name="P10"><text:span text:style-name="Source_20_Text">"page":3</text:span></text:p>
      <text:p text:style-name="P11"><text:span text:style-name="Source_20_Text">}</text:span></text:p>
      <text:p text:style-name="P6">Thông tin:</text:p>
      <text:list text:style-name="L33">
        <text:list-item>
          <text:p text:style-name="P45">Filename</text:p>
        </text:list-item>
        <text:list-item>
          <text:p text:style-name="P45"><text:soft-page-break/>Page number</text:p>
        </text:list-item>
      </text:list>
      <text:p text:style-name="P12"/>
      <text:h text:style-name="P13" text:outline-level="1">6.8. Khi nào sử dụng PyPDFLoader?</text:h>
      <text:p text:style-name="P6">Nên dùng khi:</text:p>
      <text:list text:style-name="L34">
        <text:list-item>
          <text:p text:style-name="P46">PDF có text layer.</text:p>
        </text:list-item>
        <text:list-item>
          <text:p text:style-name="P46">Document dạng báo cáo.</text:p>
        </text:list-item>
        <text:list-item>
          <text:p text:style-name="P46">Manual.</text:p>
        </text:list-item>
        <text:list-item>
          <text:p text:style-name="P46">Technical document.</text:p>
        </text:list-item>
      </text:list>
      <text:p text:style-name="P12"/>
      <text:h text:style-name="P13" text:outline-level="1">6.9. Limitation</text:h>
      <text:h text:style-name="P4" text:outline-level="2">1. Không xử lý tốt PDF scan</text:h>
      <text:p text:style-name="P6">Ví dụ:</text:p>
      <text:p text:style-name="P10"><text:span text:style-name="Source_20_Text">Image PDF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No text</text:span></text:p>
      <text:p text:style-name="P6">Giải pháp:</text:p>
      <text:list text:style-name="L35">
        <text:list-item>
          <text:p text:style-name="P47">OCR</text:p>
        </text:list-item>
        <text:list-item>
          <text:p text:style-name="P47">Tesseract</text:p>
        </text:list-item>
      </text:list>
      <text:p text:style-name="P12"/>
      <text:h text:style-name="P4" text:outline-level="2">2. Layout phức tạp</text:h>
      <text:p text:style-name="P6">Ví dụ:</text:p>
      <text:list text:style-name="L36">
        <text:list-item>
          <text:p text:style-name="P48">Table</text:p>
        </text:list-item>
        <text:list-item>
          <text:p text:style-name="P48">Multi-column</text:p>
        </text:list-item>
      </text:list>
      <text:p text:style-name="P6">Có thể mất format.</text:p>
      <text:p text:style-name="P12"/>
      <text:h text:style-name="P4" text:outline-level="2">3. Không hiểu semantic</text:h>
      <text:p text:style-name="P6">Loader chỉ extract text.</text:p>
      <text:p text:style-name="P6"><text:soft-page-break/>Không hiểu:</text:p>
      <text:list text:style-name="L37">
        <text:list-item>
          <text:p text:style-name="P49">Heading</text:p>
        </text:list-item>
        <text:list-item>
          <text:p text:style-name="P49">Section</text:p>
        </text:list-item>
        <text:list-item>
          <text:p text:style-name="P49">Meaning</text:p>
        </text:list-item>
      </text:list>
      <text:p text:style-name="P12"/>
      <text:h text:style-name="P13" text:outline-level="1">7. Docx2txtLoader</text:h>
      <text:h text:style-name="P13" text:outline-level="1">7.1. Tổng quan</text:h>
      <text:p text:style-name="P6">Dùng để đọc Microsoft Word document.</text:p>
      <text:p text:style-name="P6">Input:</text:p>
      <text:p text:style-name="P11"><text:span text:style-name="Source_20_Text">.docx</text:span></text:p>
      <text:p text:style-name="P6">Library:</text:p>
      <text:p text:style-name="P11"><text:span text:style-name="Source_20_Text">docx2txt</text:span></text:p>
      <text:p text:style-name="P12"/>
      <text:h text:style-name="P13" text:outline-level="1">7.2. Cài đặt</text:h>
      <text:p text:style-name="P11"><text:span text:style-name="Source_20_Text">pip install docx2txt</text:span></text:p>
      <text:p text:style-name="P12"/>
      <text:h text:style-name="P13" text:outline-level="1">7.3. Import</text:h>
      <text:p text:style-name="P11"><text:span text:style-name="Source_20_Text">from langchain_community.document_loaders import Docx2txtLoader</text:span></text:p>
      <text:p text:style-name="P12"/>
      <text:h text:style-name="P13" text:outline-level="1">7.4. Code</text:h>
      <text:p text:style-name="P10"><text:span text:style-name="Source_20_Text">loader = Docx2txtLoader(</text:span></text:p>
      <text:p text:style-name="P10"><text:span text:style-name="Source_20_Text"><text:s text:c="4"/>"data/report.docx"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for doc in documents:</text:span></text:p>
      <text:p text:style-name="P10"><text:soft-page-break/></text:p>
      <text:p text:style-name="P10"><text:span text:style-name="Source_20_Text"><text:s text:c="4"/>print(doc.page_content)</text:span></text:p>
      <text:p text:style-name="P10"/>
      <text:p text:style-name="P11"><text:span text:style-name="Source_20_Text"><text:s text:c="4"/>print(doc.metadata)</text:span></text:p>
      <text:p text:style-name="P12"/>
      <text:h text:style-name="P13" text:outline-level="1">7.5. Output</text:h>
      <text:p text:style-name="P10"><text:span text:style-name="Source_20_Text">Project report content...</text:span></text:p>
      <text:p text:style-name="P10"/>
      <text:p text:style-name="P10"/>
      <text:p text:style-name="P10"><text:span text:style-name="Source_20_Text">{</text:span></text:p>
      <text:p text:style-name="P10"><text:span text:style-name="Source_20_Text">'source':'report.docx'</text:span></text:p>
      <text:p text:style-name="P11"><text:span text:style-name="Source_20_Text">}</text:span></text:p>
      <text:p text:style-name="P12"/>
      <text:h text:style-name="P13" text:outline-level="1">7.6. Khi nào sử dụng?</text:h>
      <text:p text:style-name="P6">Phù hợp:</text:p>
      <text:list text:style-name="L38">
        <text:list-item>
          <text:p text:style-name="P50">Business document</text:p>
        </text:list-item>
        <text:list-item>
          <text:p text:style-name="P50">Report</text:p>
        </text:list-item>
        <text:list-item>
          <text:p text:style-name="P50">Proposal</text:p>
        </text:list-item>
        <text:list-item>
          <text:p text:style-name="P50">Documentation</text:p>
        </text:list-item>
      </text:list>
      <text:p text:style-name="P12"/>
      <text:h text:style-name="P13" text:outline-level="1">7.7. Limitation</text:h>
      <text:h text:style-name="P4" text:outline-level="2">1. Mất formatting</text:h>
      <text:p text:style-name="P6">Ví dụ:</text:p>
      <text:p text:style-name="P6">Word:</text:p>
      <text:p text:style-name="P10"><text:span text:style-name="Source_20_Text">Title</text:span></text:p>
      <text:p text:style-name="P10"><text:span text:style-name="Source_20_Text">- Point 1</text:span></text:p>
      <text:p text:style-name="P11"><text:span text:style-name="Source_20_Text">- Point 2</text:span></text:p>
      <text:p text:style-name="P6">Extract:</text:p>
      <text:p text:style-name="P10"><text:span text:style-name="Source_20_Text">Title</text:span></text:p>
      <text:p text:style-name="P10"><text:span text:style-name="Source_20_Text">Point 1</text:span></text:p>
      <text:p text:style-name="P11"><text:span text:style-name="Source_20_Text">Point 2</text:span></text:p>
      <text:p text:style-name="P12"/>
      <text:h text:style-name="P4" text:outline-level="2"><text:soft-page-break/>2. Không xử lý tốt bảng</text:h>
      <text:p text:style-name="P6">Table có thể bị mất cấu trúc.</text:p>
      <text:p text:style-name="P12"/>
      <text:h text:style-name="P4" text:outline-level="2">3. Metadata hạn chế</text:h>
      <text:p text:style-name="P6">Thông thường chỉ có:</text:p>
      <text:p text:style-name="P10"><text:span text:style-name="Source_20_Text">{</text:span></text:p>
      <text:p text:style-name="P10"><text:span text:style-name="Source_20_Text">"source":"file.docx"</text:span></text:p>
      <text:p text:style-name="P11"><text:span text:style-name="Source_20_Text">}</text:span></text:p>
      <text:p text:style-name="P12"/>
      <text:h text:style-name="P13" text:outline-level="1">8. WebBaseLoader</text:h>
      <text:h text:style-name="P13" text:outline-level="1">8.1. Tổng quan</text:h>
      <text:p text:style-name="P6">Dùng để load dữ liệu từ website.</text:p>
      <text:p text:style-name="P6">Input:</text:p>
      <text:p text:style-name="P11"><text:span text:style-name="Source_20_Text">URL</text:span></text:p>
      <text:p text:style-name="P6">Ví dụ:</text:p>
      <text:p text:style-name="P11"><text:span text:style-name="Source_20_Text">https://python.langchain.com</text:span></text:p>
      <text:p text:style-name="P12"/>
      <text:h text:style-name="P13" text:outline-level="1">8.2. Cài đặt</text:h>
      <text:p text:style-name="P11"><text:span text:style-name="Source_20_Text">pip install beautifulsoup4</text:span></text:p>
      <text:p text:style-name="P12"/>
      <text:h text:style-name="P13" text:outline-level="1">8.3. Import</text:h>
      <text:p text:style-name="P11"><text:span text:style-name="Source_20_Text">from langchain_community.document_loaders import WebBaseLoader</text:span></text:p>
      <text:p text:style-name="P12"/>
      <text:h text:style-name="P13" text:outline-level="1">8.4. Code</text:h>
      <text:p text:style-name="P10"><text:span text:style-name="Source_20_Text">loader = WebBaseLoader(</text:span></text:p>
      <text:p text:style-name="P10"><text:span text:style-name="Source_20_Text"><text:s text:c="4"/>"https://example.com"</text:span></text:p>
      <text:p text:style-name="P10"><text:span text:style-name="Source_20_Text">)</text:span></text:p>
      <text:p text:style-name="P10"><text:soft-page-break/></text:p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doc.metadata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[:500]</text:span></text:p>
      <text:p text:style-name="P11"><text:span text:style-name="Source_20_Text"><text:s text:c="4"/>)</text:span></text:p>
      <text:p text:style-name="P12"/>
      <text:h text:style-name="P13" text:outline-level="1">8.5. Output</text:h>
      <text:p text:style-name="P10"><text:span text:style-name="Source_20_Text">{</text:span></text:p>
      <text:p text:style-name="P10"><text:span text:style-name="Source_20_Text">"source":</text:span></text:p>
      <text:p text:style-name="P10"><text:span text:style-name="Source_20_Text">"https://example.com"</text:span></text:p>
      <text:p text:style-name="P11"><text:span text:style-name="Source_20_Text">}</text:span></text:p>
      <text:p text:style-name="P6">Content:</text:p>
      <text:p text:style-name="P10"><text:span text:style-name="Source_20_Text">Example Domain</text:span></text:p>
      <text:p text:style-name="P11"><text:span text:style-name="Source_20_Text">This domain is used...</text:span></text:p>
      <text:p text:style-name="P12"/>
      <text:h text:style-name="P13" text:outline-level="1">8.6. Cách hoạt động</text:h>
      <text:p text:style-name="P6">Workflow:</text:p>
      <text:p text:style-name="P10"><text:span text:style-name="Source_20_Text">URL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HTTP Reques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HTML Response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BeautifulSoup Parser</text:span></text:p>
      <text:p text:style-name="P10"/>
      <text:p text:style-name="P10"><text:span text:style-name="Source_20_Text">↓</text:span></text:p>
      <text:p text:style-name="P10"/>
      <text:p text:style-name="P10"><text:soft-page-break/><text:span text:style-name="Source_20_Text">Extract Text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Document</text:span></text:p>
      <text:p text:style-name="P12"/>
      <text:h text:style-name="P13" text:outline-level="1">8.7. Khi nào sử dụng?</text:h>
      <text:p text:style-name="P6">Phù hợp:</text:p>
      <text:list text:style-name="L39">
        <text:list-item>
          <text:p text:style-name="P51">Documentation website</text:p>
        </text:list-item>
        <text:list-item>
          <text:p text:style-name="P51">Knowledge base</text:p>
        </text:list-item>
        <text:list-item>
          <text:p text:style-name="P51">Blog</text:p>
        </text:list-item>
        <text:list-item>
          <text:p text:style-name="P51">Public information</text:p>
        </text:list-item>
      </text:list>
      <text:p text:style-name="P12"/>
      <text:h text:style-name="P13" text:outline-level="1">8.8. Limitation</text:h>
      <text:h text:style-name="P4" text:outline-level="2">1. Dynamic website</text:h>
      <text:p text:style-name="P6">Ví dụ:</text:p>
      <text:p text:style-name="P6">React:</text:p>
      <text:p text:style-name="P10"><text:span text:style-name="Source_20_Text">HTML empty</text:span></text:p>
      <text:p text:style-name="P10"/>
      <text:p text:style-name="P11"><text:span text:style-name="Source_20_Text">Javascript loads content</text:span></text:p>
      <text:p text:style-name="P6">Loader không lấy được.</text:p>
      <text:p text:style-name="P6">Giải pháp:</text:p>
      <text:list text:style-name="L40">
        <text:list-item>
          <text:p text:style-name="P52">Selenium</text:p>
        </text:list-item>
        <text:list-item>
          <text:p text:style-name="P52">Playwright</text:p>
        </text:list-item>
      </text:list>
      <text:p text:style-name="P12"/>
      <text:h text:style-name="P4" text:outline-level="2">2. Noise data</text:h>
      <text:p text:style-name="P6">HTML chứa:</text:p>
      <text:list text:style-name="L41">
        <text:list-item>
          <text:p text:style-name="P53">Menu</text:p>
        </text:list-item>
        <text:list-item>
          <text:p text:style-name="P53">Footer</text:p>
        </text:list-item>
        <text:list-item>
          <text:p text:style-name="P53">Ads</text:p>
        </text:list-item>
      </text:list>
      <text:p text:style-name="P12"><text:soft-page-break/></text:p>
      <text:h text:style-name="P4" text:outline-level="2">3. Website thay đổi</text:h>
      <text:p text:style-name="P6">Content có thể không ổn định.</text:p>
      <text:p text:style-name="P12"/>
      <text:h text:style-name="P13" text:outline-level="1">9. So sánh các Document Loader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PyPDFLoader</text:p>
            </table:table-cell>
            <table:table-cell table:style-name="Table3.A1" office:value-type="string">
              <text:p text:style-name="Table_20_Heading">Docx2txtLoader</text:p>
            </table:table-cell>
            <table:table-cell table:style-name="Table3.A1" office:value-type="string">
              <text:p text:style-name="Table_20_Heading">WebBaseLoader</text:p>
            </table:table-cell>
          </table:table-row>
        </table:table-header-rows>
        <table:table-row>
          <table:table-cell table:style-name="Table3.A1" office:value-type="string">
            <text:p text:style-name="Table_20_Contents">Input</text:p>
          </table:table-cell>
          <table:table-cell table:style-name="Table3.A1" office:value-type="string">
            <text:p text:style-name="Table_20_Contents">PDF</text:p>
          </table:table-cell>
          <table:table-cell table:style-name="Table3.A1" office:value-type="string">
            <text:p text:style-name="Table_20_Contents">DOCX</text:p>
          </table:table-cell>
          <table:table-cell table:style-name="Table3.A1" office:value-type="string">
            <text:p text:style-name="Table_20_Contents">URL</text:p>
          </table:table-cell>
        </table:table-row>
        <table:table-row>
          <table:table-cell table:style-name="Table3.A1" office:value-type="string">
            <text:p text:style-name="Table_20_Contents">Output</text:p>
          </table:table-cell>
          <table:table-cell table:style-name="Table3.A1" office:value-type="string">
            <text:p text:style-name="Table_20_Contents">Document</text:p>
          </table:table-cell>
          <table:table-cell table:style-name="Table3.A1" office:value-type="string">
            <text:p text:style-name="Table_20_Contents">Document</text:p>
          </table:table-cell>
          <table:table-cell table:style-name="Table3.A1" office:value-type="string">
            <text:p text:style-name="Table_20_Contents">Document</text:p>
          </table:table-cell>
        </table:table-row>
        <table:table-row>
          <table:table-cell table:style-name="Table3.A1" office:value-type="string">
            <text:p text:style-name="Table_20_Contents">Parser</text:p>
          </table:table-cell>
          <table:table-cell table:style-name="Table3.A1" office:value-type="string">
            <text:p text:style-name="Table_20_Contents">pypdf</text:p>
          </table:table-cell>
          <table:table-cell table:style-name="Table3.A1" office:value-type="string">
            <text:p text:style-name="Table_20_Contents">docx2txt</text:p>
          </table:table-cell>
          <table:table-cell table:style-name="Table3.A1" office:value-type="string">
            <text:p text:style-name="Table_20_Contents">BeautifulSoup</text:p>
          </table:table-cell>
        </table:table-row>
        <table:table-row>
          <table:table-cell table:style-name="Table3.A1" office:value-type="string">
            <text:p text:style-name="Table_20_Contents">Metadata</text:p>
          </table:table-cell>
          <table:table-cell table:style-name="Table3.A1" office:value-type="string">
            <text:p text:style-name="Table_20_Contents">Page</text:p>
          </table:table-cell>
          <table:table-cell table:style-name="Table3.A1" office:value-type="string">
            <text:p text:style-name="Table_20_Contents">Source</text:p>
          </table:table-cell>
          <table:table-cell table:style-name="Table3.A1" office:value-type="string">
            <text:p text:style-name="Table_20_Contents">URL</text:p>
          </table:table-cell>
        </table:table-row>
        <table:table-row>
          <table:table-cell table:style-name="Table3.A1" office:value-type="string">
            <text:p text:style-name="Table_20_Contents">Best for</text:p>
          </table:table-cell>
          <table:table-cell table:style-name="Table3.A1" office:value-type="string">
            <text:p text:style-name="Table_20_Contents">Reports</text:p>
          </table:table-cell>
          <table:table-cell table:style-name="Table3.A1" office:value-type="string">
            <text:p text:style-name="Table_20_Contents">Documents</text:p>
          </table:table-cell>
          <table:table-cell table:style-name="Table3.A1" office:value-type="string">
            <text:p text:style-name="Table_20_Contents">Websites</text:p>
          </table:table-cell>
        </table:table-row>
        <table:table-row>
          <table:table-cell table:style-name="Table3.A1" office:value-type="string">
            <text:p text:style-name="Table_20_Contents">Difficulty</text:p>
          </table:table-cell>
          <table:table-cell table:style-name="Table3.A1" office:value-type="string">
            <text:p text:style-name="Table_20_Contents">Medium</text:p>
          </table:table-cell>
          <table:table-cell table:style-name="Table3.A1" office:value-type="string">
            <text:p text:style-name="Table_20_Contents">Easy</text:p>
          </table:table-cell>
          <table:table-cell table:style-name="Table3.A1" office:value-type="string">
            <text:p text:style-name="Table_20_Contents">Medium</text:p>
          </table:table-cell>
        </table:table-row>
        <table:table-row>
          <table:table-cell table:style-name="Table3.A1" office:value-type="string">
            <text:p text:style-name="Table_20_Contents">Common issue</text:p>
          </table:table-cell>
          <table:table-cell table:style-name="Table3.A1" office:value-type="string">
            <text:p text:style-name="Table_20_Contents">Scan PDF</text:p>
          </table:table-cell>
          <table:table-cell table:style-name="Table3.A1" office:value-type="string">
            <text:p text:style-name="Table_20_Contents">Lost format</text:p>
          </table:table-cell>
          <table:table-cell table:style-name="Table3.A1" office:value-type="string">
            <text:p text:style-name="Table_20_Contents">HTML noise</text:p>
          </table:table-cell>
        </table:table-row>
      </table:table>
      <text:p text:style-name="P12"/>
      <text:h text:style-name="P13" text:outline-level="1">10. Mini Practice Project</text:h>
      <text:h text:style-name="P4" text:outline-level="2">Project: Multi Document Loader</text:h>
      <text:h text:style-name="P4" text:outline-level="2">Folder</text:h>
      <text:p text:style-name="P10"><text:span text:style-name="Source_20_Text">document_loader_project/</text:span></text:p>
      <text:p text:style-name="P10"/>
      <text:p text:style-name="P10"/>
      <text:p text:style-name="P10"><text:span text:style-name="Source_20_Text">├── data/</text:span></text:p>
      <text:p text:style-name="P10"/>
      <text:p text:style-name="P10"><text:span text:style-name="Source_20_Text">│ <text:s text:c="2"/>├── sample.pdf</text:span></text:p>
      <text:p text:style-name="P10"/>
      <text:p text:style-name="P10"><text:span text:style-name="Source_20_Text">│ <text:s text:c="2"/>├── report.docx</text:span></text:p>
      <text:p text:style-name="P10"/>
      <text:p text:style-name="P10"/>
      <text:p text:style-name="P10"><text:span text:style-name="Source_20_Text">├── main.py</text:span></text:p>
      <text:p text:style-name="P10"/>
      <text:p text:style-name="P11"><text:span text:style-name="Source_20_Text">└── requirements.txt</text:span></text:p>
      <text:p text:style-name="P12"/>
      <text:h text:style-name="P13" text:outline-level="1">Requirements</text:h>
      <text:p text:style-name="P6">Chương trình cần:</text:p>
      <text:p text:style-name="P6">Input:</text:p>
      <text:p text:style-name="P10"><text:soft-page-break/><text:span text:style-name="Source_20_Text">PDF</text:span></text:p>
      <text:p text:style-name="P10"><text:span text:style-name="Source_20_Text">DOCX</text:span></text:p>
      <text:p text:style-name="P11"><text:span text:style-name="Source_20_Text">URL</text:span></text:p>
      <text:p text:style-name="P6">Process:</text:p>
      <text:p text:style-name="P10"><text:span text:style-name="Source_20_Text">Detect type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Select Loader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Load Document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Display Result</text:span></text:p>
      <text:p text:style-name="P6">Output:</text:p>
      <text:p text:style-name="P10"><text:span text:style-name="Source_20_Text">Document count</text:span></text:p>
      <text:p text:style-name="P10"/>
      <text:p text:style-name="P10"><text:span text:style-name="Source_20_Text">Metadata</text:span></text:p>
      <text:p text:style-name="P10"/>
      <text:p text:style-name="P10"><text:span text:style-name="Source_20_Text">Content preview</text:span></text:p>
      <text:p text:style-name="P10"/>
      <text:p text:style-name="P11"><text:span text:style-name="Source_20_Text">Character count</text:span></text:p>
      <text:p text:style-name="P12"/>
      <text:h text:style-name="P13" text:outline-level="1">Source Code</text:h>
      <text:p text:style-name="P10"><text:span text:style-name="Source_20_Text">from langchain_community.document_loaders import (</text:span></text:p>
      <text:p text:style-name="P10"><text:span text:style-name="Source_20_Text"><text:s text:c="4"/>PyPDFLoader,</text:span></text:p>
      <text:p text:style-name="P10"><text:span text:style-name="Source_20_Text"><text:s text:c="4"/>Docx2txtLoader,</text:span></text:p>
      <text:p text:style-name="P10"><text:span text:style-name="Source_20_Text"><text:s text:c="4"/>WebBaseLoader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def load_pdf(path):</text:span></text:p>
      <text:p text:style-name="P10"/>
      <text:p text:style-name="P10"><text:span text:style-name="Source_20_Text"><text:s text:c="4"/>loader = PyPDFLoader(path)</text:span></text:p>
      <text:p text:style-name="P10"/>
      <text:p text:style-name="P10"><text:span text:style-name="Source_20_Text"><text:s text:c="4"/>return loader.load()</text:span></text:p>
      <text:p text:style-name="P10"/>
      <text:p text:style-name="P10"/>
      <text:p text:style-name="P10"/>
      <text:p text:style-name="P10"><text:span text:style-name="Source_20_Text">def load_docx(path):</text:span></text:p>
      <text:p text:style-name="P10"><text:soft-page-break/></text:p>
      <text:p text:style-name="P10"><text:span text:style-name="Source_20_Text"><text:s text:c="4"/>loader = Docx2txtLoader(path)</text:span></text:p>
      <text:p text:style-name="P10"/>
      <text:p text:style-name="P10"><text:span text:style-name="Source_20_Text"><text:s text:c="4"/>return loader.load()</text:span></text:p>
      <text:p text:style-name="P10"/>
      <text:p text:style-name="P10"/>
      <text:p text:style-name="P10"/>
      <text:p text:style-name="P10"><text:span text:style-name="Source_20_Text">def load_web(url):</text:span></text:p>
      <text:p text:style-name="P10"/>
      <text:p text:style-name="P10"><text:span text:style-name="Source_20_Text"><text:s text:c="4"/>loader = WebBaseLoader(url)</text:span></text:p>
      <text:p text:style-name="P10"/>
      <text:p text:style-name="P10"><text:span text:style-name="Source_20_Text"><text:s text:c="4"/>return loader.load()</text:span></text:p>
      <text:p text:style-name="P10"/>
      <text:p text:style-name="P10"/>
      <text:p text:style-name="P10"/>
      <text:p text:style-name="P10"><text:span text:style-name="Source_20_Text">documents = load_pdf(</text:span></text:p>
      <text:p text:style-name="P10"><text:span text:style-name="Source_20_Text"><text:s text:c="4"/>"data/sample.pdf"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"================")</text:span></text:p>
      <text:p text:style-name="P10"/>
      <text:p text:style-name="P10"><text:span text:style-name="Source_20_Text"><text:s text:c="4"/>print(doc.metadata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len(doc.page_content)</text:span></text:p>
      <text:p text:style-name="P11"><text:span text:style-name="Source_20_Text"><text:s text:c="4"/>)</text:span></text:p>
      <text:p text:style-name="P12"/>
      <text:h text:style-name="P13" text:outline-level="1">11. Bài tập thực hành</text:h>
      <text:h text:style-name="P4" text:outline-level="2">Exercise 1: PDF Loader</text:h>
      <text:p text:style-name="P6">Yêu cầu:</text:p>
      <text:list text:style-name="L42">
        <text:list-item>
          <text:p text:style-name="P54">Load file PDF.</text:p>
        </text:list-item>
        <text:list-item>
          <text:p text:style-name="P54">In:</text:p>
          <text:list>
            <text:list-item>
              <text:p text:style-name="P54">Document count</text:p>
            </text:list-item>
            <text:list-item>
              <text:p text:style-name="P54">Metadata</text:p>
            </text:list-item>
            <text:list-item>
              <text:p text:style-name="P54">Content.</text:p>
            </text:list-item>
          </text:list>
        </text:list-item>
      </text:list>
      <text:p text:style-name="P12"/>
      <text:h text:style-name="P4" text:outline-level="2"><text:soft-page-break/>Exercise 2: DOCX Loader</text:h>
      <text:p text:style-name="P6">Yêu cầu:</text:p>
      <text:p text:style-name="P6">So sánh:</text:p>
      <text:list text:style-name="L43">
        <text:list-item>
          <text:p text:style-name="P55">PDF output</text:p>
        </text:list-item>
        <text:list-item>
          <text:p text:style-name="P55">DOCX output</text:p>
        </text:list-item>
      </text:list>
      <text:p text:style-name="P6">Đánh giá:</text:p>
      <text:list text:style-name="L44">
        <text:list-item>
          <text:p text:style-name="P56">Content quality</text:p>
        </text:list-item>
        <text:list-item>
          <text:p text:style-name="P56">Metadata</text:p>
        </text:list-item>
      </text:list>
      <text:p text:style-name="P12"/>
      <text:h text:style-name="P4" text:outline-level="2">Exercise 3: Web Loader</text:h>
      <text:p text:style-name="P6">Yêu cầu:</text:p>
      <text:p text:style-name="P6">Load:</text:p>
      <text:p text:style-name="P11"><text:span text:style-name="Source_20_Text">https://python.langchain.com</text:span></text:p>
      <text:p text:style-name="P6">Kiểm tra:</text:p>
      <text:list text:style-name="L45">
        <text:list-item>
          <text:p text:style-name="P57">URL metadata</text:p>
        </text:list-item>
        <text:list-item>
          <text:p text:style-name="P57">Text length</text:p>
        </text:list-item>
        <text:list-item>
          <text:p text:style-name="P57">Extracted content</text:p>
        </text:list-item>
      </text:list>
      <text:p text:style-name="P12"/>
      <text:h text:style-name="P4" text:outline-level="2">Exercise 4: Loader Selection</text:h>
      <text:p text:style-name="P6">Cho các dữ liệu:</text:p>
      <text:list text:style-name="L46">
        <text:list-item>
          <text:p text:style-name="P58">Research paper PDF</text:p>
        </text:list-item>
        <text:list-item>
          <text:p text:style-name="P58">Company policy DOCX</text:p>
        </text:list-item>
        <text:list-item>
          <text:p text:style-name="P58">Online documentation website</text:p>
        </text:list-item>
      </text:list>
      <text:p text:style-name="P6">Chọn loader phù hợp và giải thích lý do.</text:p>
      <text:p text:style-name="P12"/>
      <text:h text:style-name="P13" text:outline-level="1">12. Kết quả cần đạt sau bài học</text:h>
      <text:p text:style-name="P6">Sau bài học, AI Engineer Intern có thể:</text:p>
      <text:h text:style-name="P4" text:outline-level="2"><text:soft-page-break/>Knowledge</text:h>
      <text:list text:style-name="L47">
        <text:list-item>
          <text:p text:style-name="P59">Hiểu kiến trúc Document Loader.</text:p>
        </text:list-item>
        <text:list-item>
          <text:p text:style-name="P59">Hiểu cách Loader chuyển raw data thành Document Object.</text:p>
        </text:list-item>
        <text:list-item>
          <text:p text:style-name="P59">Hiểu load() và lazy_load().</text:p>
        </text:list-item>
        <text:list-item>
          <text:p text:style-name="P59">Biết ưu nhược điểm từng loader.</text:p>
        </text:list-item>
      </text:list>
      <text:h text:style-name="P4" text:outline-level="2">Skills</text:h>
      <text:p text:style-name="P6">Có thể:</text:p>
      <text:list text:style-name="L48">
        <text:list-item>
          <text:p text:style-name="P60">Load PDF bằng PyPDFLoader.</text:p>
        </text:list-item>
        <text:list-item>
          <text:p text:style-name="P60">Load DOCX bằng Docx2txtLoader.</text:p>
        </text:list-item>
        <text:list-item>
          <text:p text:style-name="P60">Load Website bằng WebBaseLoader.</text:p>
        </text:list-item>
        <text:list-item>
          <text:p text:style-name="P60">Kiểm tra metadata.</text:p>
        </text:list-item>
        <text:list-item>
          <text:p text:style-name="P60">Chuẩn bị dữ liệu cho Text Splitting.</text:p>
        </text:list-item>
      </text:list>
      <text:h text:style-name="P4" text:outline-level="2">Chuẩn bị bài tiếp theo:</text:h>
      <text:p text:style-name="P10"><text:span text:style-name="Source_20_Text">Document Loader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Text Splitting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Chunking Strategy</text:span></text:p>
      <text:p text:style-name="P10"/>
      <text:p text:style-name="P10"><text:span text:style-name="Source_20_Text"><text:s text:c="8"/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<text:s text:c="8"/>↓</text:span></text:p>
      <text:p text:style-name="P10"/>
      <text:p text:style-name="P11"><text:span text:style-name="Source_20_Text">Vector Database</text:span></text:p>
      <text:p text:style-name="P1"/>
      <text:p text:style-name="P1"/>
      <text:p text:style-name="P1"/>
      <text:h text:style-name="Heading_20_1" text:outline-level="1">4. <text:span text:style-name="T4">PDF Loader Practice</text:span></text:h>
      <text:p text:style-name="P1"/>
      <text:h text:style-name="P3" text:outline-level="1"><text:soft-page-break/>Giáo trình thực hành: Load and Process PDF using LangChain PyPDFLoader</text:h>
      <text:h text:style-name="P4" text:outline-level="2">1. Mục tiêu bài thực hành</text:h>
      <text:p text:style-name="P6">Sau khi hoàn thành bài này, AI Engineer Intern có thể:</text:p>
      <text:list text:style-name="L49">
        <text:list-item>
          <text:p text:style-name="P61">Cài đặt môi trường làm việc với LangChain.</text:p>
        </text:list-item>
        <text:list-item>
          <text:p text:style-name="P61">Sử dụng <text:span text:style-name="Source_20_Text">PyPDFLoader</text:span> để đọc file PDF.</text:p>
        </text:list-item>
        <text:list-item>
          <text:p text:style-name="P61">Hiểu cách PDF được chuyển đổi thành LangChain <text:span text:style-name="Source_20_Text">Document Object</text:span>.</text:p>
        </text:list-item>
        <text:list-item>
          <text:p text:style-name="P61">Kiểm tra:</text:p>
          <text:list>
            <text:list-item>
              <text:p text:style-name="P61">Số lượng document.</text:p>
            </text:list-item>
            <text:list-item>
              <text:p text:style-name="P61"><text:span text:style-name="Source_20_Text">page_content</text:span>.</text:p>
            </text:list-item>
            <text:list-item>
              <text:p text:style-name="P61"><text:span text:style-name="Source_20_Text">metadata</text:span>.</text:p>
            </text:list-item>
          </text:list>
        </text:list-item>
        <text:list-item>
          <text:p text:style-name="P61">Xử lý PDF nhiều trang và PDF một trang.</text:p>
        </text:list-item>
        <text:list-item>
          <text:p text:style-name="P61">Debug các lỗi thường gặp khi load PDF.</text:p>
        </text:list-item>
      </text:list>
      <text:p text:style-name="P12"/>
      <text:h text:style-name="P13" text:outline-level="1">2. Kiến thức cần biết trước</text:h>
      <text:h text:style-name="P4" text:outline-level="2">Workflow xử lý PDF trong LangChain</text:h>
      <text:p text:style-name="P10"><text:span text:style-name="Source_20_Text">PDF File</text:span></text:p>
      <text:p text:style-name="P10"/>
      <text:p text:style-name="P10"><text:span text:style-name="Source_20_Text"><text:s text:c="3"/>|</text:span></text:p>
      <text:p text:style-name="P10"><text:span text:style-name="Source_20_Text"><text:s text:c="3"/>|</text:span></text:p>
      <text:p text:style-name="P10"><text:span text:style-name="Source_20_Text"><text:s text:c="3"/>↓</text:span></text:p>
      <text:p text:style-name="P10"/>
      <text:p text:style-name="P10"><text:span text:style-name="Source_20_Text">PyPDFLoader</text:span></text:p>
      <text:p text:style-name="P10"/>
      <text:p text:style-name="P10"><text:span text:style-name="Source_20_Text"><text:s text:c="3"/>|</text:span></text:p>
      <text:p text:style-name="P10"><text:span text:style-name="Source_20_Text"><text:s text:c="3"/>|</text:span></text:p>
      <text:p text:style-name="P10"><text:span text:style-name="Source_20_Text"><text:s text:c="3"/>↓</text:span></text:p>
      <text:p text:style-name="P10"/>
      <text:p text:style-name="P10"><text:span text:style-name="Source_20_Text">Document Object</text:span></text:p>
      <text:p text:style-name="P10"/>
      <text:p text:style-name="P10"><text:span text:style-name="Source_20_Text"><text:s text:c="3"/>|</text:span></text:p>
      <text:p text:style-name="P10"><text:span text:style-name="Source_20_Text"><text:s text:c="3"/>|</text:span></text:p>
      <text:p text:style-name="P10"><text:span text:style-name="Source_20_Text"><text:s text:c="3"/>↓</text:span></text:p>
      <text:p text:style-name="P10"/>
      <text:p text:style-name="P10"><text:span text:style-name="Source_20_Text">Text Splitter</text:span></text:p>
      <text:p text:style-name="P10"/>
      <text:p text:style-name="P10"><text:span text:style-name="Source_20_Text"><text:s text:c="3"/>|</text:span></text:p>
      <text:p text:style-name="P10"><text:span text:style-name="Source_20_Text"><text:s text:c="3"/>|</text:span></text:p>
      <text:p text:style-name="P10"><text:soft-page-break/><text:span text:style-name="Source_20_Text"><text:s text:c="3"/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<text:s text:c="3"/>|</text:span></text:p>
      <text:p text:style-name="P10"><text:span text:style-name="Source_20_Text"><text:s text:c="3"/>|</text:span></text:p>
      <text:p text:style-name="P10"><text:span text:style-name="Source_20_Text"><text:s text:c="3"/>↓</text:span></text:p>
      <text:p text:style-name="P10"/>
      <text:p text:style-name="P11"><text:span text:style-name="Source_20_Text">Vector Database</text:span></text:p>
      <text:p text:style-name="P12"/>
      <text:h text:style-name="P13" text:outline-level="1">3. Chuẩn bị môi trường</text:h>
      <text:h text:style-name="P4" text:outline-level="2">3.1. Tạo project</text:h>
      <text:p text:style-name="P6">Cấu trúc:</text:p>
      <text:p text:style-name="P10"><text:span text:style-name="Source_20_Text">pdf_loader_project/</text:span></text:p>
      <text:p text:style-name="P10"/>
      <text:p text:style-name="P10"><text:span text:style-name="Source_20_Text">│</text:span></text:p>
      <text:p text:style-name="P10"><text:span text:style-name="Source_20_Text">├── data/</text:span></text:p>
      <text:p text:style-name="P10"><text:span text:style-name="Source_20_Text">│ <text:s text:c="2"/>├── sample_one_page.pdf</text:span></text:p>
      <text:p text:style-name="P10"><text:span text:style-name="Source_20_Text">│ <text:s text:c="2"/>└── sample_multi_page.pdf</text:span></text:p>
      <text:p text:style-name="P10"><text:span text:style-name="Source_20_Text">│</text:span></text:p>
      <text:p text:style-name="P10"><text:span text:style-name="Source_20_Text">├── main.py</text:span></text:p>
      <text:p text:style-name="P10"><text:span text:style-name="Source_20_Text">│</text:span></text:p>
      <text:p text:style-name="P11"><text:span text:style-name="Source_20_Text">└── requirements.txt</text:span></text:p>
      <text:p text:style-name="P12"/>
      <text:h text:style-name="P13" text:outline-level="1">3.2. Tạo Virtual Environment</text:h>
      <text:h text:style-name="P4" text:outline-level="2">Windows</text:h>
      <text:p text:style-name="P10"><text:span text:style-name="Source_20_Text">python -m venv venv</text:span></text:p>
      <text:p text:style-name="P10"/>
      <text:p text:style-name="P11"><text:span text:style-name="Source_20_Text">venv\Scripts\activate</text:span></text:p>
      <text:p text:style-name="P12"/>
      <text:h text:style-name="P4" text:outline-level="2">Linux / Mac</text:h>
      <text:p text:style-name="P10"><text:span text:style-name="Source_20_Text">python3 -m venv venv</text:span></text:p>
      <text:p text:style-name="P10"/>
      <text:p text:style-name="P11"><text:span text:style-name="Source_20_Text">source venv/bin/activate</text:span></text:p>
      <text:p text:style-name="P6">Kiểm tra:</text:p>
      <text:p text:style-name="P11"><text:soft-page-break/><text:span text:style-name="Source_20_Text">python --version</text:span></text:p>
      <text:p text:style-name="P6">Expected:</text:p>
      <text:p text:style-name="P11"><text:span text:style-name="Source_20_Text">Python 3.x.x</text:span></text:p>
      <text:p text:style-name="P12"/>
      <text:h text:style-name="P13" text:outline-level="1">4. Cài đặt thư viện</text:h>
      <text:h text:style-name="P4" text:outline-level="2">requirements.txt</text:h>
      <text:p text:style-name="P6">Tạo file:</text:p>
      <text:p text:style-name="P10"><text:span text:style-name="Source_20_Text">langchain</text:span></text:p>
      <text:p text:style-name="P10"><text:span text:style-name="Source_20_Text">langchain-community</text:span></text:p>
      <text:p text:style-name="P11"><text:span text:style-name="Source_20_Text">pypdf</text:span></text:p>
      <text:p text:style-name="P12"/>
      <text:p text:style-name="P6">Cài đặt:</text:p>
      <text:p text:style-name="P11"><text:span text:style-name="Source_20_Text">pip install -r requirements.txt</text:span></text:p>
      <text:p text:style-name="P12"/>
      <text:p text:style-name="P6">Kiểm tra:</text:p>
      <text:p text:style-name="P11"><text:span text:style-name="Source_20_Text">pip list</text:span></text:p>
      <text:p text:style-name="P6">Expected:</text:p>
      <text:p text:style-name="P10"><text:span text:style-name="Source_20_Text">langchain</text:span></text:p>
      <text:p text:style-name="P10"><text:span text:style-name="Source_20_Text">langchain-community</text:span></text:p>
      <text:p text:style-name="P11"><text:span text:style-name="Source_20_Text">pypdf</text:span></text:p>
      <text:p text:style-name="P12"/>
      <text:h text:style-name="P13" text:outline-level="1">5. Giới thiệu PyPDFLoader</text:h>
      <text:h text:style-name="P4" text:outline-level="2">PyPDFLoader là gì?</text:h>
      <text:p text:style-name="P6"><text:span text:style-name="Source_20_Text">PyPDFLoader</text:span> là Document Loader trong LangChain dùng để đọc file PDF.</text:p>
      <text:p text:style-name="P6">Input:</text:p>
      <text:p text:style-name="P11"><text:span text:style-name="Source_20_Text">example.pdf</text:span></text:p>
      <text:p text:style-name="P6">Output:</text:p>
      <text:p text:style-name="P10"><text:span text:style-name="Source_20_Text">[</text:span></text:p>
      <text:p text:style-name="P10"><text:soft-page-break/><text:span text:style-name="Source_20_Text"><text:s/>Document(</text:span></text:p>
      <text:p text:style-name="P10"><text:span text:style-name="Source_20_Text"><text:s text:c="4"/>page_content="text...",</text:span></text:p>
      <text:p text:style-name="P10"><text:span text:style-name="Source_20_Text"><text:s text:c="4"/>metadata={</text:span></text:p>
      <text:p text:style-name="P10"><text:span text:style-name="Source_20_Text"><text:s text:c="8"/>"source":"example.pdf",</text:span></text:p>
      <text:p text:style-name="P10"><text:span text:style-name="Source_20_Text"><text:s text:c="8"/>"page":0</text:span></text:p>
      <text:p text:style-name="P10"><text:span text:style-name="Source_20_Text"><text:s text:c="4"/>}</text:span></text:p>
      <text:p text:style-name="P10"><text:span text:style-name="Source_20_Text"><text:s/>)</text:span></text:p>
      <text:p text:style-name="P11"><text:span text:style-name="Source_20_Text">]</text:span></text:p>
      <text:p text:style-name="P12"/>
      <text:h text:style-name="P13" text:outline-level="1">6. Load PDF cơ bản</text:h>
      <text:h text:style-name="P4" text:outline-level="2">6.1. Import</text:h>
      <text:p text:style-name="P6">File:</text:p>
      <text:p text:style-name="P11"><text:span text:style-name="Source_20_Text">main.py</text:span></text:p>
      <text:p text:style-name="P6">Code:</text:p>
      <text:p text:style-name="P11"><text:span text:style-name="Source_20_Text">from langchain_community.document_loaders import PyPDFLoader</text:span></text:p>
      <text:p text:style-name="P12"/>
      <text:h text:style-name="P13" text:outline-level="1">6.2. Khởi tạo Loader</text:h>
      <text:p text:style-name="P10"><text:span text:style-name="Source_20_Text">loader = PyPDFLoader(</text:span></text:p>
      <text:p text:style-name="P10"><text:span text:style-name="Source_20_Text"><text:s text:c="4"/>"data/sample_one_page.pdf"</text:span></text:p>
      <text:p text:style-name="P11"><text:span text:style-name="Source_20_Text">)</text:span></text:p>
      <text:p text:style-name="P6">Giải thích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hành phần</text:p>
            </table:table-cell>
            <table:table-cell table:style-name="Table4.A1" office:value-type="string">
              <text:p text:style-name="Table_20_Heading">Ý nghĩa</text:p>
            </table:table-cell>
          </table:table-row>
        </table:table-header-rows>
        <table:table-row>
          <table:table-cell table:style-name="Table4.A1" office:value-type="string">
            <text:p text:style-name="Table_20_Contents">PyPDFLoader</text:p>
          </table:table-cell>
          <table:table-cell table:style-name="Table4.A1" office:value-type="string">
            <text:p text:style-name="Table_20_Contents">Class đọc PDF</text:p>
          </table:table-cell>
        </table:table-row>
        <table:table-row>
          <table:table-cell table:style-name="Table4.A1" office:value-type="string">
            <text:p text:style-name="Table_20_Contents">path</text:p>
          </table:table-cell>
          <table:table-cell table:style-name="Table4.A1" office:value-type="string">
            <text:p text:style-name="Table_20_Contents">đường dẫn file PDF</text:p>
          </table:table-cell>
        </table:table-row>
      </table:table>
      <text:p text:style-name="P12"/>
      <text:h text:style-name="P13" text:outline-level="1">6.3. Load document</text:h>
      <text:p text:style-name="P11"><text:span text:style-name="Source_20_Text">documents = loader.load()</text:span></text:p>
      <text:p text:style-name="P6">Kết quả:</text:p>
      <text:p text:style-name="P10"><text:span text:style-name="Source_20_Text">[</text:span></text:p>
      <text:p text:style-name="P10"><text:span text:style-name="Source_20_Text"><text:s/>Document(...)</text:span></text:p>
      <text:p text:style-name="P11"><text:span text:style-name="Source_20_Text">]</text:span></text:p>
      <text:p text:style-name="P12"/>
      <text:h text:style-name="P13" text:outline-level="1"><text:soft-page-break/>7. Kiểm tra Document Object</text:h>
      <text:h text:style-name="P4" text:outline-level="2">Code hoàn chỉnh</text:h>
      <text:p text:style-name="P10"><text:span text:style-name="Source_20_Text">from langchain_community.document_loaders import PyPDFLoader</text:span></text:p>
      <text:p text:style-name="P10"/>
      <text:p text:style-name="P10"/>
      <text:p text:style-name="P10"><text:span text:style-name="Source_20_Text">pdf_path = "data/sample_one_page.pdf"</text:span></text:p>
      <text:p text:style-name="P10"/>
      <text:p text:style-name="P10"/>
      <text:p text:style-name="P10"><text:span text:style-name="Source_20_Text">loader = PyPDFLoader(pdf_path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"Number of documents:",</text:span></text:p>
      <text:p text:style-name="P10"><text:span text:style-name="Source_20_Text"><text:s text:c="4"/>len(documents)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for index, doc in enumerate(documents):</text:span></text:p>
      <text:p text:style-name="P10"/>
      <text:p text:style-name="P10"><text:span text:style-name="Source_20_Text"><text:s text:c="4"/>print("========================"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Document:",</text:span></text:p>
      <text:p text:style-name="P10"><text:span text:style-name="Source_20_Text"><text:s text:c="8"/>index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Metadata:"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metadata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print(</text:span></text:p>
      <text:p text:style-name="P10"><text:span text:style-name="Source_20_Text"><text:s text:c="8"/>"Content:"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[:300]</text:span></text:p>
      <text:p text:style-name="P11"><text:span text:style-name="Source_20_Text"><text:s text:c="4"/>)</text:span></text:p>
      <text:p text:style-name="P12"/>
      <text:h text:style-name="P13" text:outline-level="1"><text:soft-page-break/>8. Expected Output</text:h>
      <text:p text:style-name="P6">Ví dụ PDF một trang:</text:p>
      <text:p text:style-name="P10"><text:span text:style-name="Source_20_Text">Number of documents: 1</text:span></text:p>
      <text:p text:style-name="P10"/>
      <text:p text:style-name="P10"/>
      <text:p text:style-name="P10"><text:span text:style-name="Source_20_Text">========================</text:span></text:p>
      <text:p text:style-name="P10"/>
      <text:p text:style-name="P10"><text:span text:style-name="Source_20_Text">Document: 0</text:span></text:p>
      <text:p text:style-name="P10"/>
      <text:p text:style-name="P10"><text:span text:style-name="Source_20_Text">Metadata:</text:span></text:p>
      <text:p text:style-name="P10"/>
      <text:p text:style-name="P10"><text:span text:style-name="Source_20_Text">{</text:span></text:p>
      <text:p text:style-name="P10"><text:span text:style-name="Source_20_Text">'source':</text:span></text:p>
      <text:p text:style-name="P10"><text:span text:style-name="Source_20_Text">'data/sample_one_page.pdf',</text:span></text:p>
      <text:p text:style-name="P10"/>
      <text:p text:style-name="P10"><text:span text:style-name="Source_20_Text">'page':</text:span></text:p>
      <text:p text:style-name="P10"><text:span text:style-name="Source_20_Text">0</text:span></text:p>
      <text:p text:style-name="P10"><text:span text:style-name="Source_20_Text">}</text:span></text:p>
      <text:p text:style-name="P10"/>
      <text:p text:style-name="P10"/>
      <text:p text:style-name="P10"><text:span text:style-name="Source_20_Text">Content:</text:span></text:p>
      <text:p text:style-name="P10"/>
      <text:p text:style-name="P10"><text:span text:style-name="Source_20_Text">Introduction to LangChain.</text:span></text:p>
      <text:p text:style-name="P10"/>
      <text:p text:style-name="P11"><text:span text:style-name="Source_20_Text">LangChain is a framework for building LLM applications...</text:span></text:p>
      <text:p text:style-name="P12"/>
      <text:h text:style-name="P13" text:outline-level="1">9. Phân tích Document Object</text:h>
      <text:p text:style-name="P6">Output:</text:p>
      <text:p text:style-name="P10"><text:span text:style-name="Source_20_Text">Document(</text:span></text:p>
      <text:p text:style-name="P10"><text:span text:style-name="Source_20_Text">page_content=</text:span></text:p>
      <text:p text:style-name="P10"><text:span text:style-name="Source_20_Text">"Introduction to LangChain",</text:span></text:p>
      <text:p text:style-name="P10"/>
      <text:p text:style-name="P10"><text:span text:style-name="Source_20_Text">metadata={</text:span></text:p>
      <text:p text:style-name="P10"><text:span text:style-name="Source_20_Text"><text:s text:c="4"/>"source":</text:span></text:p>
      <text:p text:style-name="P10"><text:span text:style-name="Source_20_Text"><text:s text:c="4"/>"sample_one_page.pdf",</text:span></text:p>
      <text:p text:style-name="P10"/>
      <text:p text:style-name="P10"><text:span text:style-name="Source_20_Text"><text:s text:c="4"/>"page":</text:span></text:p>
      <text:p text:style-name="P10"><text:span text:style-name="Source_20_Text"><text:s text:c="4"/>0</text:span></text:p>
      <text:p text:style-name="P10"><text:span text:style-name="Source_20_Text">}</text:span></text:p>
      <text:p text:style-name="P11"><text:span text:style-name="Source_20_Text">)</text:span></text:p>
      <text:p text:style-name="P6">Bao gồm:</text:p>
      <text:h text:style-name="P4" text:outline-level="2"><text:soft-page-break/>page_content</text:h>
      <text:p text:style-name="P6">Text được extract từ PDF.</text:p>
      <text:p text:style-name="P6">Ví dụ:</text:p>
      <text:p text:style-name="P11"><text:span text:style-name="Source_20_Text">doc.page_content</text:span></text:p>
      <text:p text:style-name="P6">Output:</text:p>
      <text:p text:style-name="P11"><text:span text:style-name="Source_20_Text">LangChain is a framework...</text:span></text:p>
      <text:p text:style-name="P12"/>
      <text:h text:style-name="P4" text:outline-level="2">metadata</text:h>
      <text:p text:style-name="P6">Thông tin nguồn.</text:p>
      <text:p text:style-name="P6">Ví dụ:</text:p>
      <text:p text:style-name="P11"><text:span text:style-name="Source_20_Text">doc.metadata</text:span></text:p>
      <text:p text:style-name="P6">Output:</text:p>
      <text:p text:style-name="P10"><text:span text:style-name="Source_20_Text">{</text:span></text:p>
      <text:p text:style-name="P10"><text:span text:style-name="Source_20_Text">"source":"sample.pdf",</text:span></text:p>
      <text:p text:style-name="P10"><text:span text:style-name="Source_20_Text">"page":0</text:span></text:p>
      <text:p text:style-name="P11"><text:span text:style-name="Source_20_Text">}</text:span></text:p>
      <text:p text:style-name="P12"/>
      <text:h text:style-name="P13" text:outline-level="1">10. Load PDF nhiều trang</text:h>
      <text:h text:style-name="P4" text:outline-level="2">Ví dụ</text:h>
      <text:p text:style-name="P6">File:</text:p>
      <text:p text:style-name="P11"><text:span text:style-name="Source_20_Text">sample_multi_page.pdf</text:span></text:p>
      <text:p text:style-name="P6">Có:</text:p>
      <text:p text:style-name="P10"><text:span text:style-name="Source_20_Text">Page 1</text:span></text:p>
      <text:p text:style-name="P10"><text:span text:style-name="Source_20_Text">Introduction</text:span></text:p>
      <text:p text:style-name="P10"/>
      <text:p text:style-name="P10"><text:span text:style-name="Source_20_Text">Page 2</text:span></text:p>
      <text:p text:style-name="P10"><text:span text:style-name="Source_20_Text">Installation</text:span></text:p>
      <text:p text:style-name="P10"/>
      <text:p text:style-name="P10"><text:span text:style-name="Source_20_Text">Page 3</text:span></text:p>
      <text:p text:style-name="P11"><text:span text:style-name="Source_20_Text">Document Loader</text:span></text:p>
      <text:p text:style-name="P12"/>
      <text:p text:style-name="P6"><text:soft-page-break/>Code:</text:p>
      <text:p text:style-name="P10"><text:span text:style-name="Source_20_Text">from langchain_community.document_loaders import PyPDFLoader</text:span></text:p>
      <text:p text:style-name="P10"/>
      <text:p text:style-name="P10"/>
      <text:p text:style-name="P10"><text:span text:style-name="Source_20_Text">loader = PyPDFLoader(</text:span></text:p>
      <text:p text:style-name="P10"><text:span text:style-name="Source_20_Text"><text:s text:c="4"/>"data/sample_multi_page.pdf"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"Total pages:",</text:span></text:p>
      <text:p text:style-name="P10"><text:span text:style-name="Source_20_Text"><text:s text:c="4"/>len(documents)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"==================="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Page:",</text:span></text:p>
      <text:p text:style-name="P10"><text:span text:style-name="Source_20_Text"><text:s text:c="8"/>doc.metadata["page"]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[:100]</text:span></text:p>
      <text:p text:style-name="P11"><text:span text:style-name="Source_20_Text"><text:s text:c="4"/>)</text:span></text:p>
      <text:p text:style-name="P12"/>
      <text:h text:style-name="P4" text:outline-level="2">Expected Output</text:h>
      <text:p text:style-name="P10"><text:span text:style-name="Source_20_Text">Total pages: 3</text:span></text:p>
      <text:p text:style-name="P10"/>
      <text:p text:style-name="P10"/>
      <text:p text:style-name="P10"><text:span text:style-name="Source_20_Text">===================</text:span></text:p>
      <text:p text:style-name="P10"/>
      <text:p text:style-name="P10"><text:span text:style-name="Source_20_Text">Page: 0</text:span></text:p>
      <text:p text:style-name="P10"/>
      <text:p text:style-name="P10"><text:span text:style-name="Source_20_Text">Introduction</text:span></text:p>
      <text:p text:style-name="P10"/>
      <text:p text:style-name="P10"/>
      <text:p text:style-name="P10"><text:span text:style-name="Source_20_Text">===================</text:span></text:p>
      <text:p text:style-name="P10"/>
      <text:p text:style-name="P10"><text:span text:style-name="Source_20_Text">Page: 1</text:span></text:p>
      <text:p text:style-name="P10"><text:soft-page-break/></text:p>
      <text:p text:style-name="P10"><text:span text:style-name="Source_20_Text">Installation</text:span></text:p>
      <text:p text:style-name="P10"/>
      <text:p text:style-name="P10"/>
      <text:p text:style-name="P10"><text:span text:style-name="Source_20_Text">===================</text:span></text:p>
      <text:p text:style-name="P10"/>
      <text:p text:style-name="P10"><text:span text:style-name="Source_20_Text">Page: 2</text:span></text:p>
      <text:p text:style-name="P10"/>
      <text:p text:style-name="P11"><text:span text:style-name="Source_20_Text">Document Loader</text:span></text:p>
      <text:p text:style-name="P12"/>
      <text:h text:style-name="P13" text:outline-level="1">11. Hiểu cách PyPDFLoader xử lý nhiều trang</text:h>
      <text:p text:style-name="P6">PDF:</text:p>
      <text:p text:style-name="P10"><text:span text:style-name="Source_20_Text">sample.pdf</text:span></text:p>
      <text:p text:style-name="P10"/>
      <text:p text:style-name="P10"><text:span text:style-name="Source_20_Text">Page 1</text:span></text:p>
      <text:p text:style-name="P10"><text:span text:style-name="Source_20_Text">Page 2</text:span></text:p>
      <text:p text:style-name="P11"><text:span text:style-name="Source_20_Text">Page 3</text:span></text:p>
      <text:p text:style-name="P6">Sau load:</text:p>
      <text:p text:style-name="P10"><text:span text:style-name="Source_20_Text">documents = [</text:span></text:p>
      <text:p text:style-name="P10"/>
      <text:p text:style-name="P10"><text:span text:style-name="Source_20_Text">Document(</text:span></text:p>
      <text:p text:style-name="P10"><text:span text:style-name="Source_20_Text">page_content="Page 1",</text:span></text:p>
      <text:p text:style-name="P10"><text:span text:style-name="Source_20_Text">metadata={</text:span></text:p>
      <text:p text:style-name="P10"><text:span text:style-name="Source_20_Text">"page":0</text:span></text:p>
      <text:p text:style-name="P10"><text:span text:style-name="Source_20_Text">}</text:span></text:p>
      <text:p text:style-name="P10"><text:span text:style-name="Source_20_Text">),</text:span></text:p>
      <text:p text:style-name="P10"/>
      <text:p text:style-name="P10"/>
      <text:p text:style-name="P10"><text:span text:style-name="Source_20_Text">Document(</text:span></text:p>
      <text:p text:style-name="P10"><text:span text:style-name="Source_20_Text">page_content="Page 2",</text:span></text:p>
      <text:p text:style-name="P10"><text:span text:style-name="Source_20_Text">metadata={</text:span></text:p>
      <text:p text:style-name="P10"><text:span text:style-name="Source_20_Text">"page":1</text:span></text:p>
      <text:p text:style-name="P10"><text:span text:style-name="Source_20_Text">}</text:span></text:p>
      <text:p text:style-name="P10"><text:span text:style-name="Source_20_Text">),</text:span></text:p>
      <text:p text:style-name="P10"/>
      <text:p text:style-name="P10"/>
      <text:p text:style-name="P10"><text:span text:style-name="Source_20_Text">Document(</text:span></text:p>
      <text:p text:style-name="P10"><text:span text:style-name="Source_20_Text">page_content="Page 3",</text:span></text:p>
      <text:p text:style-name="P10"><text:span text:style-name="Source_20_Text">metadata={</text:span></text:p>
      <text:p text:style-name="P10"><text:span text:style-name="Source_20_Text">"page":2</text:span></text:p>
      <text:p text:style-name="P10"><text:span text:style-name="Source_20_Text">}</text:span></text:p>
      <text:p text:style-name="P10"><text:span text:style-name="Source_20_Text">)</text:span></text:p>
      <text:p text:style-name="P10"/>
      <text:p text:style-name="P11"><text:soft-page-break/><text:span text:style-name="Source_20_Text">]</text:span></text:p>
      <text:p text:style-name="P6">Mỗi page trở thành một Document riêng.</text:p>
      <text:p text:style-name="P12"/>
      <text:h text:style-name="P13" text:outline-level="1">12. Đọc Metadata</text:h>
      <text:h text:style-name="P4" text:outline-level="2">Lấy source</text:h>
      <text:p text:style-name="P11"><text:span text:style-name="Source_20_Text">source = doc.metadata["source"]</text:span></text:p>
      <text:p text:style-name="P6">Output:</text:p>
      <text:p text:style-name="P11"><text:span text:style-name="Source_20_Text">sample.pdf</text:span></text:p>
      <text:p text:style-name="P12"/>
      <text:h text:style-name="P4" text:outline-level="2">Lấy page number</text:h>
      <text:p text:style-name="P11"><text:span text:style-name="Source_20_Text">page = doc.metadata["page"]</text:span></text:p>
      <text:p text:style-name="P6">Output:</text:p>
      <text:p text:style-name="P11"><text:span text:style-name="Source_20_Text">2</text:span></text:p>
      <text:p text:style-name="P12"/>
      <text:h text:style-name="P4" text:outline-level="2">Ứng dụng thực tế</text:h>
      <text:p text:style-name="P6">Metadata được dùng để:</text:p>
      <text:h text:style-name="P5" text:outline-level="3">Citation</text:h>
      <text:p text:style-name="P6">Ví dụ:</text:p>
      <text:p text:style-name="P10"><text:span text:style-name="Source_20_Text">Answer:</text:span></text:p>
      <text:p text:style-name="P10"/>
      <text:p text:style-name="P10"><text:span text:style-name="Source_20_Text">Employees receive 20 vacation days.</text:span></text:p>
      <text:p text:style-name="P10"/>
      <text:p text:style-name="P10"><text:span text:style-name="Source_20_Text">Source:</text:span></text:p>
      <text:p text:style-name="P11"><text:span text:style-name="Source_20_Text">HR_policy.pdf page 5</text:span></text:p>
      <text:p text:style-name="P12"/>
      <text:h text:style-name="P5" text:outline-level="3">Filtering</text:h>
      <text:p text:style-name="P6">Ví dụ:</text:p>
      <text:p text:style-name="P10"><text:span text:style-name="Source_20_Text">if doc.metadata["page"] == 5:</text:span></text:p>
      <text:p text:style-name="P11"><text:span text:style-name="Source_20_Text"><text:s text:c="4"/>print(doc.page_content)</text:span></text:p>
      <text:p text:style-name="P12"><text:soft-page-break/></text:p>
      <text:h text:style-name="P13" text:outline-level="1">13. Extract page_content</text:h>
      <text:h text:style-name="P4" text:outline-level="2">Lấy toàn bộ text</text:h>
      <text:p text:style-name="P11"><text:span text:style-name="Source_20_Text">text = doc.page_content</text:span></text:p>
      <text:p text:style-name="P12"/>
      <text:h text:style-name="P4" text:outline-level="2">Lấy preview</text:h>
      <text:p text:style-name="P10"><text:span text:style-name="Source_20_Text">print(</text:span></text:p>
      <text:p text:style-name="P10"><text:span text:style-name="Source_20_Text"><text:s text:c="4"/>doc.page_content[:500]</text:span></text:p>
      <text:p text:style-name="P11"><text:span text:style-name="Source_20_Text">)</text:span></text:p>
      <text:p text:style-name="P12"/>
      <text:h text:style-name="P4" text:outline-level="2">Đếm số ký tự</text:h>
      <text:p text:style-name="P10"><text:span text:style-name="Source_20_Text">length = len(</text:span></text:p>
      <text:p text:style-name="P10"><text:span text:style-name="Source_20_Text"><text:s text:c="4"/>doc.page_content</text:span></text:p>
      <text:p text:style-name="P10"><text:span text:style-name="Source_20_Text">)</text:span></text:p>
      <text:p text:style-name="P10"/>
      <text:p text:style-name="P10"/>
      <text:p text:style-name="P11"><text:span text:style-name="Source_20_Text">print(length)</text:span></text:p>
      <text:p text:style-name="P6">Output:</text:p>
      <text:p text:style-name="P11"><text:span text:style-name="Source_20_Text">1250</text:span></text:p>
      <text:p text:style-name="P12"/>
      <text:h text:style-name="P13" text:outline-level="1">14. Xử lý PDF nhiều trang nâng cao</text:h>
      <text:h text:style-name="P4" text:outline-level="2">Gom toàn bộ text</text:h>
      <text:p text:style-name="P10"><text:span text:style-name="Source_20_Text">full_text = ""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full_text += doc.page_content</text:span></text:p>
      <text:p text:style-name="P10"/>
      <text:p text:style-name="P10"/>
      <text:p text:style-name="P11"><text:span text:style-name="Source_20_Text">print(full_text)</text:span></text:p>
      <text:p text:style-name="P12"/>
      <text:h text:style-name="P4" text:outline-level="2"><text:soft-page-break/>Đếm tổng số ký tự</text:h>
      <text:p text:style-name="P10"><text:span text:style-name="Source_20_Text">total_chars = sum(</text:span></text:p>
      <text:p text:style-name="P10"><text:span text:style-name="Source_20_Text"><text:s text:c="4"/>len(doc.page_content)</text:span></text:p>
      <text:p text:style-name="P10"><text:span text:style-name="Source_20_Text"><text:s text:c="4"/>for doc in documents</text:span></text:p>
      <text:p text:style-name="P10"><text:span text:style-name="Source_20_Text">)</text:span></text:p>
      <text:p text:style-name="P10"/>
      <text:p text:style-name="P10"/>
      <text:p text:style-name="P11"><text:span text:style-name="Source_20_Text">print(total_chars)</text:span></text:p>
      <text:p text:style-name="P6">Expected:</text:p>
      <text:p text:style-name="P11"><text:span text:style-name="Source_20_Text">8500</text:span></text:p>
      <text:p text:style-name="P12"/>
      <text:h text:style-name="P13" text:outline-level="1">15. Xử lý PDF một trang</text:h>
      <text:h text:style-name="P4" text:outline-level="2">Scenario</text:h>
      <text:p text:style-name="P6">File:</text:p>
      <text:p text:style-name="P11"><text:span text:style-name="Source_20_Text">invoice.pdf</text:span></text:p>
      <text:p text:style-name="P6">Nội dung:</text:p>
      <text:p text:style-name="P10"><text:span text:style-name="Source_20_Text">Invoice Number:</text:span></text:p>
      <text:p text:style-name="P11"><text:span text:style-name="Source_20_Text">12345</text:span></text:p>
      <text:p text:style-name="P6">Code:</text:p>
      <text:p text:style-name="P10"><text:span text:style-name="Source_20_Text">loader = PyPDFLoader(</text:span></text:p>
      <text:p text:style-name="P10"><text:span text:style-name="Source_20_Text"><text:s text:c="4"/>"data/invoice.pdf"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1"><text:span text:style-name="Source_20_Text">print(len(documents))</text:span></text:p>
      <text:p text:style-name="P6">Output:</text:p>
      <text:p text:style-name="P11"><text:span text:style-name="Source_20_Text">1</text:span></text:p>
      <text:p text:style-name="P12"/>
      <text:h text:style-name="P13" text:outline-level="1"><text:soft-page-break/>16. Kiểm tra lỗi thường gặp</text:h>
      <text:h text:style-name="P13" text:outline-level="1">Error 1: File không tồn tại</text:h>
      <text:p text:style-name="P6">Code:</text:p>
      <text:p text:style-name="P10"><text:span text:style-name="Source_20_Text">loader = PyPDFLoader(</text:span></text:p>
      <text:p text:style-name="P10"><text:span text:style-name="Source_20_Text"><text:s text:c="4"/>"data/not_exist.pdf"</text:span></text:p>
      <text:p text:style-name="P11"><text:span text:style-name="Source_20_Text">)</text:span></text:p>
      <text:p text:style-name="P6">Error:</text:p>
      <text:p text:style-name="P11"><text:span text:style-name="Source_20_Text">FileNotFoundError</text:span></text:p>
      <text:p text:style-name="P12"/>
      <text:h text:style-name="P4" text:outline-level="2">Debug</text:h>
      <text:p text:style-name="P6">Kiểm tra path:</text:p>
      <text:p text:style-name="P10"><text:span text:style-name="Source_20_Text">import os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os.path.exists(</text:span></text:p>
      <text:p text:style-name="P10"><text:span text:style-name="Source_20_Text"><text:s text:c="8"/>"data/not_exist.pdf"</text:span></text:p>
      <text:p text:style-name="P10"><text:span text:style-name="Source_20_Text"><text:s text:c="4"/>)</text:span></text:p>
      <text:p text:style-name="P11"><text:span text:style-name="Source_20_Text">)</text:span></text:p>
      <text:p text:style-name="P6">Output:</text:p>
      <text:p text:style-name="P11"><text:span text:style-name="Source_20_Text">False</text:span></text:p>
      <text:p text:style-name="P12"/>
      <text:h text:style-name="P13" text:outline-level="1">Error 2: PDF bị lỗi</text:h>
      <text:p text:style-name="P6">Ví dụ:</text:p>
      <text:p text:style-name="P11"><text:span text:style-name="Source_20_Text">corrupted.pdf</text:span></text:p>
      <text:p text:style-name="P6">Có thể gặp:</text:p>
      <text:p text:style-name="P11"><text:span text:style-name="Source_20_Text">PdfReadError</text:span></text:p>
      <text:p text:style-name="P12"/>
      <text:h text:style-name="P4" text:outline-level="2">Debug</text:h>
      <text:p text:style-name="P6">Test mở file:</text:p>
      <text:p text:style-name="P10"><text:span text:style-name="Source_20_Text">from pypdf import PdfReader</text:span></text:p>
      <text:p text:style-name="P10"><text:soft-page-break/></text:p>
      <text:p text:style-name="P10"/>
      <text:p text:style-name="P10"><text:span text:style-name="Source_20_Text">reader = PdfReader(</text:span></text:p>
      <text:p text:style-name="P10"><text:span text:style-name="Source_20_Text"><text:s text:c="4"/>"data/sample.pdf"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len(reader.pages)</text:span></text:p>
      <text:p text:style-name="P11"><text:span text:style-name="Source_20_Text">)</text:span></text:p>
      <text:p text:style-name="P12"/>
      <text:h text:style-name="P13" text:outline-level="1">Error 3: PDF scan</text:h>
      <text:p text:style-name="P6">Ví dụ:</text:p>
      <text:p text:style-name="P11"><text:span text:style-name="Source_20_Text">image_based.pdf</text:span></text:p>
      <text:p text:style-name="P6">Load:</text:p>
      <text:p text:style-name="P11"><text:span text:style-name="Source_20_Text">documents = loader.load()</text:span></text:p>
      <text:p text:style-name="P6">Output:</text:p>
      <text:p text:style-name="P11"><text:span text:style-name="Source_20_Text">page_content=""</text:span></text:p>
      <text:p text:style-name="P6">Nguyên nhân:</text:p>
      <text:p text:style-name="P6">PDF chỉ chứa hình ảnh.</text:p>
      <text:p text:style-name="P12"/>
      <text:p text:style-name="P6">Giải pháp:</text:p>
      <text:p text:style-name="P6">Dùng OCR:</text:p>
      <text:p text:style-name="P10"><text:span text:style-name="Source_20_Text">PDF Image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OCR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Text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LangChain</text:span></text:p>
      <text:p text:style-name="P6"><text:soft-page-break/>Tools:</text:p>
      <text:list text:style-name="L50">
        <text:list-item>
          <text:p text:style-name="P62">Tesseract OCR</text:p>
        </text:list-item>
        <text:list-item>
          <text:p text:style-name="P62">AWS Textract</text:p>
        </text:list-item>
        <text:list-item>
          <text:p text:style-name="P62">Google Document AI</text:p>
        </text:list-item>
      </text:list>
      <text:p text:style-name="P12"/>
      <text:h text:style-name="P13" text:outline-level="1">Error 4: Text bị sai format</text:h>
      <text:p text:style-name="P6">Ví dụ:</text:p>
      <text:p text:style-name="P6">PDF:</text:p>
      <text:p text:style-name="P10"><text:span text:style-name="Source_20_Text">Column A <text:s text:c="7"/>Column B</text:span></text:p>
      <text:p text:style-name="P11"><text:span text:style-name="Source_20_Text">Data <text:s text:c="11"/>Value</text:span></text:p>
      <text:p text:style-name="P6">Output:</text:p>
      <text:p text:style-name="P11"><text:span text:style-name="Source_20_Text">Column A Data Column B Value</text:span></text:p>
      <text:p text:style-name="P6">Nguyên nhân:</text:p>
      <text:p text:style-name="P6">PDF không lưu layout.</text:p>
      <text:p text:style-name="P12"/>
      <text:h text:style-name="P13" text:outline-level="1">17. Mini Project: PDF Analyzer</text:h>
      <text:h text:style-name="P4" text:outline-level="2">Requirement</text:h>
      <text:p text:style-name="P6">Viết chương trình:</text:p>
      <text:p text:style-name="P6">Input:</text:p>
      <text:p text:style-name="P11"><text:span text:style-name="Source_20_Text">PDF file</text:span></text:p>
      <text:p text:style-name="P6">Output:</text:p>
      <text:p text:style-name="P10"><text:span text:style-name="Source_20_Text">File name:</text:span></text:p>
      <text:p text:style-name="P10"/>
      <text:p text:style-name="P10"><text:span text:style-name="Source_20_Text">Total pages:</text:span></text:p>
      <text:p text:style-name="P10"/>
      <text:p text:style-name="P10"><text:span text:style-name="Source_20_Text">Total characters:</text:span></text:p>
      <text:p text:style-name="P10"/>
      <text:p text:style-name="P10"><text:span text:style-name="Source_20_Text">Page information:</text:span></text:p>
      <text:p text:style-name="P10"/>
      <text:p text:style-name="P10"><text:span text:style-name="Source_20_Text">- Page 1</text:span></text:p>
      <text:p text:style-name="P10"><text:span text:style-name="Source_20_Text">- Page 2</text:span></text:p>
      <text:p text:style-name="P11"><text:span text:style-name="Source_20_Text">- Page 3</text:span></text:p>
      <text:p text:style-name="P12"><text:soft-page-break/></text:p>
      <text:h text:style-name="P13" text:outline-level="1">Source Code hoàn chỉnh</text:h>
      <text:p text:style-name="P10"><text:span text:style-name="Source_20_Text">from langchain_community.document_loaders import PyPDFLoader</text:span></text:p>
      <text:p text:style-name="P10"><text:span text:style-name="Source_20_Text">import os</text:span></text:p>
      <text:p text:style-name="P10"/>
      <text:p text:style-name="P10"/>
      <text:p text:style-name="P10"><text:span text:style-name="Source_20_Text">def load_pdf(path):</text:span></text:p>
      <text:p text:style-name="P10"/>
      <text:p text:style-name="P10"><text:span text:style-name="Source_20_Text"><text:s text:c="4"/>if not os.path.exists(path):</text:span></text:p>
      <text:p text:style-name="P10"><text:span text:style-name="Source_20_Text"><text:s text:c="8"/>raise FileNotFoundError(</text:span></text:p>
      <text:p text:style-name="P10"><text:span text:style-name="Source_20_Text"><text:s text:c="12"/>"PDF file not found"</text:span></text:p>
      <text:p text:style-name="P10"><text:span text:style-name="Source_20_Text"><text:s text:c="8"/>)</text:span></text:p>
      <text:p text:style-name="P10"/>
      <text:p text:style-name="P10"/>
      <text:p text:style-name="P10"><text:span text:style-name="Source_20_Text"><text:s text:c="4"/>loader = PyPDFLoader(path)</text:span></text:p>
      <text:p text:style-name="P10"/>
      <text:p text:style-name="P10"><text:span text:style-name="Source_20_Text"><text:s text:c="4"/>return loader.load()</text:span></text:p>
      <text:p text:style-name="P10"/>
      <text:p text:style-name="P10"/>
      <text:p text:style-name="P10"/>
      <text:p text:style-name="P10"><text:span text:style-name="Source_20_Text">def analyze_pdf(documents):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Total pages:",</text:span></text:p>
      <text:p text:style-name="P10"><text:span text:style-name="Source_20_Text"><text:s text:c="8"/>len(documents)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total_chars = 0</text:span></text:p>
      <text:p text:style-name="P10"/>
      <text:p text:style-name="P10"/>
      <text:p text:style-name="P10"><text:span text:style-name="Source_20_Text"><text:s text:c="4"/>for doc in documents:</text:span></text:p>
      <text:p text:style-name="P10"/>
      <text:p text:style-name="P10"><text:span text:style-name="Source_20_Text"><text:s text:c="8"/>print("================")</text:span></text:p>
      <text:p text:style-name="P10"/>
      <text:p text:style-name="P10"><text:span text:style-name="Source_20_Text"><text:s text:c="8"/>print(</text:span></text:p>
      <text:p text:style-name="P10"><text:span text:style-name="Source_20_Text"><text:s text:c="12"/>"Page:",</text:span></text:p>
      <text:p text:style-name="P10"><text:span text:style-name="Source_20_Text"><text:s text:c="12"/>doc.metadata["page"]</text:span></text:p>
      <text:p text:style-name="P10"><text:span text:style-name="Source_20_Text"><text:s text:c="8"/>)</text:span></text:p>
      <text:p text:style-name="P10"/>
      <text:p text:style-name="P10"/>
      <text:p text:style-name="P10"><text:span text:style-name="Source_20_Text"><text:s text:c="8"/>chars = len(</text:span></text:p>
      <text:p text:style-name="P10"><text:span text:style-name="Source_20_Text"><text:s text:c="12"/>doc.page_content</text:span></text:p>
      <text:p text:style-name="P10"><text:span text:style-name="Source_20_Text"><text:s text:c="8"/>)</text:span></text:p>
      <text:p text:style-name="P10"/>
      <text:p text:style-name="P10"/>
      <text:p text:style-name="P10"><text:span text:style-name="Source_20_Text"><text:s text:c="8"/>total_chars += chars</text:span></text:p>
      <text:p text:style-name="P10"><text:soft-page-break/></text:p>
      <text:p text:style-name="P10"/>
      <text:p text:style-name="P10"><text:span text:style-name="Source_20_Text"><text:s text:c="8"/>print(</text:span></text:p>
      <text:p text:style-name="P10"><text:span text:style-name="Source_20_Text"><text:s text:c="12"/>"Characters:",</text:span></text:p>
      <text:p text:style-name="P10"><text:span text:style-name="Source_20_Text"><text:s text:c="12"/>chars</text:span></text:p>
      <text:p text:style-name="P10"><text:span text:style-name="Source_20_Text"><text:s text:c="8"/>)</text:span></text:p>
      <text:p text:style-name="P10"/>
      <text:p text:style-name="P10"/>
      <text:p text:style-name="P10"><text:span text:style-name="Source_20_Text"><text:s text:c="4"/>print("================"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Total characters:",</text:span></text:p>
      <text:p text:style-name="P10"><text:span text:style-name="Source_20_Text"><text:s text:c="8"/>total_chars</text:span></text:p>
      <text:p text:style-name="P10"><text:span text:style-name="Source_20_Text"><text:s text:c="4"/>)</text:span></text:p>
      <text:p text:style-name="P10"/>
      <text:p text:style-name="P10"/>
      <text:p text:style-name="P10"/>
      <text:p text:style-name="P10"><text:span text:style-name="Source_20_Text">if __name__ == "__main__":</text:span></text:p>
      <text:p text:style-name="P10"/>
      <text:p text:style-name="P10"><text:span text:style-name="Source_20_Text"><text:s text:c="4"/>pdf_path = (</text:span></text:p>
      <text:p text:style-name="P10"><text:span text:style-name="Source_20_Text"><text:s text:c="8"/>"data/sample_multi_page.pdf"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docs = load_pdf(</text:span></text:p>
      <text:p text:style-name="P10"><text:span text:style-name="Source_20_Text"><text:s text:c="8"/>pdf_path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analyze_pdf(</text:span></text:p>
      <text:p text:style-name="P10"><text:span text:style-name="Source_20_Text"><text:s text:c="8"/>docs</text:span></text:p>
      <text:p text:style-name="P11"><text:span text:style-name="Source_20_Text"><text:s text:c="4"/>)</text:span></text:p>
      <text:p text:style-name="P12"/>
      <text:h text:style-name="P13" text:outline-level="1">Expected Output</text:h>
      <text:p text:style-name="P10"><text:span text:style-name="Source_20_Text">Total pages: 5</text:span></text:p>
      <text:p text:style-name="P10"/>
      <text:p text:style-name="P10"/>
      <text:p text:style-name="P10"><text:span text:style-name="Source_20_Text">================</text:span></text:p>
      <text:p text:style-name="P10"/>
      <text:p text:style-name="P10"><text:span text:style-name="Source_20_Text">Page:0</text:span></text:p>
      <text:p text:style-name="P10"/>
      <text:p text:style-name="P10"><text:span text:style-name="Source_20_Text">Characters:850</text:span></text:p>
      <text:p text:style-name="P10"/>
      <text:p text:style-name="P10"/>
      <text:p text:style-name="P10"><text:span text:style-name="Source_20_Text">================</text:span></text:p>
      <text:p text:style-name="P10"/>
      <text:p text:style-name="P10"><text:soft-page-break/><text:span text:style-name="Source_20_Text">Page:1</text:span></text:p>
      <text:p text:style-name="P10"/>
      <text:p text:style-name="P10"><text:span text:style-name="Source_20_Text">Characters:920</text:span></text:p>
      <text:p text:style-name="P10"/>
      <text:p text:style-name="P10"/>
      <text:p text:style-name="P10"><text:span text:style-name="Source_20_Text">================</text:span></text:p>
      <text:p text:style-name="P10"/>
      <text:p text:style-name="P11"><text:span text:style-name="Source_20_Text">Total characters:5000</text:span></text:p>
      <text:p text:style-name="P12"/>
      <text:h text:style-name="P13" text:outline-level="1">18. Bài tập thực hành</text:h>
      <text:h text:style-name="P4" text:outline-level="2">Exercise 1: Basic PDF Loading</text:h>
      <text:p text:style-name="P6">Yêu cầu:</text:p>
      <text:list text:style-name="L51">
        <text:list-item>
          <text:p text:style-name="P63">Load PDF.</text:p>
        </text:list-item>
        <text:list-item>
          <text:p text:style-name="P63">In:</text:p>
          <text:list>
            <text:list-item>
              <text:p text:style-name="P63">Number pages</text:p>
            </text:list-item>
            <text:list-item>
              <text:p text:style-name="P63">Metadata</text:p>
            </text:list-item>
            <text:list-item>
              <text:p text:style-name="P63">Content preview</text:p>
            </text:list-item>
          </text:list>
        </text:list-item>
      </text:list>
      <text:p text:style-name="P12"/>
      <text:h text:style-name="P4" text:outline-level="2">Exercise 2: Multi Page PDF</text:h>
      <text:p text:style-name="P6">Yêu cầu:</text:p>
      <text:list text:style-name="L52">
        <text:list-item>
          <text:p text:style-name="P64">Load PDF 10 trang.</text:p>
        </text:list-item>
        <text:list-item>
          <text:p text:style-name="P64">In:</text:p>
        </text:list-item>
      </text:list>
      <text:p text:style-name="P10"><text:span text:style-name="Source_20_Text">Page number</text:span></text:p>
      <text:p text:style-name="P10"><text:span text:style-name="Source_20_Text">Character count</text:span></text:p>
      <text:p text:style-name="P11"><text:span text:style-name="Source_20_Text">First 100 characters</text:span></text:p>
      <text:p text:style-name="P12"/>
      <text:h text:style-name="P4" text:outline-level="2">Exercise 3: PDF Validation</text:h>
      <text:p text:style-name="P6">Viết function:</text:p>
      <text:p text:style-name="P11"><text:span text:style-name="Source_20_Text">validate_pdf(path)</text:span></text:p>
      <text:p text:style-name="P6">Kiểm tra:</text:p>
      <text:list text:style-name="L53">
        <text:list-item>
          <text:p text:style-name="P65">File tồn tại.</text:p>
        </text:list-item>
        <text:list-item>
          <text:p text:style-name="P65"><text:soft-page-break/>File có đọc được không.</text:p>
        </text:list-item>
        <text:list-item>
          <text:p text:style-name="P65">File có text không.</text:p>
        </text:list-item>
      </text:list>
      <text:p text:style-name="P12"/>
      <text:h text:style-name="P4" text:outline-level="2">Exercise 4: Prepare for RAG</text:h>
      <text:p text:style-name="P6">Chuyển:</text:p>
      <text:p text:style-name="P11"><text:span text:style-name="Source_20_Text">documents</text:span></text:p>
      <text:p text:style-name="P6">thành format:</text:p>
      <text:p text:style-name="P10"><text:span text:style-name="Source_20_Text">Documen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Text Splitter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Embedding</text:span></text:p>
      <text:p text:style-name="P12"/>
      <text:h text:style-name="P13" text:outline-level="1">19. Tổng kết bài học</text:h>
      <text:p text:style-name="P6">Sau bài thực hành, Intern có thể:</text:p>
      <text:h text:style-name="P4" text:outline-level="2">Knowledge</text:h>
      <text:list text:style-name="L54">
        <text:list-item>
          <text:p text:style-name="P66">Hiểu cách PyPDFLoader hoạt động.</text:p>
        </text:list-item>
        <text:list-item>
          <text:p text:style-name="P66">Hiểu Document Object.</text:p>
        </text:list-item>
        <text:list-item>
          <text:p text:style-name="P66">Hiểu metadata và page_content.</text:p>
        </text:list-item>
        <text:list-item>
          <text:p text:style-name="P66">Hiểu PDF processing trong RAG.</text:p>
        </text:list-item>
      </text:list>
      <text:h text:style-name="P4" text:outline-level="2">Coding Skills</text:h>
      <text:p text:style-name="P6">Có thể:</text:p>
      <text:list text:style-name="L55">
        <text:list-item>
          <text:p text:style-name="P67">Load PDF bằng LangChain.</text:p>
        </text:list-item>
        <text:list-item>
          <text:p text:style-name="P67">Xử lý PDF nhiều trang.</text:p>
        </text:list-item>
        <text:list-item>
          <text:p text:style-name="P67">Extract text.</text:p>
        </text:list-item>
        <text:list-item>
          <text:p text:style-name="P67">Debug lỗi PDF.</text:p>
        </text:list-item>
      </text:list>
      <text:h text:style-name="P4" text:outline-level="2"><text:soft-page-break/>Next Step</text:h>
      <text:p text:style-name="P6">Bài tiếp theo:</text:p>
      <text:p text:style-name="P10"><text:span text:style-name="Source_20_Text">Text Splitting &amp; Chunking Strategies</text:span></text:p>
      <text:p text:style-name="P10"/>
      <text:p text:style-name="P10"><text:span text:style-name="Source_20_Text">Documen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Chunk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Vector Database</text:span></text:p>
      <text:p text:style-name="P1"/>
      <text:h text:style-name="Heading_20_1" text:outline-level="1">5. <text:span text:style-name="T4">Word Loader Practice</text:span></text:h>
      <text:p text:style-name="P1"/>
      <text:h text:style-name="P3" text:outline-level="1">Giáo trình thực hành: Load and Process Word Document using LangChain</text:h>
      <text:h text:style-name="P4" text:outline-level="2">1. Mục tiêu bài học</text:h>
      <text:p text:style-name="P6">Sau khi hoàn thành bài thực hành, AI Engineer Intern có thể:</text:p>
      <text:list text:style-name="L56">
        <text:list-item>
          <text:p text:style-name="P68">Hiểu cấu trúc file Microsoft Word (<text:span text:style-name="Source_20_Text">.docx</text:span>).</text:p>
        </text:list-item>
        <text:list-item>
          <text:p text:style-name="P68">Hiểu cách LangChain xử lý DOCX thông qua <text:span text:style-name="Source_20_Text">Docx2txtLoader</text:span>.</text:p>
        </text:list-item>
        <text:list-item>
          <text:p text:style-name="P68">Load nội dung Word document thành LangChain <text:span text:style-name="Source_20_Text">Document Object</text:span>.</text:p>
        </text:list-item>
        <text:list-item>
          <text:p text:style-name="P68">Kiểm tra:</text:p>
          <text:list>
            <text:list-item>
              <text:p text:style-name="P68"><text:span text:style-name="Source_20_Text">page_content</text:span></text:p>
            </text:list-item>
            <text:list-item>
              <text:p text:style-name="P68"><text:span text:style-name="Source_20_Text">metadata</text:span></text:p>
            </text:list-item>
            <text:list-item>
              <text:p text:style-name="P68">document structure</text:p>
            </text:list-item>
          </text:list>
        </text:list-item>
        <text:list-item>
          <text:p text:style-name="P68">So sánh dữ liệu sau khi load từ PDF và DOCX.</text:p>
        </text:list-item>
        <text:list-item>
          <text:p text:style-name="P68">Xử lý các lỗi thường gặp khi đọc Word document.</text:p>
        </text:list-item>
      </text:list>
      <text:p text:style-name="P12"/>
      <text:h text:style-name="P13" text:outline-level="1"><text:soft-page-break/>2. Tổng quan DOCX Structure</text:h>
      <text:h text:style-name="P4" text:outline-level="2">2.1. DOCX là gì?</text:h>
      <text:p text:style-name="P6">DOCX là định dạng tài liệu của Microsoft Word được xây dựng dựa trên chuẩn <text:span text:style-name="Strong_20_Emphasis">Office Open XML</text:span>.</text:p>
      <text:p text:style-name="P6">Bên trong một file <text:span text:style-name="Source_20_Text">.docx</text:span> thực chất là một file ZIP chứa nhiều thành phần:</text:p>
      <text:p text:style-name="P10"><text:span text:style-name="Source_20_Text">report.docx</text:span></text:p>
      <text:p text:style-name="P10"/>
      <text:p text:style-name="P10"><text:span text:style-name="Source_20_Text">├── word/</text:span></text:p>
      <text:p text:style-name="P10"><text:span text:style-name="Source_20_Text">│ <text:s text:c="2"/>├── document.xml</text:span></text:p>
      <text:p text:style-name="P10"><text:span text:style-name="Source_20_Text">│ <text:s text:c="2"/>├── styles.xml</text:span></text:p>
      <text:p text:style-name="P10"><text:span text:style-name="Source_20_Text">│ <text:s text:c="2"/>├── numbering.xml</text:span></text:p>
      <text:p text:style-name="P10"><text:span text:style-name="Source_20_Text">│</text:span></text:p>
      <text:p text:style-name="P10"><text:span text:style-name="Source_20_Text">├── media/</text:span></text:p>
      <text:p text:style-name="P10"><text:span text:style-name="Source_20_Text">│ <text:s text:c="2"/>├── image1.png</text:span></text:p>
      <text:p text:style-name="P10"><text:span text:style-name="Source_20_Text">│</text:span></text:p>
      <text:p text:style-name="P10"><text:span text:style-name="Source_20_Text">├── _rels/</text:span></text:p>
      <text:p text:style-name="P10"><text:span text:style-name="Source_20_Text">│</text:span></text:p>
      <text:p text:style-name="P11"><text:span text:style-name="Source_20_Text">└── metadata</text:span></text:p>
      <text:p text:style-name="P6">Trong đó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hành phần</text:p>
            </table:table-cell>
            <table:table-cell table:style-name="Table5.A1" office:value-type="string">
              <text:p text:style-name="Table_20_Heading">Vai trò</text:p>
            </table:table-cell>
          </table:table-row>
        </table:table-header-rows>
        <table:table-row>
          <table:table-cell table:style-name="Table5.A1" office:value-type="string">
            <text:p text:style-name="Table_20_Contents">document.xml</text:p>
          </table:table-cell>
          <table:table-cell table:style-name="Table5.A1" office:value-type="string">
            <text:p text:style-name="Table_20_Contents">Nội dung text chính</text:p>
          </table:table-cell>
        </table:table-row>
        <table:table-row>
          <table:table-cell table:style-name="Table5.A1" office:value-type="string">
            <text:p text:style-name="Table_20_Contents">styles.xml</text:p>
          </table:table-cell>
          <table:table-cell table:style-name="Table5.A1" office:value-type="string">
            <text:p text:style-name="Table_20_Contents">Font, heading, style</text:p>
          </table:table-cell>
        </table:table-row>
        <table:table-row>
          <table:table-cell table:style-name="Table5.A1" office:value-type="string">
            <text:p text:style-name="Table_20_Contents">numbering.xml</text:p>
          </table:table-cell>
          <table:table-cell table:style-name="Table5.A1" office:value-type="string">
            <text:p text:style-name="Table_20_Contents">Danh sách bullet, numbering</text:p>
          </table:table-cell>
        </table:table-row>
        <table:table-row>
          <table:table-cell table:style-name="Table5.A1" office:value-type="string">
            <text:p text:style-name="Table_20_Contents">media</text:p>
          </table:table-cell>
          <table:table-cell table:style-name="Table5.A1" office:value-type="string">
            <text:p text:style-name="Table_20_Contents">Hình ảnh</text:p>
          </table:table-cell>
        </table:table-row>
        <table:table-row>
          <table:table-cell table:style-name="Table5.A1" office:value-type="string">
            <text:p text:style-name="Table_20_Contents">metadata</text:p>
          </table:table-cell>
          <table:table-cell table:style-name="Table5.A1" office:value-type="string">
            <text:p text:style-name="Table_20_Contents">Author, created date</text:p>
          </table:table-cell>
        </table:table-row>
      </table:table>
      <text:p text:style-name="P12"/>
      <text:h text:style-name="P13" text:outline-level="1">2.2. DOCX trong RAG Pipeline</text:h>
      <text:p text:style-name="P6">Trong hệ thống RAG:</text:p>
      <text:p text:style-name="P10"><text:span text:style-name="Source_20_Text">DOCX File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Docx2txtLoader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Document Object</text:span></text:p>
      <text:p text:style-name="P10"/>
      <text:p text:style-name="P10"><text:span text:style-name="Source_20_Text"><text:s text:c="4"/>↓</text:span></text:p>
      <text:p text:style-name="P10"/>
      <text:p text:style-name="P10"><text:span text:style-name="Source_20_Text">Text Splitter</text:span></text:p>
      <text:p text:style-name="P10"><text:soft-page-break/></text:p>
      <text:p text:style-name="P10"><text:span text:style-name="Source_20_Text"><text:s text:c="4"/>↓</text:span></text:p>
      <text:p text:style-name="P10"/>
      <text:p text:style-name="P10"><text:span text:style-name="Source_20_Text">Embedding</text:span></text:p>
      <text:p text:style-name="P10"/>
      <text:p text:style-name="P10"><text:span text:style-name="Source_20_Text"><text:s text:c="4"/>↓</text:span></text:p>
      <text:p text:style-name="P10"/>
      <text:p text:style-name="P11"><text:span text:style-name="Source_20_Text">Vector Database</text:span></text:p>
      <text:p text:style-name="P12"/>
      <text:h text:style-name="P13" text:outline-level="1">3. Docx2txtLoader trong LangChain</text:h>
      <text:h text:style-name="P4" text:outline-level="2">3.1. Docx2txtLoader là gì?</text:h>
      <text:p text:style-name="P6"><text:span text:style-name="Source_20_Text">Docx2txtLoader</text:span> là Document Loader của LangChain dùng để extract text từ file Word (<text:span text:style-name="Source_20_Text">.docx</text:span>).</text:p>
      <text:p text:style-name="P6">Nó sử dụng thư viện:</text:p>
      <text:p text:style-name="P11"><text:span text:style-name="Source_20_Text">docx2txt</text:span></text:p>
      <text:p text:style-name="P6">Input:</text:p>
      <text:p text:style-name="P11"><text:span text:style-name="Source_20_Text">company_policy.docx</text:span></text:p>
      <text:p text:style-name="P6">Output:</text:p>
      <text:p text:style-name="P10"><text:span text:style-name="Source_20_Text">Document(</text:span></text:p>
      <text:p text:style-name="P10"><text:span text:style-name="Source_20_Text"><text:s text:c="4"/>page_content="Company policy content...",</text:span></text:p>
      <text:p text:style-name="P10"><text:span text:style-name="Source_20_Text"><text:s text:c="4"/></text:span></text:p>
      <text:p text:style-name="P10"><text:span text:style-name="Source_20_Text"><text:s text:c="4"/>metadata={</text:span></text:p>
      <text:p text:style-name="P10"><text:span text:style-name="Source_20_Text"><text:s text:c="8"/>"source":"company_policy.docx"</text:span></text:p>
      <text:p text:style-name="P10"><text:span text:style-name="Source_20_Text"><text:s text:c="4"/>}</text:span></text:p>
      <text:p text:style-name="P11"><text:span text:style-name="Source_20_Text">)</text:span></text:p>
      <text:p text:style-name="P12"/>
      <text:h text:style-name="P13" text:outline-level="1">3.2. Khi nào sử dụng Docx2txtLoader?</text:h>
      <text:p text:style-name="P6">Phù hợp:</text:p>
      <text:list text:style-name="L57">
        <text:list-item>
          <text:p text:style-name="P69">Company documents</text:p>
        </text:list-item>
        <text:list-item>
          <text:p text:style-name="P69">HR policies</text:p>
        </text:list-item>
        <text:list-item>
          <text:p text:style-name="P69">Technical documentation</text:p>
        </text:list-item>
        <text:list-item>
          <text:p text:style-name="P69">Reports</text:p>
        </text:list-item>
        <text:list-item>
          <text:p text:style-name="P69">Proposal</text:p>
        </text:list-item>
        <text:list-item>
          <text:p text:style-name="P69"><text:soft-page-break/>Meeting notes</text:p>
        </text:list-item>
      </text:list>
      <text:p text:style-name="P6">Ví dụ:</text:p>
      <text:p text:style-name="P10"><text:span text:style-name="Source_20_Text">Company Knowledge Base</text:span></text:p>
      <text:p text:style-name="P10"/>
      <text:p text:style-name="P10"><text:span text:style-name="Source_20_Text">├── HR_policy.docx</text:span></text:p>
      <text:p text:style-name="P10"><text:span text:style-name="Source_20_Text">├── Security_policy.docx</text:span></text:p>
      <text:p text:style-name="P11"><text:span text:style-name="Source_20_Text">└── Engineering_guideline.docx</text:span></text:p>
      <text:p text:style-name="P12"/>
      <text:h text:style-name="P13" text:outline-level="1">3.3. Limitations của Docx2txtLoader</text:h>
      <text:h text:style-name="P4" text:outline-level="2">1. Không giữ nguyên formatting</text:h>
      <text:p text:style-name="P6">Word:</text:p>
      <text:p text:style-name="P10"><text:span text:style-name="Source_20_Text">Heading 1</text:span></text:p>
      <text:p text:style-name="P10"/>
      <text:p text:style-name="P10"><text:span text:style-name="Source_20_Text">Introduction</text:span></text:p>
      <text:p text:style-name="P10"/>
      <text:p text:style-name="P10"><text:span text:style-name="Source_20_Text">- Point A</text:span></text:p>
      <text:p text:style-name="P11"><text:span text:style-name="Source_20_Text">- Point B</text:span></text:p>
      <text:p text:style-name="P6">Sau extract:</text:p>
      <text:p text:style-name="P10"><text:span text:style-name="Source_20_Text">Heading 1</text:span></text:p>
      <text:p text:style-name="P10"/>
      <text:p text:style-name="P10"><text:span text:style-name="Source_20_Text">Introduction</text:span></text:p>
      <text:p text:style-name="P10"/>
      <text:p text:style-name="P10"><text:span text:style-name="Source_20_Text">Point A</text:span></text:p>
      <text:p text:style-name="P11"><text:span text:style-name="Source_20_Text">Point B</text:span></text:p>
      <text:p text:style-name="P6">Thông tin về:</text:p>
      <text:list text:style-name="L58">
        <text:list-item>
          <text:p text:style-name="P70">Font size</text:p>
        </text:list-item>
        <text:list-item>
          <text:p text:style-name="P70">Color</text:p>
        </text:list-item>
        <text:list-item>
          <text:p text:style-name="P70">Heading style</text:p>
        </text:list-item>
      </text:list>
      <text:p text:style-name="P6">có thể mất.</text:p>
      <text:p text:style-name="P12"/>
      <text:h text:style-name="P4" text:outline-level="2">2. Xử lý bảng hạn chế</text:h>
      <text:p text:style-name="P6">Ví dụ:</text:p>
      <text:p text:style-name="P6">Word Table:</text:p>
      <table:table table:name="Table6" table:style-name="Table6">
        <table:table-column table:style-name="Table6.A"/>
        <table:table-column table:style-name="Table6.B"/>
        <table:table-header-rows>
          <text:soft-page-break/>
          <table:table-row>
            <table:table-cell table:style-name="Table6.A1" office:value-type="string">
              <text:p text:style-name="Table_20_Heading">Name</text:p>
            </table:table-cell>
            <table:table-cell table:style-name="Table6.A1" office:value-type="string">
              <text:p text:style-name="Table_20_Heading">Role</text:p>
            </table:table-cell>
          </table:table-row>
        </table:table-header-rows>
        <table:table-row>
          <table:table-cell table:style-name="Table6.A1" office:value-type="string">
            <text:p text:style-name="Table_20_Contents">John</text:p>
          </table:table-cell>
          <table:table-cell table:style-name="Table6.A1" office:value-type="string">
            <text:p text:style-name="Table_20_Contents">Developer</text:p>
          </table:table-cell>
        </table:table-row>
      </table:table>
      <text:p text:style-name="P6">Có thể thành:</text:p>
      <text:p text:style-name="P11"><text:span text:style-name="Source_20_Text">Name Role John Developer</text:span></text:p>
      <text:p text:style-name="P6">Không giữ được cấu trúc bảng.</text:p>
      <text:p text:style-name="P12"/>
      <text:h text:style-name="P4" text:outline-level="2">3. Không xử lý tốt hình ảnh</text:h>
      <text:p text:style-name="P6">DOCX:</text:p>
      <text:p text:style-name="P10"><text:span text:style-name="Source_20_Text">Text</text:span></text:p>
      <text:p text:style-name="P10"/>
      <text:p text:style-name="P10"><text:span text:style-name="Source_20_Text">Image</text:span></text:p>
      <text:p text:style-name="P10"/>
      <text:p text:style-name="P11"><text:span text:style-name="Source_20_Text">Text</text:span></text:p>
      <text:p text:style-name="P6">Loader chủ yếu lấy text.</text:p>
      <text:p text:style-name="P6">Nếu cần xử lý image:</text:p>
      <text:list text:style-name="L59">
        <text:list-item>
          <text:p text:style-name="P71">OCR</text:p>
        </text:list-item>
        <text:list-item>
          <text:p text:style-name="P71">Multimodal Model</text:p>
        </text:list-item>
      </text:list>
      <text:p text:style-name="P12"/>
      <text:h text:style-name="P13" text:outline-level="1">4. Chuẩn bị môi trường</text:h>
      <text:h text:style-name="P4" text:outline-level="2">4.1. Project Structure</text:h>
      <text:p text:style-name="P10"><text:span text:style-name="Source_20_Text">word_loader_project/</text:span></text:p>
      <text:p text:style-name="P10"/>
      <text:p text:style-name="P10"><text:span text:style-name="Source_20_Text">├── data/</text:span></text:p>
      <text:p text:style-name="P10"/>
      <text:p text:style-name="P10"><text:span text:style-name="Source_20_Text">│ <text:s text:c="2"/>├── sample.docx</text:span></text:p>
      <text:p text:style-name="P10"><text:span text:style-name="Source_20_Text">│ <text:s text:c="2"/>└── complex_document.docx</text:span></text:p>
      <text:p text:style-name="P10"/>
      <text:p text:style-name="P10"><text:span text:style-name="Source_20_Text">├── main.py</text:span></text:p>
      <text:p text:style-name="P10"/>
      <text:p text:style-name="P11"><text:span text:style-name="Source_20_Text">└── requirements.txt</text:span></text:p>
      <text:p text:style-name="P12"/>
      <text:h text:style-name="P13" text:outline-level="1">4.2. requirements.txt</text:h>
      <text:p text:style-name="P10"><text:span text:style-name="Source_20_Text">langchain</text:span></text:p>
      <text:p text:style-name="P10"><text:span text:style-name="Source_20_Text">langchain-community</text:span></text:p>
      <text:p text:style-name="P11"><text:soft-page-break/><text:span text:style-name="Source_20_Text">docx2txt</text:span></text:p>
      <text:p text:style-name="P12"/>
      <text:p text:style-name="P6">Cài đặt:</text:p>
      <text:p text:style-name="P11"><text:span text:style-name="Source_20_Text">pip install -r requirements.txt</text:span></text:p>
      <text:p text:style-name="P12"/>
      <text:h text:style-name="P13" text:outline-level="1">5. Load DOCX cơ bản</text:h>
      <text:h text:style-name="P4" text:outline-level="2">5.1. Import</text:h>
      <text:p text:style-name="P11"><text:span text:style-name="Source_20_Text">from langchain_community.document_loaders import Docx2txtLoader</text:span></text:p>
      <text:p text:style-name="P12"/>
      <text:h text:style-name="P13" text:outline-level="1">5.2. Khởi tạo Loader</text:h>
      <text:p text:style-name="P10"><text:span text:style-name="Source_20_Text">loader = Docx2txtLoader(</text:span></text:p>
      <text:p text:style-name="P10"><text:span text:style-name="Source_20_Text"><text:s text:c="4"/>"data/sample.docx"</text:span></text:p>
      <text:p text:style-name="P11"><text:span text:style-name="Source_20_Text">)</text:span></text:p>
      <text:p text:style-name="P6">Giải thích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hành phần</text:p>
            </table:table-cell>
            <table:table-cell table:style-name="Table7.A1" office:value-type="string">
              <text:p text:style-name="Table_20_Heading">Ý nghĩa</text:p>
            </table:table-cell>
          </table:table-row>
        </table:table-header-rows>
        <table:table-row>
          <table:table-cell table:style-name="Table7.A1" office:value-type="string">
            <text:p text:style-name="Table_20_Contents">Docx2txtLoader</text:p>
          </table:table-cell>
          <table:table-cell table:style-name="Table7.A1" office:value-type="string">
            <text:p text:style-name="Table_20_Contents">Loader xử lý DOCX</text:p>
          </table:table-cell>
        </table:table-row>
        <table:table-row>
          <table:table-cell table:style-name="Table7.A1" office:value-type="string">
            <text:p text:style-name="Table_20_Contents">path</text:p>
          </table:table-cell>
          <table:table-cell table:style-name="Table7.A1" office:value-type="string">
            <text:p text:style-name="Table_20_Contents">File Word cần đọc</text:p>
          </table:table-cell>
        </table:table-row>
      </table:table>
      <text:p text:style-name="P12"/>
      <text:h text:style-name="P13" text:outline-level="1">5.3. Load Document</text:h>
      <text:p text:style-name="P11"><text:span text:style-name="Source_20_Text">documents = loader.load()</text:span></text:p>
      <text:p text:style-name="P6">Output:</text:p>
      <text:p text:style-name="P10"><text:span text:style-name="Source_20_Text">[</text:span></text:p>
      <text:p text:style-name="P10"><text:span text:style-name="Source_20_Text"><text:s text:c="4"/>Document(...)</text:span></text:p>
      <text:p text:style-name="P11"><text:span text:style-name="Source_20_Text">]</text:span></text:p>
      <text:p text:style-name="P12"/>
      <text:h text:style-name="P13" text:outline-level="1">6. Source Code hoàn chỉnh</text:h>
      <text:p text:style-name="P6">File:</text:p>
      <text:p text:style-name="P11"><text:span text:style-name="Source_20_Text">main.py</text:span></text:p>
      <text:p text:style-name="P6"><text:soft-page-break/>Code:</text:p>
      <text:p text:style-name="P10"><text:span text:style-name="Source_20_Text">from langchain_community.document_loaders import Docx2txtLoader</text:span></text:p>
      <text:p text:style-name="P10"/>
      <text:p text:style-name="P10"/>
      <text:p text:style-name="P10"><text:span text:style-name="Source_20_Text">file_path = "data/sample.docx"</text:span></text:p>
      <text:p text:style-name="P10"/>
      <text:p text:style-name="P10"/>
      <text:p text:style-name="P10"><text:span text:style-name="Source_20_Text">loader = Docx2txtLoader(</text:span></text:p>
      <text:p text:style-name="P10"><text:span text:style-name="Source_20_Text"><text:s text:c="4"/>file_path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"Number of documents:",</text:span></text:p>
      <text:p text:style-name="P10"><text:span text:style-name="Source_20_Text"><text:s text:c="4"/>len(documents)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for index, doc in enumerate(documents):</text:span></text:p>
      <text:p text:style-name="P10"/>
      <text:p text:style-name="P10"><text:span text:style-name="Source_20_Text"><text:s text:c="4"/>print("======================"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Document:",</text:span></text:p>
      <text:p text:style-name="P10"><text:span text:style-name="Source_20_Text"><text:s text:c="8"/>index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print(</text:span></text:p>
      <text:p text:style-name="P10"><text:span text:style-name="Source_20_Text"><text:s text:c="8"/>"Metadata:"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metadata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print(</text:span></text:p>
      <text:p text:style-name="P10"><text:span text:style-name="Source_20_Text"><text:s text:c="8"/>"Content:"</text:span></text:p>
      <text:p text:style-name="P10"><text:span text:style-name="Source_20_Text"><text:s text:c="4"/>)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doc.page_content[:500]</text:span></text:p>
      <text:p text:style-name="P11"><text:span text:style-name="Source_20_Text"><text:s text:c="4"/>)</text:span></text:p>
      <text:p text:style-name="P12"><text:soft-page-break/></text:p>
      <text:h text:style-name="P13" text:outline-level="1">7. Expected Output</text:h>
      <text:p text:style-name="P6">Ví dụ file:</text:p>
      <text:p text:style-name="P11"><text:span text:style-name="Source_20_Text">sample.docx</text:span></text:p>
      <text:p text:style-name="P6">Nội dung:</text:p>
      <text:p text:style-name="P10"><text:span text:style-name="Source_20_Text">Introduction to AI Engineering</text:span></text:p>
      <text:p text:style-name="P10"/>
      <text:p text:style-name="P11"><text:span text:style-name="Source_20_Text">LangChain is a framework for building LLM applications.</text:span></text:p>
      <text:p text:style-name="P6">Output:</text:p>
      <text:p text:style-name="P10"><text:span text:style-name="Source_20_Text">Number of documents: 1</text:span></text:p>
      <text:p text:style-name="P10"/>
      <text:p text:style-name="P10"/>
      <text:p text:style-name="P10"><text:span text:style-name="Source_20_Text">======================</text:span></text:p>
      <text:p text:style-name="P10"/>
      <text:p text:style-name="P10"><text:span text:style-name="Source_20_Text">Document: 0</text:span></text:p>
      <text:p text:style-name="P10"/>
      <text:p text:style-name="P10"/>
      <text:p text:style-name="P10"><text:span text:style-name="Source_20_Text">Metadata:</text:span></text:p>
      <text:p text:style-name="P10"/>
      <text:p text:style-name="P10"><text:span text:style-name="Source_20_Text">{</text:span></text:p>
      <text:p text:style-name="P10"><text:span text:style-name="Source_20_Text">'source':</text:span></text:p>
      <text:p text:style-name="P10"><text:span text:style-name="Source_20_Text">'data/sample.docx'</text:span></text:p>
      <text:p text:style-name="P10"><text:span text:style-name="Source_20_Text">}</text:span></text:p>
      <text:p text:style-name="P10"/>
      <text:p text:style-name="P10"/>
      <text:p text:style-name="P10"><text:span text:style-name="Source_20_Text">Content:</text:span></text:p>
      <text:p text:style-name="P10"/>
      <text:p text:style-name="P10"><text:span text:style-name="Source_20_Text">Introduction to AI Engineering</text:span></text:p>
      <text:p text:style-name="P10"/>
      <text:p text:style-name="P11"><text:span text:style-name="Source_20_Text">LangChain is a framework for building LLM applications.</text:span></text:p>
      <text:p text:style-name="P12"/>
      <text:h text:style-name="P13" text:outline-level="1">8. Phân tích Document Object</text:h>
      <text:p text:style-name="P6">Output thực tế:</text:p>
      <text:p text:style-name="P10"><text:span text:style-name="Source_20_Text">Document(</text:span></text:p>
      <text:p text:style-name="P10"><text:span text:style-name="Source_20_Text"><text:s text:c="4"/>page_content=</text:span></text:p>
      <text:p text:style-name="P10"><text:span text:style-name="Source_20_Text"><text:s text:c="4"/>"""</text:span></text:p>
      <text:p text:style-name="P10"><text:span text:style-name="Source_20_Text"><text:s text:c="4"/>Introduction to AI Engineering</text:span></text:p>
      <text:p text:style-name="P10"/>
      <text:p text:style-name="P10"><text:span text:style-name="Source_20_Text"><text:s text:c="4"/>LangChain is a framework...</text:span></text:p>
      <text:p text:style-name="P10"><text:soft-page-break/><text:span text:style-name="Source_20_Text"><text:s text:c="4"/>""",</text:span></text:p>
      <text:p text:style-name="P10"/>
      <text:p text:style-name="P10"><text:span text:style-name="Source_20_Text"><text:s text:c="4"/>metadata={</text:span></text:p>
      <text:p text:style-name="P10"><text:span text:style-name="Source_20_Text"><text:s text:c="8"/>"source":</text:span></text:p>
      <text:p text:style-name="P10"><text:span text:style-name="Source_20_Text"><text:s text:c="8"/>"data/sample.docx"</text:span></text:p>
      <text:p text:style-name="P10"><text:span text:style-name="Source_20_Text"><text:s text:c="4"/>}</text:span></text:p>
      <text:p text:style-name="P11"><text:span text:style-name="Source_20_Text">)</text:span></text:p>
      <text:p text:style-name="P12"/>
      <text:h text:style-name="P13" text:outline-level="1">9. Kiểm tra page_content</text:h>
      <text:h text:style-name="P4" text:outline-level="2">Lấy toàn bộ text</text:h>
      <text:p text:style-name="P10"><text:span text:style-name="Source_20_Text">text = documents[0].page_content</text:span></text:p>
      <text:p text:style-name="P10"/>
      <text:p text:style-name="P11"><text:span text:style-name="Source_20_Text">print(text)</text:span></text:p>
      <text:p text:style-name="P12"/>
      <text:h text:style-name="P4" text:outline-level="2">Đếm ký tự</text:h>
      <text:p text:style-name="P10"><text:span text:style-name="Source_20_Text">length = len(</text:span></text:p>
      <text:p text:style-name="P10"><text:span text:style-name="Source_20_Text"><text:s text:c="4"/>documents[0].page_content</text:span></text:p>
      <text:p text:style-name="P10"><text:span text:style-name="Source_20_Text">)</text:span></text:p>
      <text:p text:style-name="P10"/>
      <text:p text:style-name="P10"/>
      <text:p text:style-name="P11"><text:span text:style-name="Source_20_Text">print(length)</text:span></text:p>
      <text:p text:style-name="P6">Output:</text:p>
      <text:p text:style-name="P11"><text:span text:style-name="Source_20_Text">3560</text:span></text:p>
      <text:p text:style-name="P12"/>
      <text:h text:style-name="P4" text:outline-level="2">Tìm keyword</text:h>
      <text:p text:style-name="P6">Ví dụ:</text:p>
      <text:p text:style-name="P10"><text:span text:style-name="Source_20_Text">content = documents[0].page_content</text:span></text:p>
      <text:p text:style-name="P10"/>
      <text:p text:style-name="P10"/>
      <text:p text:style-name="P10"><text:span text:style-name="Source_20_Text">if "LangChain" in content: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Keyword found"</text:span></text:p>
      <text:p text:style-name="P11"><text:span text:style-name="Source_20_Text"><text:s text:c="4"/>)</text:span></text:p>
      <text:p text:style-name="P6">Output:</text:p>
      <text:p text:style-name="P11"><text:soft-page-break/><text:span text:style-name="Source_20_Text">Keyword found</text:span></text:p>
      <text:p text:style-name="P12"/>
      <text:h text:style-name="P13" text:outline-level="1">10. Xử lý Metadata</text:h>
      <text:h text:style-name="P4" text:outline-level="2">Lấy source</text:h>
      <text:p text:style-name="P10"><text:span text:style-name="Source_20_Text">source = documents[0].metadata["source"]</text:span></text:p>
      <text:p text:style-name="P10"/>
      <text:p text:style-name="P11"><text:span text:style-name="Source_20_Text">print(source)</text:span></text:p>
      <text:p text:style-name="P6">Output:</text:p>
      <text:p text:style-name="P11"><text:span text:style-name="Source_20_Text">data/sample.docx</text:span></text:p>
      <text:p text:style-name="P12"/>
      <text:h text:style-name="P4" text:outline-level="2">Thêm metadata custom</text:h>
      <text:p text:style-name="P6">Ban đầu:</text:p>
      <text:p text:style-name="P11"><text:span text:style-name="Source_20_Text">doc.metadata</text:span></text:p>
      <text:p text:style-name="P6">Output:</text:p>
      <text:p text:style-name="P10"><text:span text:style-name="Source_20_Text">{</text:span></text:p>
      <text:p text:style-name="P10"><text:span text:style-name="Source_20_Text">"source":"sample.docx"</text:span></text:p>
      <text:p text:style-name="P11"><text:span text:style-name="Source_20_Text">}</text:span></text:p>
      <text:p text:style-name="P6">Thêm:</text:p>
      <text:p text:style-name="P10"><text:span text:style-name="Source_20_Text">doc.metadata.update(</text:span></text:p>
      <text:p text:style-name="P10"><text:span text:style-name="Source_20_Text"><text:s text:c="4"/>{</text:span></text:p>
      <text:p text:style-name="P10"><text:span text:style-name="Source_20_Text"><text:s text:c="8"/>"department":"Engineering",</text:span></text:p>
      <text:p text:style-name="P10"><text:span text:style-name="Source_20_Text"><text:s text:c="8"/>"document_type":"policy"</text:span></text:p>
      <text:p text:style-name="P10"><text:span text:style-name="Source_20_Text"><text:s text:c="4"/>}</text:span></text:p>
      <text:p text:style-name="P11"><text:span text:style-name="Source_20_Text">)</text:span></text:p>
      <text:p text:style-name="P6">Kết quả:</text:p>
      <text:p text:style-name="P10"><text:span text:style-name="Source_20_Text">{</text:span></text:p>
      <text:p text:style-name="P10"><text:span text:style-name="Source_20_Text">"source":"sample.docx",</text:span></text:p>
      <text:p text:style-name="P10"><text:span text:style-name="Source_20_Text">"department":"Engineering",</text:span></text:p>
      <text:p text:style-name="P10"><text:span text:style-name="Source_20_Text">"document_type":"policy"</text:span></text:p>
      <text:p text:style-name="P11"><text:span text:style-name="Source_20_Text">}</text:span></text:p>
      <text:p text:style-name="P12"/>
      <text:h text:style-name="P13" text:outline-level="1"><text:soft-page-break/>11. Load DOCX nhiều nội dung</text:h>
      <text:p text:style-name="P6">Ví dụ:</text:p>
      <text:p text:style-name="P10"><text:span text:style-name="Source_20_Text">technical_report.docx</text:span></text:p>
      <text:p text:style-name="P10"/>
      <text:p text:style-name="P10"/>
      <text:p text:style-name="P10"><text:span text:style-name="Source_20_Text">Chapter 1</text:span></text:p>
      <text:p text:style-name="P10"/>
      <text:p text:style-name="P10"><text:span text:style-name="Source_20_Text">Introduction</text:span></text:p>
      <text:p text:style-name="P10"/>
      <text:p text:style-name="P10"/>
      <text:p text:style-name="P10"><text:span text:style-name="Source_20_Text">Chapter 2</text:span></text:p>
      <text:p text:style-name="P10"/>
      <text:p text:style-name="P10"><text:span text:style-name="Source_20_Text">Architecture</text:span></text:p>
      <text:p text:style-name="P10"/>
      <text:p text:style-name="P10"/>
      <text:p text:style-name="P10"><text:span text:style-name="Source_20_Text">Chapter 3</text:span></text:p>
      <text:p text:style-name="P10"/>
      <text:p text:style-name="P11"><text:span text:style-name="Source_20_Text">Implementation</text:span></text:p>
      <text:p text:style-name="P6">Code:</text:p>
      <text:p text:style-name="P10"><text:span text:style-name="Source_20_Text">loader = Docx2txtLoader(</text:span></text:p>
      <text:p text:style-name="P10"><text:span text:style-name="Source_20_Text"><text:s text:c="4"/>"data/technical_report.docx"</text:span></text:p>
      <text:p text:style-name="P10"><text:span text:style-name="Source_20_Text">)</text:span></text:p>
      <text:p text:style-name="P10"/>
      <text:p text:style-name="P10"/>
      <text:p text:style-name="P10"><text:span text:style-name="Source_20_Text">documents = loader.load()</text:span></text:p>
      <text:p text:style-name="P10"/>
      <text:p text:style-name="P10"/>
      <text:p text:style-name="P10"><text:span text:style-name="Source_20_Text">for doc in documents: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len(doc.page_content)</text:span></text:p>
      <text:p text:style-name="P11"><text:span text:style-name="Source_20_Text"><text:s text:c="4"/>)</text:span></text:p>
      <text:p text:style-name="P6">Output:</text:p>
      <text:p text:style-name="P11"><text:span text:style-name="Source_20_Text">8500</text:span></text:p>
      <text:p text:style-name="P12"/>
      <text:h text:style-name="P13" text:outline-level="1">12. So sánh PDF Loader và DOCX Loader</text:h>
      <text:h text:style-name="P4" text:outline-level="2">PDF</text:h>
      <text:p text:style-name="P6">Loader:</text:p>
      <text:p text:style-name="P11"><text:span text:style-name="Source_20_Text">PyPDFLoader</text:span></text:p>
      <text:p text:style-name="P6"><text:soft-page-break/>Output:</text:p>
      <text:p text:style-name="P10"><text:span text:style-name="Source_20_Text">[</text:span></text:p>
      <text:p text:style-name="P10"><text:span text:style-name="Source_20_Text">Document(page=0),</text:span></text:p>
      <text:p text:style-name="P10"><text:span text:style-name="Source_20_Text">Document(page=1),</text:span></text:p>
      <text:p text:style-name="P10"><text:span text:style-name="Source_20_Text">Document(page=2)</text:span></text:p>
      <text:p text:style-name="P11"><text:span text:style-name="Source_20_Text">]</text:span></text:p>
      <text:p text:style-name="P6">Mỗi page:</text:p>
      <text:p text:style-name="P11"><text:span text:style-name="Source_20_Text">1 Document</text:span></text:p>
      <text:p text:style-name="P12"/>
      <text:h text:style-name="P4" text:outline-level="2">DOCX</text:h>
      <text:p text:style-name="P6">Loader:</text:p>
      <text:p text:style-name="P11"><text:span text:style-name="Source_20_Text">Docx2txtLoader</text:span></text:p>
      <text:p text:style-name="P6">Output:</text:p>
      <text:p text:style-name="P10"><text:span text:style-name="Source_20_Text">[</text:span></text:p>
      <text:p text:style-name="P10"><text:span text:style-name="Source_20_Text">Document()</text:span></text:p>
      <text:p text:style-name="P11"><text:span text:style-name="Source_20_Text">]</text:span></text:p>
      <text:p text:style-name="P6">Thông thường:</text:p>
      <text:p text:style-name="P11"><text:span text:style-name="Source_20_Text">1 Document chứa toàn bộ text</text:span></text:p>
      <text:p text:style-name="P12"/>
      <text:h text:style-name="P13" text:outline-level="1">13. PDF vs DOCX trong RAG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Feature</text:p>
            </table:table-cell>
            <table:table-cell table:style-name="Table8.A1" office:value-type="string">
              <text:p text:style-name="Table_20_Heading">PDF</text:p>
            </table:table-cell>
            <table:table-cell table:style-name="Table8.A1" office:value-type="string">
              <text:p text:style-name="Table_20_Heading">DOCX</text:p>
            </table:table-cell>
          </table:table-row>
        </table:table-header-rows>
        <table:table-row>
          <table:table-cell table:style-name="Table8.A1" office:value-type="string">
            <text:p text:style-name="Table_20_Contents">Loader</text:p>
          </table:table-cell>
          <table:table-cell table:style-name="Table8.A1" office:value-type="string">
            <text:p text:style-name="Table_20_Contents">PyPDFLoader</text:p>
          </table:table-cell>
          <table:table-cell table:style-name="Table8.A1" office:value-type="string">
            <text:p text:style-name="Table_20_Contents">Docx2txtLoader</text:p>
          </table:table-cell>
        </table:table-row>
        <table:table-row>
          <table:table-cell table:style-name="Table8.A1" office:value-type="string">
            <text:p text:style-name="Table_20_Contents">Structure</text:p>
          </table:table-cell>
          <table:table-cell table:style-name="Table8.A1" office:value-type="string">
            <text:p text:style-name="Table_20_Contents">Page based</text:p>
          </table:table-cell>
          <table:table-cell table:style-name="Table8.A1" office:value-type="string">
            <text:p text:style-name="Table_20_Contents">Document based</text:p>
          </table:table-cell>
        </table:table-row>
        <table:table-row>
          <table:table-cell table:style-name="Table8.A1" office:value-type="string">
            <text:p text:style-name="Table_20_Contents">Metadata</text:p>
          </table:table-cell>
          <table:table-cell table:style-name="Table8.A1" office:value-type="string">
            <text:p text:style-name="Table_20_Contents">Page number</text:p>
          </table:table-cell>
          <table:table-cell table:style-name="Table8.A1" office:value-type="string">
            <text:p text:style-name="Table_20_Contents">Source</text:p>
          </table:table-cell>
        </table:table-row>
        <table:table-row>
          <table:table-cell table:style-name="Table8.A1" office:value-type="string">
            <text:p text:style-name="Table_20_Contents">Text extraction</text:p>
          </table:table-cell>
          <table:table-cell table:style-name="Table8.A1" office:value-type="string">
            <text:p text:style-name="Table_20_Contents">Medium</text:p>
          </table:table-cell>
          <table:table-cell table:style-name="Table8.A1" office:value-type="string">
            <text:p text:style-name="Table_20_Contents">Easy</text:p>
          </table:table-cell>
        </table:table-row>
        <table:table-row>
          <table:table-cell table:style-name="Table8.A1" office:value-type="string">
            <text:p text:style-name="Table_20_Contents">Layout preservation</text:p>
          </table:table-cell>
          <table:table-cell table:style-name="Table8.A1" office:value-type="string">
            <text:p text:style-name="Table_20_Contents">Limited</text:p>
          </table:table-cell>
          <table:table-cell table:style-name="Table8.A1" office:value-type="string">
            <text:p text:style-name="Table_20_Contents">Limited</text:p>
          </table:table-cell>
        </table:table-row>
        <table:table-row>
          <table:table-cell table:style-name="Table8.A1" office:value-type="string">
            <text:p text:style-name="Table_20_Contents">Best use case</text:p>
          </table:table-cell>
          <table:table-cell table:style-name="Table8.A1" office:value-type="string">
            <text:p text:style-name="Table_20_Contents">Reports, papers</text:p>
          </table:table-cell>
          <table:table-cell table:style-name="Table8.A1" office:value-type="string">
            <text:p text:style-name="Table_20_Contents">Business docs</text:p>
          </table:table-cell>
        </table:table-row>
        <table:table-row>
          <table:table-cell table:style-name="Table8.A1" office:value-type="string">
            <text:p text:style-name="Table_20_Contents">Common issue</text:p>
          </table:table-cell>
          <table:table-cell table:style-name="Table8.A1" office:value-type="string">
            <text:p text:style-name="Table_20_Contents">Scan PDF</text:p>
          </table:table-cell>
          <table:table-cell table:style-name="Table8.A1" office:value-type="string">
            <text:p text:style-name="Table_20_Contents">Lost formatting</text:p>
          </table:table-cell>
        </table:table-row>
      </table:table>
      <text:p text:style-name="P12"/>
      <text:h text:style-name="P13" text:outline-level="1">14. Ví dụ so sánh thực tế</text:h>
      <text:h text:style-name="P4" text:outline-level="2">PDF Input</text:h>
      <text:p text:style-name="P10"><text:span text:style-name="Source_20_Text">policy.pdf</text:span></text:p>
      <text:p text:style-name="P10"><text:soft-page-break/></text:p>
      <text:p text:style-name="P10"><text:span text:style-name="Source_20_Text">Page 1:</text:span></text:p>
      <text:p text:style-name="P10"><text:span text:style-name="Source_20_Text">Vacation policy</text:span></text:p>
      <text:p text:style-name="P10"/>
      <text:p text:style-name="P10"><text:span text:style-name="Source_20_Text">Page 2:</text:span></text:p>
      <text:p text:style-name="P11"><text:span text:style-name="Source_20_Text">Security policy</text:span></text:p>
      <text:p text:style-name="P6">Output:</text:p>
      <text:p text:style-name="P10"><text:span text:style-name="Source_20_Text">[</text:span></text:p>
      <text:p text:style-name="P10"><text:span text:style-name="Source_20_Text">Document(</text:span></text:p>
      <text:p text:style-name="P10"><text:span text:style-name="Source_20_Text">page=0</text:span></text:p>
      <text:p text:style-name="P10"><text:span text:style-name="Source_20_Text">),</text:span></text:p>
      <text:p text:style-name="P10"/>
      <text:p text:style-name="P10"><text:span text:style-name="Source_20_Text">Document(</text:span></text:p>
      <text:p text:style-name="P10"><text:span text:style-name="Source_20_Text">page=1</text:span></text:p>
      <text:p text:style-name="P10"><text:span text:style-name="Source_20_Text">)</text:span></text:p>
      <text:p text:style-name="P11"><text:span text:style-name="Source_20_Text">]</text:span></text:p>
      <text:p text:style-name="P12"/>
      <text:h text:style-name="P4" text:outline-level="2">DOCX Input</text:h>
      <text:p text:style-name="P10"><text:span text:style-name="Source_20_Text">policy.docx</text:span></text:p>
      <text:p text:style-name="P10"/>
      <text:p text:style-name="P10"/>
      <text:p text:style-name="P10"><text:span text:style-name="Source_20_Text">Vacation policy</text:span></text:p>
      <text:p text:style-name="P10"/>
      <text:p text:style-name="P11"><text:span text:style-name="Source_20_Text">Security policy</text:span></text:p>
      <text:p text:style-name="P6">Output:</text:p>
      <text:p text:style-name="P10"><text:span text:style-name="Source_20_Text">[</text:span></text:p>
      <text:p text:style-name="P10"><text:span text:style-name="Source_20_Text">Document()</text:span></text:p>
      <text:p text:style-name="P11"><text:span text:style-name="Source_20_Text">]</text:span></text:p>
      <text:p text:style-name="P12"/>
      <text:h text:style-name="P13" text:outline-level="1">15. Error Handling</text:h>
      <text:h text:style-name="P4" text:outline-level="2">Error 1: File không tồn tại</text:h>
      <text:p text:style-name="P6">Code:</text:p>
      <text:p text:style-name="P10"><text:span text:style-name="Source_20_Text">loader = Docx2txtLoader(</text:span></text:p>
      <text:p text:style-name="P10"><text:span text:style-name="Source_20_Text"><text:s text:c="4"/>"data/not_found.docx"</text:span></text:p>
      <text:p text:style-name="P10"><text:span text:style-name="Source_20_Text">)</text:span></text:p>
      <text:p text:style-name="P10"/>
      <text:p text:style-name="P10"/>
      <text:p text:style-name="P11"><text:span text:style-name="Source_20_Text">documents = loader.load()</text:span></text:p>
      <text:p text:style-name="P6"><text:soft-page-break/>Error:</text:p>
      <text:p text:style-name="P11"><text:span text:style-name="Source_20_Text">FileNotFoundError</text:span></text:p>
      <text:p text:style-name="P12"/>
      <text:p text:style-name="P6">Debug:</text:p>
      <text:p text:style-name="P10"><text:span text:style-name="Source_20_Text">import os</text:span></text:p>
      <text:p text:style-name="P10"/>
      <text:p text:style-name="P10"/>
      <text:p text:style-name="P10"><text:span text:style-name="Source_20_Text">path = "data/not_found.docx"</text:span></text:p>
      <text:p text:style-name="P10"/>
      <text:p text:style-name="P10"/>
      <text:p text:style-name="P10"><text:span text:style-name="Source_20_Text">print(</text:span></text:p>
      <text:p text:style-name="P10"><text:span text:style-name="Source_20_Text"><text:s text:c="4"/>os.path.exists(path)</text:span></text:p>
      <text:p text:style-name="P11"><text:span text:style-name="Source_20_Text">)</text:span></text:p>
      <text:p text:style-name="P6">Output:</text:p>
      <text:p text:style-name="P11"><text:span text:style-name="Source_20_Text">False</text:span></text:p>
      <text:p text:style-name="P12"/>
      <text:h text:style-name="P13" text:outline-level="1">Error 2: File không phải DOCX</text:h>
      <text:p text:style-name="P6">Ví dụ:</text:p>
      <text:p text:style-name="P11"><text:span text:style-name="Source_20_Text">sample.pdf</text:span></text:p>
      <text:p text:style-name="P6">đổi tên thành:</text:p>
      <text:p text:style-name="P11"><text:span text:style-name="Source_20_Text">sample.docx</text:span></text:p>
      <text:p text:style-name="P6">Error:</text:p>
      <text:p text:style-name="P11"><text:span text:style-name="Source_20_Text">BadZipFile</text:span></text:p>
      <text:p text:style-name="P6">Nguyên nhân:</text:p>
      <text:p text:style-name="P6">DOCX thực chất là ZIP archive.</text:p>
      <text:p text:style-name="P12"/>
      <text:h text:style-name="P13" text:outline-level="1">Error 3: DOCX rỗng</text:h>
      <text:p text:style-name="P6">File:</text:p>
      <text:p text:style-name="P11"><text:span text:style-name="Source_20_Text">empty.docx</text:span></text:p>
      <text:p text:style-name="P6">Output:</text:p>
      <text:p text:style-name="P10"><text:soft-page-break/><text:span text:style-name="Source_20_Text">Document(</text:span></text:p>
      <text:p text:style-name="P10"><text:span text:style-name="Source_20_Text">page_content=""</text:span></text:p>
      <text:p text:style-name="P11"><text:span text:style-name="Source_20_Text">)</text:span></text:p>
      <text:p text:style-name="P6">Kiểm tra:</text:p>
      <text:p text:style-name="P10"><text:span text:style-name="Source_20_Text">if not doc.page_content.strip():</text:span></text:p>
      <text:p text:style-name="P10"/>
      <text:p text:style-name="P10"><text:span text:style-name="Source_20_Text"><text:s text:c="4"/>print(</text:span></text:p>
      <text:p text:style-name="P10"><text:span text:style-name="Source_20_Text"><text:s text:c="8"/>"Empty document"</text:span></text:p>
      <text:p text:style-name="P11"><text:span text:style-name="Source_20_Text"><text:s text:c="4"/>)</text:span></text:p>
      <text:p text:style-name="P12"/>
      <text:h text:style-name="P13" text:outline-level="1">16. Mini Project: DOCX Analyzer</text:h>
      <text:h text:style-name="P4" text:outline-level="2">Requirement</text:h>
      <text:p text:style-name="P6">Input:</text:p>
      <text:p text:style-name="P11"><text:span text:style-name="Source_20_Text">document.docx</text:span></text:p>
      <text:p text:style-name="P6">Output:</text:p>
      <text:p text:style-name="P10"><text:span text:style-name="Source_20_Text">File:</text:span></text:p>
      <text:p text:style-name="P10"/>
      <text:p text:style-name="P10"><text:span text:style-name="Source_20_Text">document.docx</text:span></text:p>
      <text:p text:style-name="P10"/>
      <text:p text:style-name="P10"/>
      <text:p text:style-name="P10"><text:span text:style-name="Source_20_Text">Characters:</text:span></text:p>
      <text:p text:style-name="P10"/>
      <text:p text:style-name="P10"><text:span text:style-name="Source_20_Text">5000</text:span></text:p>
      <text:p text:style-name="P10"/>
      <text:p text:style-name="P10"/>
      <text:p text:style-name="P10"><text:span text:style-name="Source_20_Text">Words:</text:span></text:p>
      <text:p text:style-name="P10"/>
      <text:p text:style-name="P10"><text:span text:style-name="Source_20_Text">850</text:span></text:p>
      <text:p text:style-name="P10"/>
      <text:p text:style-name="P10"/>
      <text:p text:style-name="P10"><text:span text:style-name="Source_20_Text">Metadata:</text:span></text:p>
      <text:p text:style-name="P10"/>
      <text:p text:style-name="P10"><text:span text:style-name="Source_20_Text">{</text:span></text:p>
      <text:p text:style-name="P10"><text:span text:style-name="Source_20_Text">source:</text:span></text:p>
      <text:p text:style-name="P10"><text:span text:style-name="Source_20_Text">document.docx</text:span></text:p>
      <text:p text:style-name="P11"><text:span text:style-name="Source_20_Text">}</text:span></text:p>
      <text:p text:style-name="P12"/>
      <text:h text:style-name="P4" text:outline-level="2"><text:soft-page-break/>Complete Code</text:h>
      <text:p text:style-name="P10"><text:span text:style-name="Source_20_Text">from langchain_community.document_loaders import Docx2txtLoader</text:span></text:p>
      <text:p text:style-name="P10"/>
      <text:p text:style-name="P10"/>
      <text:p text:style-name="P10"><text:span text:style-name="Source_20_Text">def load_docx(path):</text:span></text:p>
      <text:p text:style-name="P10"/>
      <text:p text:style-name="P10"><text:span text:style-name="Source_20_Text"><text:s text:c="4"/>loader = Docx2txtLoader(path)</text:span></text:p>
      <text:p text:style-name="P10"/>
      <text:p text:style-name="P10"><text:span text:style-name="Source_20_Text"><text:s text:c="4"/>return loader.load()</text:span></text:p>
      <text:p text:style-name="P10"/>
      <text:p text:style-name="P10"/>
      <text:p text:style-name="P10"/>
      <text:p text:style-name="P10"><text:span text:style-name="Source_20_Text">def analyze_document(doc):</text:span></text:p>
      <text:p text:style-name="P10"/>
      <text:p text:style-name="P10"><text:span text:style-name="Source_20_Text"><text:s text:c="4"/>text = doc.page_content</text:span></text:p>
      <text:p text:style-name="P10"/>
      <text:p text:style-name="P10"/>
      <text:p text:style-name="P10"><text:span text:style-name="Source_20_Text"><text:s text:c="4"/>print(</text:span></text:p>
      <text:p text:style-name="P10"><text:span text:style-name="Source_20_Text"><text:s text:c="8"/>"Source:",</text:span></text:p>
      <text:p text:style-name="P10"><text:span text:style-name="Source_20_Text"><text:s text:c="8"/>doc.metadata["source"]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print(</text:span></text:p>
      <text:p text:style-name="P10"><text:span text:style-name="Source_20_Text"><text:s text:c="8"/>"Characters:",</text:span></text:p>
      <text:p text:style-name="P10"><text:span text:style-name="Source_20_Text"><text:s text:c="8"/>len(text)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print(</text:span></text:p>
      <text:p text:style-name="P10"><text:span text:style-name="Source_20_Text"><text:s text:c="8"/>"Words:",</text:span></text:p>
      <text:p text:style-name="P10"><text:span text:style-name="Source_20_Text"><text:s text:c="8"/>len(text.split())</text:span></text:p>
      <text:p text:style-name="P10"><text:span text:style-name="Source_20_Text"><text:s text:c="4"/>)</text:span></text:p>
      <text:p text:style-name="P10"/>
      <text:p text:style-name="P10"/>
      <text:p text:style-name="P10"/>
      <text:p text:style-name="P10"><text:span text:style-name="Source_20_Text">if __name__ == "__main__":</text:span></text:p>
      <text:p text:style-name="P10"/>
      <text:p text:style-name="P10"/>
      <text:p text:style-name="P10"><text:span text:style-name="Source_20_Text"><text:s text:c="4"/>docs = load_docx(</text:span></text:p>
      <text:p text:style-name="P10"><text:span text:style-name="Source_20_Text"><text:s text:c="8"/>"data/sample.docx"</text:span></text:p>
      <text:p text:style-name="P10"><text:span text:style-name="Source_20_Text"><text:s text:c="4"/>)</text:span></text:p>
      <text:p text:style-name="P10"/>
      <text:p text:style-name="P10"/>
      <text:p text:style-name="P10"><text:span text:style-name="Source_20_Text"><text:s text:c="4"/>for doc in docs:</text:span></text:p>
      <text:p text:style-name="P10"/>
      <text:p text:style-name="P11"><text:span text:style-name="Source_20_Text"><text:s text:c="8"/>analyze_document(doc)</text:span></text:p>
      <text:p text:style-name="P12"><text:soft-page-break/></text:p>
      <text:h text:style-name="P13" text:outline-level="1">17. Test Cases</text:h>
      <text:h text:style-name="P4" text:outline-level="2">Test Case 1: Basic DOCX</text:h>
      <text:p text:style-name="P6">Input:</text:p>
      <text:p text:style-name="P11"><text:span text:style-name="Source_20_Text">simple.docx</text:span></text:p>
      <text:p text:style-name="P6">Expected:</text:p>
      <text:p text:style-name="P10"><text:span text:style-name="Source_20_Text">Document count = 1</text:span></text:p>
      <text:p text:style-name="P10"/>
      <text:p text:style-name="P11"><text:span text:style-name="Source_20_Text">Content extracted successfully</text:span></text:p>
      <text:p text:style-name="P12"/>
      <text:h text:style-name="P4" text:outline-level="2">Test Case 2: DOCX nhiều đoạn</text:h>
      <text:p text:style-name="P6">Input:</text:p>
      <text:p text:style-name="P10"><text:span text:style-name="Source_20_Text">report.docx</text:span></text:p>
      <text:p text:style-name="P10"/>
      <text:p text:style-name="P11"><text:span text:style-name="Source_20_Text">10 pages</text:span></text:p>
      <text:p text:style-name="P6">Expected:</text:p>
      <text:p text:style-name="P10"><text:span text:style-name="Source_20_Text">Large text extracted</text:span></text:p>
      <text:p text:style-name="P11"><text:span text:style-name="Source_20_Text">No exception</text:span></text:p>
      <text:p text:style-name="P12"/>
      <text:h text:style-name="P4" text:outline-level="2">Test Case 3: DOCX chứa bảng</text:h>
      <text:p text:style-name="P6">Input:</text:p>
      <text:p text:style-name="P11"><text:span text:style-name="Source_20_Text">table.docx</text:span></text:p>
      <text:p text:style-name="P6">Expected:</text:p>
      <text:p text:style-name="P10"><text:span text:style-name="Source_20_Text">Text extracted</text:span></text:p>
      <text:p text:style-name="P10"/>
      <text:p text:style-name="P11"><text:span text:style-name="Source_20_Text">Table formatting may be lost</text:span></text:p>
      <text:p text:style-name="P12"/>
      <text:h text:style-name="P4" text:outline-level="2">Test Case 4: DOCX chứa hình ảnh</text:h>
      <text:p text:style-name="P6">Input:</text:p>
      <text:p text:style-name="P11"><text:soft-page-break/><text:span text:style-name="Source_20_Text">image_document.docx</text:span></text:p>
      <text:p text:style-name="P6">Expected:</text:p>
      <text:p text:style-name="P10"><text:span text:style-name="Source_20_Text">Text extracted</text:span></text:p>
      <text:p text:style-name="P10"/>
      <text:p text:style-name="P11"><text:span text:style-name="Source_20_Text">Images ignored</text:span></text:p>
      <text:p text:style-name="P12"/>
      <text:h text:style-name="P4" text:outline-level="2">Test Case 5: Empty DOCX</text:h>
      <text:p text:style-name="P6">Input:</text:p>
      <text:p text:style-name="P11"><text:span text:style-name="Source_20_Text">empty.docx</text:span></text:p>
      <text:p text:style-name="P6">Expected:</text:p>
      <text:p text:style-name="P10"><text:span text:style-name="Source_20_Text">Document loaded</text:span></text:p>
      <text:p text:style-name="P10"/>
      <text:p text:style-name="P11"><text:span text:style-name="Source_20_Text">page_content=""</text:span></text:p>
      <text:p text:style-name="P12"/>
      <text:h text:style-name="P13" text:outline-level="1">18. Bài tập thực hành</text:h>
      <text:h text:style-name="P4" text:outline-level="2">Exercise 1: DOCX Loader Basic</text:h>
      <text:p text:style-name="P6">Viết chương trình:</text:p>
      <text:list text:style-name="L60">
        <text:list-item>
          <text:p text:style-name="P72">Load DOCX.</text:p>
        </text:list-item>
        <text:list-item>
          <text:p text:style-name="P72">Print:</text:p>
          <text:list>
            <text:list-item>
              <text:p text:style-name="P72">Document count</text:p>
            </text:list-item>
            <text:list-item>
              <text:p text:style-name="P72">Metadata</text:p>
            </text:list-item>
            <text:list-item>
              <text:p text:style-name="P72">Content preview</text:p>
            </text:list-item>
          </text:list>
        </text:list-item>
      </text:list>
      <text:p text:style-name="P12"/>
      <text:h text:style-name="P4" text:outline-level="2">Exercise 2: Document Information Extractor</text:h>
      <text:p text:style-name="P6">Tạo function:</text:p>
      <text:p text:style-name="P11"><text:span text:style-name="Source_20_Text">analyze_docx(document)</text:span></text:p>
      <text:p text:style-name="P6">Output:</text:p>
      <text:p text:style-name="P10"><text:span text:style-name="Source_20_Text">Filename:</text:span></text:p>
      <text:p text:style-name="P10"/>
      <text:p text:style-name="P10"><text:span text:style-name="Source_20_Text">Character count:</text:span></text:p>
      <text:p text:style-name="P10"><text:soft-page-break/></text:p>
      <text:p text:style-name="P10"><text:span text:style-name="Source_20_Text">Word count:</text:span></text:p>
      <text:p text:style-name="P10"/>
      <text:p text:style-name="P11"><text:span text:style-name="Source_20_Text">Preview:</text:span></text:p>
      <text:p text:style-name="P12"/>
      <text:h text:style-name="P4" text:outline-level="2">Exercise 3: Compare PDF vs DOCX</text:h>
      <text:p text:style-name="P6">Chuẩn bị:</text:p>
      <text:p text:style-name="P10"><text:span text:style-name="Source_20_Text">policy.pdf</text:span></text:p>
      <text:p text:style-name="P10"/>
      <text:p text:style-name="P11"><text:span text:style-name="Source_20_Text">policy.docx</text:span></text:p>
      <text:p text:style-name="P6">So sánh:</text:p>
      <text:list text:style-name="L61">
        <text:list-item>
          <text:p text:style-name="P73">Document count</text:p>
        </text:list-item>
        <text:list-item>
          <text:p text:style-name="P73">Metadata</text:p>
        </text:list-item>
        <text:list-item>
          <text:p text:style-name="P73">Content</text:p>
        </text:list-item>
        <text:list-item>
          <text:p text:style-name="P73">Processing result</text:p>
        </text:list-item>
      </text:list>
      <text:p text:style-name="P12"/>
      <text:h text:style-name="P4" text:outline-level="2">Exercise 4: Prepare for RAG</text:h>
      <text:p text:style-name="P6">Tạo pipeline:</text:p>
      <text:p text:style-name="P10"><text:span text:style-name="Source_20_Text">DOCX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Docx2txtLoader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Document</text:span></text:p>
      <text:p text:style-name="P10"/>
      <text:p text:style-name="P10"><text:span text:style-name="Source_20_Text">↓</text:span></text:p>
      <text:p text:style-name="P10"/>
      <text:p text:style-name="P10"><text:span text:style-name="Source_20_Text">Text Splitter</text:span></text:p>
      <text:p text:style-name="P10"/>
      <text:p text:style-name="P10"><text:span text:style-name="Source_20_Text">↓</text:span></text:p>
      <text:p text:style-name="P10"/>
      <text:p text:style-name="P11"><text:span text:style-name="Source_20_Text">Embedding</text:span></text:p>
      <text:p text:style-name="P12"/>
      <text:h text:style-name="P13" text:outline-level="1"><text:soft-page-break/>19. Tổng kết bài học</text:h>
      <text:p text:style-name="P6">Sau bài học, AI Engineer Intern có thể:</text:p>
      <text:h text:style-name="P4" text:outline-level="2">Knowledge</text:h>
      <text:list text:style-name="L62">
        <text:list-item>
          <text:p text:style-name="P74">Hiểu DOCX structure.</text:p>
        </text:list-item>
        <text:list-item>
          <text:p text:style-name="P74">Hiểu cách LangChain load Word document.</text:p>
        </text:list-item>
        <text:list-item>
          <text:p text:style-name="P74">Hiểu Docx2txtLoader.</text:p>
        </text:list-item>
        <text:list-item>
          <text:p text:style-name="P74">Hiểu giới hạn của DOCX extraction.</text:p>
        </text:list-item>
      </text:list>
      <text:h text:style-name="P4" text:outline-level="2">Coding Skills</text:h>
      <text:p text:style-name="P6">Có thể:</text:p>
      <text:list text:style-name="L63">
        <text:list-item>
          <text:p text:style-name="P75">Load DOCX bằng LangChain.</text:p>
        </text:list-item>
        <text:list-item>
          <text:p text:style-name="P75">Inspect Document Object.</text:p>
        </text:list-item>
        <text:list-item>
          <text:p text:style-name="P75">Xử lý metadata.</text:p>
        </text:list-item>
        <text:list-item>
          <text:p text:style-name="P75">Extract text.</text:p>
        </text:list-item>
        <text:list-item>
          <text:p text:style-name="P75">Debug lỗi DOCX.</text:p>
        </text:list-item>
      </text:list>
      <text:h text:style-name="P4" text:outline-level="2">Chuẩn bị bài tiếp theo:</text:h>
      <text:p text:style-name="P10"><text:span text:style-name="Source_20_Text">Web Data Loading</text:span></text:p>
      <text:p text:style-name="P10"/>
      <text:p text:style-name="P10"><text:span text:style-name="Source_20_Text">DOCX</text:span></text:p>
      <text:p text:style-name="P10"/>
      <text:p text:style-name="P10"><text:span text:style-name="Source_20_Text">PDF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Document Loader</text:span></text:p>
      <text:p text:style-name="P10"/>
      <text:p text:style-name="P10"><text:span text:style-name="Source_20_Text"><text:s text:c="6"/>↓</text:span></text:p>
      <text:p text:style-name="P10"/>
      <text:p text:style-name="P10"><text:span text:style-name="Source_20_Text">Text Processing</text:span></text:p>
      <text:p text:style-name="P10"/>
      <text:p text:style-name="P10"><text:span text:style-name="Source_20_Text"><text:s text:c="6"/>↓</text:span></text:p>
      <text:p text:style-name="P10"/>
      <text:p text:style-name="P11"><text:span text:style-name="Source_20_Text">RAG Pipeline</text:span></text:p>
      <text:p text:style-name="P1"/>
      <text:p text:style-name="P1"/>
      <text:h text:style-name="Heading_20_1" text:outline-level="1"><text:soft-page-break/>6.<text:span text:style-name="T4">Web Loader Practice</text:span></text:h>
      <text:p text:style-name="P76"/>
      <text:h text:style-name="P77" text:outline-level="1">Giáo trình thực hành: Load Web Data using LangChain WebBaseLoader</text:h>
      <text:h text:style-name="P78" text:outline-level="1">1. Mục tiêu bài học</text:h>
      <text:p text:style-name="P79">Sau khi hoàn thành bài học, AI Engineer Intern có thể:</text:p>
      <text:list text:style-name="L64">
        <text:list-item>
          <text:p text:style-name="P80">Hiểu cấu trúc HTML của website.</text:p>
        </text:list-item>
        <text:list-item>
          <text:p text:style-name="P80">Hiểu cơ chế HTML parsing trong Web Scraping.</text:p>
        </text:list-item>
        <text:list-item>
          <text:p text:style-name="P80">Hiểu vai trò của BeautifulSoup.</text:p>
        </text:list-item>
        <text:list-item>
          <text:p text:style-name="P80">Sử dụng LangChain <text:span text:style-name="Source_20_Text">WebBaseLoader</text:span> để lấy dữ liệu website.</text:p>
        </text:list-item>
        <text:list-item>
          <text:p text:style-name="P80">Chuyển web content thành LangChain <text:span text:style-name="Source_20_Text">Document Object</text:span>.</text:p>
        </text:list-item>
        <text:list-item>
          <text:p text:style-name="P80">Phân tích:</text:p>
          <text:list>
            <text:list-item>
              <text:p text:style-name="P80"><text:span text:style-name="Source_20_Text">page_content</text:span></text:p>
            </text:list-item>
            <text:list-item>
              <text:p text:style-name="P80"><text:span text:style-name="Source_20_Text">metadata</text:span></text:p>
            </text:list-item>
          </text:list>
        </text:list-item>
        <text:list-item>
          <text:p text:style-name="P80">Xử lý các lỗi thường gặp:</text:p>
          <text:list>
            <text:list-item>
              <text:p text:style-name="P80">URL không hợp lệ.</text:p>
            </text:list-item>
            <text:list-item>
              <text:p text:style-name="P80">Website không truy cập được.</text:p>
            </text:list-item>
            <text:list-item>
              <text:p text:style-name="P80">Website có nội dung động.</text:p>
            </text:list-item>
            <text:list-item>
              <text:p text:style-name="P80">HTML chứa nhiều dữ liệu nhiễu.</text:p>
            </text:list-item>
          </text:list>
        </text:list-item>
      </text:list>
      <text:p text:style-name="P81"/>
      <text:h text:style-name="P78" text:outline-level="1">2. Web Data trong RAG Pipeline</text:h>
      <text:p text:style-name="P79">Trong hệ thống RAG, dữ liệu không chỉ đến từ file mà còn từ Internet.</text:p>
      <text:p text:style-name="P79">Ví dụ:</text:p>
      <text:list text:style-name="L65">
        <text:list-item>
          <text:p text:style-name="P82">Documentation</text:p>
        </text:list-item>
        <text:list-item>
          <text:p text:style-name="P82">Knowledge Base</text:p>
        </text:list-item>
        <text:list-item>
          <text:p text:style-name="P82">Blog</text:p>
        </text:list-item>
        <text:list-item>
          <text:p text:style-name="P82">Product Information</text:p>
        </text:list-item>
        <text:list-item>
          <text:p text:style-name="P82">Technical Articles</text:p>
        </text:list-item>
      </text:list>
      <text:p text:style-name="P79">Workflow:</text:p>
      <text:p text:style-name="P83"><text:span text:style-name="Source_20_Text">Website URL</text:span></text:p>
      <text:p text:style-name="P83"><text:soft-page-break/></text:p>
      <text:p text:style-name="P83"><text:span text:style-name="Source_20_Text"><text:s text:c="6"/>↓</text:span></text:p>
      <text:p text:style-name="P83"/>
      <text:p text:style-name="P83"><text:span text:style-name="Source_20_Text">WebBaseLoader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HTML Parser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Document Object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Text Splitter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Embedding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Vector Database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Retriever</text:span></text:p>
      <text:p text:style-name="P83"/>
      <text:p text:style-name="P83"><text:span text:style-name="Source_20_Text"><text:s text:c="6"/>↓</text:span></text:p>
      <text:p text:style-name="P83"/>
      <text:p text:style-name="P84"><text:span text:style-name="Source_20_Text">LLM</text:span></text:p>
      <text:p text:style-name="P81"/>
      <text:h text:style-name="P78" text:outline-level="1">3. HTML Structure cơ bản</text:h>
      <text:h text:style-name="P85" text:outline-level="2">3.1. HTML là gì?</text:h>
      <text:p text:style-name="P79">HTML (HyperText Markup Language) là ngôn ngữ dùng để mô tả cấu trúc của website.</text:p>
      <text:p text:style-name="P79">Ví dụ:</text:p>
      <text:p text:style-name="P83"><text:span text:style-name="Source_20_Text">&lt;html&gt;</text:span></text:p>
      <text:p text:style-name="P83"/>
      <text:p text:style-name="P83"><text:span text:style-name="Source_20_Text">&lt;head&gt;</text:span></text:p>
      <text:p text:style-name="P83"><text:span text:style-name="Source_20_Text"><text:s text:c="4"/>&lt;title&gt;</text:span></text:p>
      <text:p text:style-name="P83"><text:span text:style-name="Source_20_Text"><text:s text:c="8"/>LangChain Tutorial</text:span></text:p>
      <text:p text:style-name="P83"><text:span text:style-name="Source_20_Text"><text:s text:c="4"/>&lt;/title&gt;</text:span></text:p>
      <text:p text:style-name="P83"><text:soft-page-break/><text:span text:style-name="Source_20_Text">&lt;/head&gt;</text:span></text:p>
      <text:p text:style-name="P83"/>
      <text:p text:style-name="P83"/>
      <text:p text:style-name="P83"><text:span text:style-name="Source_20_Text">&lt;body&gt;</text:span></text:p>
      <text:p text:style-name="P83"/>
      <text:p text:style-name="P83"><text:span text:style-name="Source_20_Text">&lt;h1&gt;</text:span></text:p>
      <text:p text:style-name="P83"><text:span text:style-name="Source_20_Text"><text:s text:c="4"/>Introduction to LangChain</text:span></text:p>
      <text:p text:style-name="P83"><text:span text:style-name="Source_20_Text">&lt;/h1&gt;</text:span></text:p>
      <text:p text:style-name="P83"/>
      <text:p text:style-name="P83"/>
      <text:p text:style-name="P83"><text:span text:style-name="Source_20_Text">&lt;p&gt;</text:span></text:p>
      <text:p text:style-name="P83"><text:span text:style-name="Source_20_Text"><text:s text:c="4"/>LangChain is a framework for LLM applications.</text:span></text:p>
      <text:p text:style-name="P83"><text:span text:style-name="Source_20_Text">&lt;/p&gt;</text:span></text:p>
      <text:p text:style-name="P83"/>
      <text:p text:style-name="P83"/>
      <text:p text:style-name="P83"><text:span text:style-name="Source_20_Text">&lt;/body&gt;</text:span></text:p>
      <text:p text:style-name="P83"/>
      <text:p text:style-name="P84"><text:span text:style-name="Source_20_Text">&lt;/html&gt;</text:span></text:p>
      <text:p text:style-name="P81"/>
      <text:h text:style-name="P78" text:outline-level="1">3.2. Các thành phần HTML quan trọng</text:h>
      <text:h text:style-name="P85" text:outline-level="2">HTML Tag</text:h>
      <text:p text:style-name="P79">Ví dụ:</text:p>
      <text:p text:style-name="P83"><text:span text:style-name="Source_20_Text">&lt;h1&gt;</text:span></text:p>
      <text:p text:style-name="P83"><text:span text:style-name="Source_20_Text">Title</text:span></text:p>
      <text:p text:style-name="P84"><text:span text:style-name="Source_20_Text">&lt;/h1&gt;</text:span></text:p>
      <text:p text:style-name="P79">Dùng để biểu diễn:</text:p>
      <text:list text:style-name="L66">
        <text:list-item>
          <text:p text:style-name="P86">Heading</text:p>
        </text:list-item>
        <text:list-item>
          <text:p text:style-name="P86">Paragraph</text:p>
        </text:list-item>
        <text:list-item>
          <text:p text:style-name="P86">Link</text:p>
        </text:list-item>
        <text:list-item>
          <text:p text:style-name="P86">Image</text:p>
        </text:list-item>
      </text:list>
      <text:p text:style-name="P81"/>
      <text:h text:style-name="P85" text:outline-level="2">Các tag thường gặp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Tag</text:p>
            </table:table-cell>
            <table:table-cell table:style-name="Table9.A1" office:value-type="string">
              <text:p text:style-name="Table_20_Heading">Ý nghĩa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&lt;h1&gt;</text:span></text:p>
          </table:table-cell>
          <table:table-cell table:style-name="Table9.A1" office:value-type="string">
            <text:p text:style-name="Table_20_Contents">Head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&lt;p&gt;</text:span></text:p>
          </table:table-cell>
          <table:table-cell table:style-name="Table9.A1" office:value-type="string">
            <text:p text:style-name="Table_20_Contents">Paragraph</text:p>
          </table:table-cell>
        </table:table-row>
        <table:table-row>
          <table:table-cell table:style-name="Table9.A1" office:value-type="string">
            <text:p text:style-name="Table_20_Contents"><text:span text:style-name="Source_20_Text">&lt;a&gt;</text:span></text:p>
          </table:table-cell>
          <table:table-cell table:style-name="Table9.A1" office:value-type="string">
            <text:p text:style-name="Table_20_Contents">Link</text:p>
          </table:table-cell>
        </table:table-row>
        <table:table-row>
          <table:table-cell table:style-name="Table9.A1" office:value-type="string">
            <text:p text:style-name="Table_20_Contents"><text:span text:style-name="Source_20_Text">&lt;div&gt;</text:span></text:p>
          </table:table-cell>
          <table:table-cell table:style-name="Table9.A1" office:value-type="string">
            <text:p text:style-name="Table_20_Contents">Container</text:p>
          </table:table-cell>
        </table:table-row>
        <text:soft-page-break/>
        <table:table-row>
          <table:table-cell table:style-name="Table9.A1" office:value-type="string">
            <text:p text:style-name="Table_20_Contents"><text:span text:style-name="Source_20_Text">&lt;table&gt;</text:span></text:p>
          </table:table-cell>
          <table:table-cell table:style-name="Table9.A1" office:value-type="string">
            <text:p text:style-name="Table_20_Contents">Tab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&lt;img&gt;</text:span></text:p>
          </table:table-cell>
          <table:table-cell table:style-name="Table9.A1" office:value-type="string">
            <text:p text:style-name="Table_20_Contents">Image</text:p>
          </table:table-cell>
        </table:table-row>
        <table:table-row>
          <table:table-cell table:style-name="Table9.A1" office:value-type="string">
            <text:p text:style-name="Table_20_Contents"><text:span text:style-name="Source_20_Text">&lt;script&gt;</text:span></text:p>
          </table:table-cell>
          <table:table-cell table:style-name="Table9.A1" office:value-type="string">
            <text:p text:style-name="Table_20_Contents">Javascript</text:p>
          </table:table-cell>
        </table:table-row>
      </table:table>
      <text:p text:style-name="P81"/>
      <text:h text:style-name="P78" text:outline-level="1">3.3. Website nhìn thấy vs HTML Source</text:h>
      <text:p text:style-name="P79">Người dùng thấy:</text:p>
      <text:p text:style-name="P83"><text:span text:style-name="Source_20_Text">LangChain Tutorial</text:span></text:p>
      <text:p text:style-name="P83"/>
      <text:p text:style-name="P83"><text:span text:style-name="Source_20_Text">Introduction</text:span></text:p>
      <text:p text:style-name="P83"/>
      <text:p text:style-name="P84"><text:span text:style-name="Source_20_Text">Install LangChain</text:span></text:p>
      <text:p text:style-name="P79">Nhưng HTML:</text:p>
      <text:p text:style-name="P83"><text:span text:style-name="Source_20_Text">&lt;div&gt;</text:span></text:p>
      <text:p text:style-name="P83"/>
      <text:p text:style-name="P83"><text:span text:style-name="Source_20_Text">&lt;h1&gt;</text:span></text:p>
      <text:p text:style-name="P83"><text:span text:style-name="Source_20_Text">LangChain Tutorial</text:span></text:p>
      <text:p text:style-name="P83"><text:span text:style-name="Source_20_Text">&lt;/h1&gt;</text:span></text:p>
      <text:p text:style-name="P83"/>
      <text:p text:style-name="P83"><text:span text:style-name="Source_20_Text">&lt;p&gt;</text:span></text:p>
      <text:p text:style-name="P83"><text:span text:style-name="Source_20_Text">Introduction</text:span></text:p>
      <text:p text:style-name="P83"><text:span text:style-name="Source_20_Text">&lt;/p&gt;</text:span></text:p>
      <text:p text:style-name="P83"/>
      <text:p text:style-name="P84"><text:span text:style-name="Source_20_Text">&lt;/div&gt;</text:span></text:p>
      <text:p text:style-name="P79">Web Loader cần extract phần text từ HTML.</text:p>
      <text:p text:style-name="P81"/>
      <text:h text:style-name="P78" text:outline-level="1">4. Web Scraping Basics</text:h>
      <text:h text:style-name="P85" text:outline-level="2">4.1. Web Scraping là gì?</text:h>
      <text:p text:style-name="P79">Web scraping là quá trình tự động lấy dữ liệu từ website.</text:p>
      <text:p text:style-name="P79">Workflow:</text:p>
      <text:p text:style-name="P83"><text:span text:style-name="Source_20_Text">URL</text:span></text:p>
      <text:p text:style-name="P83"/>
      <text:p text:style-name="P83"><text:span text:style-name="Source_20_Text"><text:s/>↓</text:span></text:p>
      <text:p text:style-name="P83"/>
      <text:p text:style-name="P83"><text:span text:style-name="Source_20_Text">HTTP Request</text:span></text:p>
      <text:p text:style-name="P83"/>
      <text:p text:style-name="P83"><text:span text:style-name="Source_20_Text"><text:s/>↓</text:span></text:p>
      <text:p text:style-name="P83"/>
      <text:p text:style-name="P83"><text:soft-page-break/><text:span text:style-name="Source_20_Text">HTML Response</text:span></text:p>
      <text:p text:style-name="P83"/>
      <text:p text:style-name="P83"><text:span text:style-name="Source_20_Text"><text:s/>↓</text:span></text:p>
      <text:p text:style-name="P83"/>
      <text:p text:style-name="P83"><text:span text:style-name="Source_20_Text">HTML Parser</text:span></text:p>
      <text:p text:style-name="P83"/>
      <text:p text:style-name="P83"><text:span text:style-name="Source_20_Text"><text:s/>↓</text:span></text:p>
      <text:p text:style-name="P83"/>
      <text:p text:style-name="P83"><text:span text:style-name="Source_20_Text">Extract Text</text:span></text:p>
      <text:p text:style-name="P83"/>
      <text:p text:style-name="P83"><text:span text:style-name="Source_20_Text"><text:s/>↓</text:span></text:p>
      <text:p text:style-name="P83"/>
      <text:p text:style-name="P84"><text:span text:style-name="Source_20_Text">Clean Data</text:span></text:p>
      <text:p text:style-name="P81"/>
      <text:h text:style-name="P78" text:outline-level="1">4.2. HTTP Request</text:h>
      <text:p text:style-name="P79">Ví dụ:</text:p>
      <text:p text:style-name="P79">Browser:</text:p>
      <text:p text:style-name="P84"><text:span text:style-name="Source_20_Text">https://example.com</text:span></text:p>
      <text:p text:style-name="P79">Gửi:</text:p>
      <text:p text:style-name="P84"><text:span text:style-name="Source_20_Text">GET / HTTP/1.1</text:span></text:p>
      <text:p text:style-name="P79">Server trả:</text:p>
      <text:p text:style-name="P83"><text:span text:style-name="Source_20_Text">&lt;html&gt;</text:span></text:p>
      <text:p text:style-name="P83"><text:span text:style-name="Source_20_Text">&lt;body&gt;</text:span></text:p>
      <text:p text:style-name="P83"><text:span text:style-name="Source_20_Text">Content</text:span></text:p>
      <text:p text:style-name="P83"><text:span text:style-name="Source_20_Text">&lt;/body&gt;</text:span></text:p>
      <text:p text:style-name="P84"><text:span text:style-name="Source_20_Text">&lt;/html&gt;</text:span></text:p>
      <text:p text:style-name="P81"/>
      <text:h text:style-name="P78" text:outline-level="1">4.3. HTML Parsing</text:h>
      <text:p text:style-name="P79">HTML Parsing là quá trình:</text:p>
      <text:p text:style-name="P83"><text:span text:style-name="Source_20_Text">HTML String</text:span></text:p>
      <text:p text:style-name="P83"/>
      <text:p text:style-name="P83"><text:span text:style-name="Source_20_Text"><text:s text:c="6"/>↓</text:span></text:p>
      <text:p text:style-name="P83"/>
      <text:p text:style-name="P83"><text:span text:style-name="Source_20_Text">Parser</text:span></text:p>
      <text:p text:style-name="P83"/>
      <text:p text:style-name="P83"><text:span text:style-name="Source_20_Text"><text:s text:c="6"/>↓</text:span></text:p>
      <text:p text:style-name="P83"/>
      <text:p text:style-name="P83"><text:soft-page-break/><text:span text:style-name="Source_20_Text">DOM Tree</text:span></text:p>
      <text:p text:style-name="P83"/>
      <text:p text:style-name="P83"><text:span text:style-name="Source_20_Text"><text:s text:c="6"/>↓</text:span></text:p>
      <text:p text:style-name="P83"/>
      <text:p text:style-name="P84"><text:span text:style-name="Source_20_Text">Extract Text</text:span></text:p>
      <text:p text:style-name="P79">Ví dụ:</text:p>
      <text:p text:style-name="P79">HTML:</text:p>
      <text:p text:style-name="P83"><text:span text:style-name="Source_20_Text">&lt;div&gt;</text:span></text:p>
      <text:p text:style-name="P83"/>
      <text:p text:style-name="P83"><text:span text:style-name="Source_20_Text">&lt;h1&gt;</text:span></text:p>
      <text:p text:style-name="P83"><text:span text:style-name="Source_20_Text">AI Engineering</text:span></text:p>
      <text:p text:style-name="P83"><text:span text:style-name="Source_20_Text">&lt;/h1&gt;</text:span></text:p>
      <text:p text:style-name="P83"/>
      <text:p text:style-name="P83"><text:span text:style-name="Source_20_Text">&lt;p&gt;</text:span></text:p>
      <text:p text:style-name="P83"><text:span text:style-name="Source_20_Text">LangChain</text:span></text:p>
      <text:p text:style-name="P83"><text:span text:style-name="Source_20_Text">&lt;/p&gt;</text:span></text:p>
      <text:p text:style-name="P83"/>
      <text:p text:style-name="P84"><text:span text:style-name="Source_20_Text">&lt;/div&gt;</text:span></text:p>
      <text:p text:style-name="P79">Parser tạo:</text:p>
      <text:p text:style-name="P83"><text:span text:style-name="Source_20_Text">div</text:span></text:p>
      <text:p text:style-name="P83"/>
      <text:p text:style-name="P83"><text:span text:style-name="Source_20_Text">├── h1</text:span></text:p>
      <text:p text:style-name="P83"><text:span text:style-name="Source_20_Text">│ <text:s text:c="3"/>└── AI Engineering</text:span></text:p>
      <text:p text:style-name="P83"><text:span text:style-name="Source_20_Text">│</text:span></text:p>
      <text:p text:style-name="P83"><text:span text:style-name="Source_20_Text">└── p</text:span></text:p>
      <text:p text:style-name="P84"><text:span text:style-name="Source_20_Text"><text:s text:c="5"/>└── LangChain</text:span></text:p>
      <text:p text:style-name="P81"/>
      <text:h text:style-name="P78" text:outline-level="1">5. BeautifulSoup</text:h>
      <text:h text:style-name="P85" text:outline-level="2">5.1. BeautifulSoup là gì?</text:h>
      <text:p text:style-name="P79">BeautifulSoup là Python library dùng để parse HTML.</text:p>
      <text:p text:style-name="P79">Cài đặt:</text:p>
      <text:p text:style-name="P84"><text:span text:style-name="Source_20_Text">pip install beautifulsoup4</text:span></text:p>
      <text:p text:style-name="P81"/>
      <text:h text:style-name="P78" text:outline-level="1">5.2. Ví dụ BeautifulSoup</text:h>
      <text:p text:style-name="P79">HTML:</text:p>
      <text:p text:style-name="P83"><text:span text:style-name="Source_20_Text">&lt;h1&gt;</text:span></text:p>
      <text:p text:style-name="P83"><text:soft-page-break/><text:span text:style-name="Source_20_Text">LangChain</text:span></text:p>
      <text:p text:style-name="P83"><text:span text:style-name="Source_20_Text">&lt;/h1&gt;</text:span></text:p>
      <text:p text:style-name="P83"/>
      <text:p text:style-name="P83"><text:span text:style-name="Source_20_Text">&lt;p&gt;</text:span></text:p>
      <text:p text:style-name="P83"><text:span text:style-name="Source_20_Text">Build LLM apps</text:span></text:p>
      <text:p text:style-name="P84"><text:span text:style-name="Source_20_Text">&lt;/p&gt;</text:span></text:p>
      <text:p text:style-name="P79">Code:</text:p>
      <text:p text:style-name="P83"><text:span text:style-name="Source_20_Text">from bs4 import BeautifulSoup</text:span></text:p>
      <text:p text:style-name="P83"/>
      <text:p text:style-name="P83"/>
      <text:p text:style-name="P83"><text:span text:style-name="Source_20_Text">html = """</text:span></text:p>
      <text:p text:style-name="P83"><text:span text:style-name="Source_20_Text">&lt;h1&gt;</text:span></text:p>
      <text:p text:style-name="P83"><text:span text:style-name="Source_20_Text">LangChain</text:span></text:p>
      <text:p text:style-name="P83"><text:span text:style-name="Source_20_Text">&lt;/h1&gt;</text:span></text:p>
      <text:p text:style-name="P83"/>
      <text:p text:style-name="P83"><text:span text:style-name="Source_20_Text">&lt;p&gt;</text:span></text:p>
      <text:p text:style-name="P83"><text:span text:style-name="Source_20_Text">Build LLM apps</text:span></text:p>
      <text:p text:style-name="P83"><text:span text:style-name="Source_20_Text">&lt;/p&gt;</text:span></text:p>
      <text:p text:style-name="P83"><text:span text:style-name="Source_20_Text">"""</text:span></text:p>
      <text:p text:style-name="P83"/>
      <text:p text:style-name="P83"/>
      <text:p text:style-name="P83"><text:span text:style-name="Source_20_Text">soup = BeautifulSoup(</text:span></text:p>
      <text:p text:style-name="P83"><text:span text:style-name="Source_20_Text"><text:s text:c="4"/>html,</text:span></text:p>
      <text:p text:style-name="P83"><text:span text:style-name="Source_20_Text"><text:s text:c="4"/>"html.parser"</text:span></text:p>
      <text:p text:style-name="P83"><text:span text:style-name="Source_20_Text">)</text:span></text:p>
      <text:p text:style-name="P83"/>
      <text:p text:style-name="P83"/>
      <text:p text:style-name="P83"><text:span text:style-name="Source_20_Text">print(</text:span></text:p>
      <text:p text:style-name="P83"><text:span text:style-name="Source_20_Text"><text:s text:c="4"/>soup.get_text()</text:span></text:p>
      <text:p text:style-name="P84"><text:span text:style-name="Source_20_Text">)</text:span></text:p>
      <text:p text:style-name="P79">Output:</text:p>
      <text:p text:style-name="P83"><text:span text:style-name="Source_20_Text">LangChain</text:span></text:p>
      <text:p text:style-name="P83"/>
      <text:p text:style-name="P84"><text:span text:style-name="Source_20_Text">Build LLM apps</text:span></text:p>
      <text:p text:style-name="P81"/>
      <text:h text:style-name="P78" text:outline-level="1">5.3. Vai trò trong WebBaseLoader</text:h>
      <text:p text:style-name="P79">WebBaseLoader sử dụng HTML parser để:</text:p>
      <text:p text:style-name="P83"><text:span text:style-name="Source_20_Text">HTML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BeautifulSoup</text:span></text:p>
      <text:p text:style-name="P83"><text:soft-page-break/></text:p>
      <text:p text:style-name="P83"><text:span text:style-name="Source_20_Text">↓</text:span></text:p>
      <text:p text:style-name="P83"/>
      <text:p text:style-name="P83"><text:span text:style-name="Source_20_Text">Clean Text</text:span></text:p>
      <text:p text:style-name="P83"/>
      <text:p text:style-name="P83"><text:span text:style-name="Source_20_Text">↓</text:span></text:p>
      <text:p text:style-name="P83"/>
      <text:p text:style-name="P84"><text:span text:style-name="Source_20_Text">Document</text:span></text:p>
      <text:p text:style-name="P81"/>
      <text:h text:style-name="P78" text:outline-level="1">6. WebBaseLoader trong LangChain</text:h>
      <text:h text:style-name="P85" text:outline-level="2">6.1. WebBaseLoader là gì?</text:h>
      <text:p text:style-name="P79"><text:span text:style-name="Source_20_Text">WebBaseLoader</text:span> là Document Loader dùng để lấy dữ liệu từ website.</text:p>
      <text:p text:style-name="P79">Input:</text:p>
      <text:p text:style-name="P84"><text:span text:style-name="Source_20_Text">URL</text:span></text:p>
      <text:p text:style-name="P79">Output:</text:p>
      <text:p text:style-name="P83"><text:span text:style-name="Source_20_Text">Document(</text:span></text:p>
      <text:p text:style-name="P83"><text:span text:style-name="Source_20_Text"><text:s text:c="4"/>page_content="Website content",</text:span></text:p>
      <text:p text:style-name="P83"/>
      <text:p text:style-name="P83"><text:span text:style-name="Source_20_Text"><text:s text:c="4"/>metadata={</text:span></text:p>
      <text:p text:style-name="P83"><text:span text:style-name="Source_20_Text"><text:s text:c="8"/>"source":"https://example.com"</text:span></text:p>
      <text:p text:style-name="P83"><text:span text:style-name="Source_20_Text"><text:s text:c="4"/>}</text:span></text:p>
      <text:p text:style-name="P84"><text:span text:style-name="Source_20_Text">)</text:span></text:p>
      <text:p text:style-name="P81"/>
      <text:h text:style-name="P78" text:outline-level="1">6.2. Cài đặt</text:h>
      <text:p text:style-name="P83"><text:span text:style-name="Source_20_Text">pip install langchain</text:span></text:p>
      <text:p text:style-name="P83"><text:span text:style-name="Source_20_Text">pip install langchain-community</text:span></text:p>
      <text:p text:style-name="P84"><text:span text:style-name="Source_20_Text">pip install beautifulsoup4</text:span></text:p>
      <text:p text:style-name="P81"/>
      <text:h text:style-name="P78" text:outline-level="1">6.3. Import</text:h>
      <text:p text:style-name="P84"><text:span text:style-name="Source_20_Text">from langchain_community.document_loaders import WebBaseLoader</text:span></text:p>
      <text:p text:style-name="P81"/>
      <text:h text:style-name="P78" text:outline-level="1"><text:soft-page-break/>7. Load Website cơ bản</text:h>
      <text:h text:style-name="P85" text:outline-level="2">7.1. Chuẩn bị</text:h>
      <text:p text:style-name="P79">Project:</text:p>
      <text:p text:style-name="P83"><text:span text:style-name="Source_20_Text">web_loader_project/</text:span></text:p>
      <text:p text:style-name="P83"/>
      <text:p text:style-name="P83"/>
      <text:p text:style-name="P83"><text:span text:style-name="Source_20_Text">├── main.py</text:span></text:p>
      <text:p text:style-name="P83"/>
      <text:p text:style-name="P84"><text:span text:style-name="Source_20_Text">└── requirements.txt</text:span></text:p>
      <text:p text:style-name="P81"/>
      <text:h text:style-name="P78" text:outline-level="1">7.2. Code cơ bản</text:h>
      <text:p text:style-name="P83"><text:span text:style-name="Source_20_Text">from langchain_community.document_loaders import WebBaseLoader</text:span></text:p>
      <text:p text:style-name="P83"/>
      <text:p text:style-name="P83"/>
      <text:p text:style-name="P83"><text:span text:style-name="Source_20_Text">url = "https://example.com"</text:span></text:p>
      <text:p text:style-name="P83"/>
      <text:p text:style-name="P83"/>
      <text:p text:style-name="P83"><text:span text:style-name="Source_20_Text">loader = WebBaseLoader(</text:span></text:p>
      <text:p text:style-name="P83"><text:span text:style-name="Source_20_Text"><text:s text:c="4"/>url</text:span></text:p>
      <text:p text:style-name="P83"><text:span text:style-name="Source_20_Text">)</text:span></text:p>
      <text:p text:style-name="P83"/>
      <text:p text:style-name="P83"/>
      <text:p text:style-name="P83"><text:span text:style-name="Source_20_Text">documents = loader.load()</text:span></text:p>
      <text:p text:style-name="P83"/>
      <text:p text:style-name="P83"/>
      <text:p text:style-name="P83"><text:span text:style-name="Source_20_Text">print(</text:span></text:p>
      <text:p text:style-name="P83"><text:span text:style-name="Source_20_Text"><text:s text:c="4"/>"Number of documents:",</text:span></text:p>
      <text:p text:style-name="P83"><text:span text:style-name="Source_20_Text"><text:s text:c="4"/>len(documents)</text:span></text:p>
      <text:p text:style-name="P83"><text:span text:style-name="Source_20_Text">)</text:span></text:p>
      <text:p text:style-name="P83"/>
      <text:p text:style-name="P83"/>
      <text:p text:style-name="P83"><text:span text:style-name="Source_20_Text">for doc in documents:</text:span></text:p>
      <text:p text:style-name="P83"/>
      <text:p text:style-name="P83"><text:span text:style-name="Source_20_Text"><text:s text:c="4"/>print("====================")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"Metadata:"</text:span></text:p>
      <text:p text:style-name="P83"><text:span text:style-name="Source_20_Text"><text:s text:c="4"/>)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doc.metadata</text:span></text:p>
      <text:p text:style-name="P83"><text:span text:style-name="Source_20_Text"><text:s text:c="4"/>)</text:span></text:p>
      <text:p text:style-name="P83"/>
      <text:p text:style-name="P83"><text:soft-page-break/></text:p>
      <text:p text:style-name="P83"><text:span text:style-name="Source_20_Text"><text:s text:c="4"/>print(</text:span></text:p>
      <text:p text:style-name="P83"><text:span text:style-name="Source_20_Text"><text:s text:c="8"/>"Content:"</text:span></text:p>
      <text:p text:style-name="P83"><text:span text:style-name="Source_20_Text"><text:s text:c="4"/>)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doc.page_content[:500]</text:span></text:p>
      <text:p text:style-name="P84"><text:span text:style-name="Source_20_Text"><text:s text:c="4"/>)</text:span></text:p>
      <text:p text:style-name="P81"/>
      <text:h text:style-name="P78" text:outline-level="1">8. Expected Output</text:h>
      <text:p text:style-name="P79">Ví dụ:</text:p>
      <text:p text:style-name="P83"><text:span text:style-name="Source_20_Text">Number of documents:</text:span></text:p>
      <text:p text:style-name="P83"/>
      <text:p text:style-name="P83"><text:span text:style-name="Source_20_Text">1</text:span></text:p>
      <text:p text:style-name="P83"/>
      <text:p text:style-name="P83"/>
      <text:p text:style-name="P83"><text:span text:style-name="Source_20_Text">====================</text:span></text:p>
      <text:p text:style-name="P83"/>
      <text:p text:style-name="P83"/>
      <text:p text:style-name="P83"><text:span text:style-name="Source_20_Text">Metadata:</text:span></text:p>
      <text:p text:style-name="P83"/>
      <text:p text:style-name="P83"><text:span text:style-name="Source_20_Text">{</text:span></text:p>
      <text:p text:style-name="P83"><text:span text:style-name="Source_20_Text">'source':</text:span></text:p>
      <text:p text:style-name="P83"><text:span text:style-name="Source_20_Text">'https://example.com'</text:span></text:p>
      <text:p text:style-name="P83"><text:span text:style-name="Source_20_Text">}</text:span></text:p>
      <text:p text:style-name="P83"/>
      <text:p text:style-name="P83"/>
      <text:p text:style-name="P83"><text:span text:style-name="Source_20_Text">Content:</text:span></text:p>
      <text:p text:style-name="P83"/>
      <text:p text:style-name="P83"/>
      <text:p text:style-name="P83"><text:span text:style-name="Source_20_Text">Example Domain</text:span></text:p>
      <text:p text:style-name="P83"/>
      <text:p text:style-name="P84"><text:span text:style-name="Source_20_Text">This domain is for use in examples...</text:span></text:p>
      <text:p text:style-name="P81"/>
      <text:h text:style-name="P78" text:outline-level="1">9. Phân tích Document Object</text:h>
      <text:p text:style-name="P79">Output:</text:p>
      <text:p text:style-name="P83"><text:span text:style-name="Source_20_Text">Document(</text:span></text:p>
      <text:p text:style-name="P83"/>
      <text:p text:style-name="P83"><text:span text:style-name="Source_20_Text">page_content=</text:span></text:p>
      <text:p text:style-name="P83"><text:span text:style-name="Source_20_Text">"""</text:span></text:p>
      <text:p text:style-name="P83"><text:span text:style-name="Source_20_Text">Example Domain</text:span></text:p>
      <text:p text:style-name="P83"><text:soft-page-break/></text:p>
      <text:p text:style-name="P83"><text:span text:style-name="Source_20_Text">This domain is for examples.</text:span></text:p>
      <text:p text:style-name="P83"><text:span text:style-name="Source_20_Text">""",</text:span></text:p>
      <text:p text:style-name="P83"/>
      <text:p text:style-name="P83"/>
      <text:p text:style-name="P83"><text:span text:style-name="Source_20_Text">metadata={</text:span></text:p>
      <text:p text:style-name="P83"><text:span text:style-name="Source_20_Text">"source":</text:span></text:p>
      <text:p text:style-name="P83"><text:span text:style-name="Source_20_Text">"https://example.com"</text:span></text:p>
      <text:p text:style-name="P83"><text:span text:style-name="Source_20_Text">}</text:span></text:p>
      <text:p text:style-name="P83"/>
      <text:p text:style-name="P84"><text:span text:style-name="Source_20_Text">)</text:span></text:p>
      <text:p text:style-name="P81"/>
      <text:h text:style-name="P78" text:outline-level="1">10. Extract page_content</text:h>
      <text:h text:style-name="P85" text:outline-level="2">Lấy toàn bộ nội dung</text:h>
      <text:p text:style-name="P83"><text:span text:style-name="Source_20_Text">content = documents[0].page_content</text:span></text:p>
      <text:p text:style-name="P83"/>
      <text:p text:style-name="P83"/>
      <text:p text:style-name="P84"><text:span text:style-name="Source_20_Text">print(content)</text:span></text:p>
      <text:p text:style-name="P81"/>
      <text:h text:style-name="P85" text:outline-level="2">Đếm ký tự</text:h>
      <text:p text:style-name="P83"><text:span text:style-name="Source_20_Text">length = len(</text:span></text:p>
      <text:p text:style-name="P83"><text:span text:style-name="Source_20_Text"><text:s text:c="4"/>content</text:span></text:p>
      <text:p text:style-name="P83"><text:span text:style-name="Source_20_Text">)</text:span></text:p>
      <text:p text:style-name="P83"/>
      <text:p text:style-name="P83"/>
      <text:p text:style-name="P84"><text:span text:style-name="Source_20_Text">print(length)</text:span></text:p>
      <text:p text:style-name="P79">Output:</text:p>
      <text:p text:style-name="P84"><text:span text:style-name="Source_20_Text">350</text:span></text:p>
      <text:p text:style-name="P81"/>
      <text:h text:style-name="P85" text:outline-level="2">Tìm keyword</text:h>
      <text:p text:style-name="P79">Ví dụ:</text:p>
      <text:p text:style-name="P83"><text:span text:style-name="Source_20_Text">if "LangChain" in content: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"Found"</text:span></text:p>
      <text:p text:style-name="P84"><text:span text:style-name="Source_20_Text"><text:s text:c="4"/>)</text:span></text:p>
      <text:p text:style-name="P81"><text:soft-page-break/></text:p>
      <text:h text:style-name="P78" text:outline-level="1">11. Phân tích Metadata</text:h>
      <text:h text:style-name="P85" text:outline-level="2">Metadata mặc định</text:h>
      <text:p text:style-name="P84"><text:span text:style-name="Source_20_Text">doc.metadata</text:span></text:p>
      <text:p text:style-name="P79">Output:</text:p>
      <text:p text:style-name="P83"><text:span text:style-name="Source_20_Text">{</text:span></text:p>
      <text:p text:style-name="P83"><text:span text:style-name="Source_20_Text">'source':</text:span></text:p>
      <text:p text:style-name="P83"><text:span text:style-name="Source_20_Text">'https://example.com'</text:span></text:p>
      <text:p text:style-name="P84"><text:span text:style-name="Source_20_Text">}</text:span></text:p>
      <text:p text:style-name="P81"/>
      <text:h text:style-name="P85" text:outline-level="2">Thêm metadata custom</text:h>
      <text:p text:style-name="P83"><text:span text:style-name="Source_20_Text">doc.metadata.update(</text:span></text:p>
      <text:p text:style-name="P83"><text:span text:style-name="Source_20_Text"><text:s text:c="4"/>{</text:span></text:p>
      <text:p text:style-name="P83"><text:span text:style-name="Source_20_Text"><text:s text:c="8"/>"category":"AI",</text:span></text:p>
      <text:p text:style-name="P83"><text:span text:style-name="Source_20_Text"><text:s text:c="8"/>"source_type":"website"</text:span></text:p>
      <text:p text:style-name="P83"><text:span text:style-name="Source_20_Text"><text:s text:c="4"/>}</text:span></text:p>
      <text:p text:style-name="P84"><text:span text:style-name="Source_20_Text">)</text:span></text:p>
      <text:p text:style-name="P79">Kết quả:</text:p>
      <text:p text:style-name="P83"><text:span text:style-name="Source_20_Text">{</text:span></text:p>
      <text:p text:style-name="P83"><text:span text:style-name="Source_20_Text">"source":</text:span></text:p>
      <text:p text:style-name="P83"><text:span text:style-name="Source_20_Text">"https://example.com",</text:span></text:p>
      <text:p text:style-name="P83"/>
      <text:p text:style-name="P83"><text:span text:style-name="Source_20_Text">"category":</text:span></text:p>
      <text:p text:style-name="P83"><text:span text:style-name="Source_20_Text">"AI",</text:span></text:p>
      <text:p text:style-name="P83"/>
      <text:p text:style-name="P83"><text:span text:style-name="Source_20_Text">"source_type":</text:span></text:p>
      <text:p text:style-name="P83"><text:span text:style-name="Source_20_Text">"website"</text:span></text:p>
      <text:p text:style-name="P84"><text:span text:style-name="Source_20_Text">}</text:span></text:p>
      <text:p text:style-name="P81"/>
      <text:h text:style-name="P78" text:outline-level="1">12. HTML Parsing trong WebBaseLoader</text:h>
      <text:p text:style-name="P79">Workflow:</text:p>
      <text:p text:style-name="P83"><text:span text:style-name="Source_20_Text">Website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HTTP GET Request</text:span></text:p>
      <text:p text:style-name="P83"><text:soft-page-break/></text:p>
      <text:p text:style-name="P83"><text:span text:style-name="Source_20_Text">↓</text:span></text:p>
      <text:p text:style-name="P83"/>
      <text:p text:style-name="P83"><text:span text:style-name="Source_20_Text">HTML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BeautifulSoup Parser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Remove Tags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Extract Text</text:span></text:p>
      <text:p text:style-name="P83"/>
      <text:p text:style-name="P83"><text:span text:style-name="Source_20_Text">↓</text:span></text:p>
      <text:p text:style-name="P83"/>
      <text:p text:style-name="P84"><text:span text:style-name="Source_20_Text">Document</text:span></text:p>
      <text:p text:style-name="P81"/>
      <text:p text:style-name="P79">Ví dụ:</text:p>
      <text:p text:style-name="P79">HTML:</text:p>
      <text:p text:style-name="P83"><text:span text:style-name="Source_20_Text">&lt;body&gt;</text:span></text:p>
      <text:p text:style-name="P83"/>
      <text:p text:style-name="P83"><text:span text:style-name="Source_20_Text">&lt;nav&gt;</text:span></text:p>
      <text:p text:style-name="P83"><text:span text:style-name="Source_20_Text">Menu</text:span></text:p>
      <text:p text:style-name="P83"><text:span text:style-name="Source_20_Text">&lt;/nav&gt;</text:span></text:p>
      <text:p text:style-name="P83"/>
      <text:p text:style-name="P83"/>
      <text:p text:style-name="P83"><text:span text:style-name="Source_20_Text">&lt;h1&gt;</text:span></text:p>
      <text:p text:style-name="P83"><text:span text:style-name="Source_20_Text">LangChain</text:span></text:p>
      <text:p text:style-name="P83"><text:span text:style-name="Source_20_Text">&lt;/h1&gt;</text:span></text:p>
      <text:p text:style-name="P83"/>
      <text:p text:style-name="P83"/>
      <text:p text:style-name="P83"><text:span text:style-name="Source_20_Text">&lt;p&gt;</text:span></text:p>
      <text:p text:style-name="P83"><text:span text:style-name="Source_20_Text">Framework for LLM apps</text:span></text:p>
      <text:p text:style-name="P83"><text:span text:style-name="Source_20_Text">&lt;/p&gt;</text:span></text:p>
      <text:p text:style-name="P83"/>
      <text:p text:style-name="P83"/>
      <text:p text:style-name="P83"><text:span text:style-name="Source_20_Text">&lt;footer&gt;</text:span></text:p>
      <text:p text:style-name="P83"><text:span text:style-name="Source_20_Text">Copyright</text:span></text:p>
      <text:p text:style-name="P83"><text:span text:style-name="Source_20_Text">&lt;/footer&gt;</text:span></text:p>
      <text:p text:style-name="P83"/>
      <text:p text:style-name="P84"><text:span text:style-name="Source_20_Text">&lt;/body&gt;</text:span></text:p>
      <text:p text:style-name="P79"><text:soft-page-break/>Sau parsing:</text:p>
      <text:p text:style-name="P83"><text:span text:style-name="Source_20_Text">Menu</text:span></text:p>
      <text:p text:style-name="P83"/>
      <text:p text:style-name="P83"><text:span text:style-name="Source_20_Text">LangChain</text:span></text:p>
      <text:p text:style-name="P83"/>
      <text:p text:style-name="P83"><text:span text:style-name="Source_20_Text">Framework for LLM apps</text:span></text:p>
      <text:p text:style-name="P83"/>
      <text:p text:style-name="P84"><text:span text:style-name="Source_20_Text">Copyright</text:span></text:p>
      <text:p text:style-name="P81"/>
      <text:h text:style-name="P78" text:outline-level="1">13. Vấn đề khi lấy dữ liệu Website</text:h>
      <text:h text:style-name="P78" text:outline-level="1">13.1. Dynamic Website</text:h>
      <text:h text:style-name="P85" text:outline-level="2">Vấn đề</text:h>
      <text:p text:style-name="P79">Nhiều website sử dụng JavaScript.</text:p>
      <text:p text:style-name="P79">Ví dụ:</text:p>
      <text:p text:style-name="P79">Browser thấy:</text:p>
      <text:p text:style-name="P83"><text:span text:style-name="Source_20_Text">Product List</text:span></text:p>
      <text:p text:style-name="P83"/>
      <text:p text:style-name="P83"><text:span text:style-name="Source_20_Text">Item A</text:span></text:p>
      <text:p text:style-name="P84"><text:span text:style-name="Source_20_Text">Item B</text:span></text:p>
      <text:p text:style-name="P79">Nhưng HTML:</text:p>
      <text:p text:style-name="P83"><text:span text:style-name="Source_20_Text">&lt;div id="app"&gt;</text:span></text:p>
      <text:p text:style-name="P83"/>
      <text:p text:style-name="P84"><text:span text:style-name="Source_20_Text">&lt;/div&gt;</text:span></text:p>
      <text:p text:style-name="P79">Nội dung được load bằng JavaScript.</text:p>
      <text:p text:style-name="P81"/>
      <text:h text:style-name="P85" text:outline-level="2">Giải pháp</text:h>
      <text:p text:style-name="P79">Dùng:</text:p>
      <text:list text:style-name="L67">
        <text:list-item>
          <text:p text:style-name="P87">Selenium</text:p>
        </text:list-item>
        <text:list-item>
          <text:p text:style-name="P87">Playwright</text:p>
        </text:list-item>
      </text:list>
      <text:p text:style-name="P79">Workflow:</text:p>
      <text:p text:style-name="P83"><text:span text:style-name="Source_20_Text">Browser Automation</text:span></text:p>
      <text:p text:style-name="P83"/>
      <text:p text:style-name="P83"><text:span text:style-name="Source_20_Text">↓</text:span></text:p>
      <text:p text:style-name="P83"><text:soft-page-break/></text:p>
      <text:p text:style-name="P83"><text:span text:style-name="Source_20_Text">Rendered HTML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Parser</text:span></text:p>
      <text:p text:style-name="P83"/>
      <text:p text:style-name="P83"><text:span text:style-name="Source_20_Text">↓</text:span></text:p>
      <text:p text:style-name="P83"/>
      <text:p text:style-name="P84"><text:span text:style-name="Source_20_Text">Document</text:span></text:p>
      <text:p text:style-name="P81"/>
      <text:h text:style-name="P78" text:outline-level="1">13.2. HTML Noise</text:h>
      <text:p text:style-name="P79">Website:</text:p>
      <text:p text:style-name="P83"><text:span text:style-name="Source_20_Text">Menu</text:span></text:p>
      <text:p text:style-name="P83"/>
      <text:p text:style-name="P83"><text:span text:style-name="Source_20_Text">Advertisement</text:span></text:p>
      <text:p text:style-name="P83"/>
      <text:p text:style-name="P83"><text:span text:style-name="Source_20_Text">Article</text:span></text:p>
      <text:p text:style-name="P83"/>
      <text:p text:style-name="P84"><text:span text:style-name="Source_20_Text">Footer</text:span></text:p>
      <text:p text:style-name="P79">Loader có thể lấy:</text:p>
      <text:p text:style-name="P83"><text:span text:style-name="Source_20_Text">Menu</text:span></text:p>
      <text:p text:style-name="P83"><text:span text:style-name="Source_20_Text">Advertisement</text:span></text:p>
      <text:p text:style-name="P83"><text:span text:style-name="Source_20_Text">Article</text:span></text:p>
      <text:p text:style-name="P84"><text:span text:style-name="Source_20_Text">Footer</text:span></text:p>
      <text:p text:style-name="P79">Ảnh hưởng RAG:</text:p>
      <text:list text:style-name="L68">
        <text:list-item>
          <text:p text:style-name="P88">Embedding nhiễu.</text:p>
        </text:list-item>
        <text:list-item>
          <text:p text:style-name="P88">Retrieval kém.</text:p>
        </text:list-item>
      </text:list>
      <text:p text:style-name="P79">Giải pháp:</text:p>
      <text:list text:style-name="L69">
        <text:list-item>
          <text:p text:style-name="P89">BeautifulSoup filter.</text:p>
        </text:list-item>
        <text:list-item>
          <text:p text:style-name="P89">Chọn CSS selector.</text:p>
        </text:list-item>
        <text:list-item>
          <text:p text:style-name="P89">Cleaning text.</text:p>
        </text:list-item>
      </text:list>
      <text:p text:style-name="P81"/>
      <text:h text:style-name="P78" text:outline-level="1">13.3. Website thay đổi</text:h>
      <text:p text:style-name="P79">Ví dụ:</text:p>
      <text:p text:style-name="P79"><text:soft-page-break/>Hôm nay:</text:p>
      <text:p text:style-name="P84"><text:span text:style-name="Source_20_Text">Documentation v1</text:span></text:p>
      <text:p text:style-name="P79">Ngày mai:</text:p>
      <text:p text:style-name="P84"><text:span text:style-name="Source_20_Text">Documentation v2</text:span></text:p>
      <text:p text:style-name="P79">Vector database có thể chứa dữ liệu cũ.</text:p>
      <text:p text:style-name="P79">Giải pháp:</text:p>
      <text:list text:style-name="L70">
        <text:list-item>
          <text:p text:style-name="P90">Re-crawling.</text:p>
        </text:list-item>
        <text:list-item>
          <text:p text:style-name="P90">Versioning.</text:p>
        </text:list-item>
      </text:list>
      <text:p text:style-name="P81"/>
      <text:h text:style-name="P78" text:outline-level="1">13.4. Robots.txt và Permission</text:h>
      <text:p text:style-name="P79">Không phải website nào cũng cho phép crawl.</text:p>
      <text:p text:style-name="P79">Cần kiểm tra:</text:p>
      <text:p text:style-name="P84"><text:span text:style-name="Source_20_Text">robots.txt</text:span></text:p>
      <text:p text:style-name="P79">Ví dụ:</text:p>
      <text:p text:style-name="P84"><text:span text:style-name="Source_20_Text">https://example.com/robots.txt</text:span></text:p>
      <text:p text:style-name="P81"/>
      <text:h text:style-name="P78" text:outline-level="1">14. Error Handling URL</text:h>
      <text:h text:style-name="P78" text:outline-level="1">Error 1: URL sai format</text:h>
      <text:p text:style-name="P79">Code:</text:p>
      <text:p text:style-name="P83"><text:span text:style-name="Source_20_Text">url = "abc123"</text:span></text:p>
      <text:p text:style-name="P83"/>
      <text:p text:style-name="P83"/>
      <text:p text:style-name="P83"><text:span text:style-name="Source_20_Text">loader = WebBaseLoader(url)</text:span></text:p>
      <text:p text:style-name="P83"/>
      <text:p text:style-name="P84"><text:span text:style-name="Source_20_Text">documents = loader.load()</text:span></text:p>
      <text:p text:style-name="P79">Error:</text:p>
      <text:p text:style-name="P84"><text:span text:style-name="Source_20_Text">Invalid URL</text:span></text:p>
      <text:p text:style-name="P81"/>
      <text:p text:style-name="P79">Fix:</text:p>
      <text:p text:style-name="P79"><text:soft-page-break/>Validate:</text:p>
      <text:p text:style-name="P83"><text:span text:style-name="Source_20_Text">from urllib.parse import urlparse</text:span></text:p>
      <text:p text:style-name="P83"/>
      <text:p text:style-name="P83"/>
      <text:p text:style-name="P83"><text:span text:style-name="Source_20_Text">def validate_url(url):</text:span></text:p>
      <text:p text:style-name="P83"/>
      <text:p text:style-name="P83"><text:span text:style-name="Source_20_Text"><text:s text:c="4"/>result = urlparse(url)</text:span></text:p>
      <text:p text:style-name="P83"/>
      <text:p text:style-name="P83"><text:span text:style-name="Source_20_Text"><text:s text:c="4"/>return all(</text:span></text:p>
      <text:p text:style-name="P83"><text:span text:style-name="Source_20_Text"><text:s text:c="8"/>[</text:span></text:p>
      <text:p text:style-name="P83"><text:span text:style-name="Source_20_Text"><text:s text:c="12"/>result.scheme,</text:span></text:p>
      <text:p text:style-name="P83"><text:span text:style-name="Source_20_Text"><text:s text:c="12"/>result.netloc</text:span></text:p>
      <text:p text:style-name="P83"><text:span text:style-name="Source_20_Text"><text:s text:c="8"/>]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print(</text:span></text:p>
      <text:p text:style-name="P83"><text:span text:style-name="Source_20_Text"><text:s text:c="4"/>validate_url(</text:span></text:p>
      <text:p text:style-name="P83"><text:span text:style-name="Source_20_Text"><text:s text:c="8"/>"https://example.com"</text:span></text:p>
      <text:p text:style-name="P83"><text:span text:style-name="Source_20_Text"><text:s text:c="4"/>)</text:span></text:p>
      <text:p text:style-name="P84"><text:span text:style-name="Source_20_Text">)</text:span></text:p>
      <text:p text:style-name="P79">Output:</text:p>
      <text:p text:style-name="P84"><text:span text:style-name="Source_20_Text">True</text:span></text:p>
      <text:p text:style-name="P81"/>
      <text:h text:style-name="P78" text:outline-level="1">Error 2: Website không tồn tại</text:h>
      <text:p text:style-name="P79">Ví dụ:</text:p>
      <text:p text:style-name="P84"><text:span text:style-name="Source_20_Text">url = "https://not-exist.com"</text:span></text:p>
      <text:p text:style-name="P79">Error:</text:p>
      <text:p text:style-name="P84"><text:span text:style-name="Source_20_Text">Connection Error</text:span></text:p>
      <text:p text:style-name="P81"/>
      <text:p text:style-name="P79">Xử lý:</text:p>
      <text:p text:style-name="P83"><text:span text:style-name="Source_20_Text">try:</text:span></text:p>
      <text:p text:style-name="P83"/>
      <text:p text:style-name="P83"><text:span text:style-name="Source_20_Text"><text:s text:c="4"/>documents = loader.load()</text:span></text:p>
      <text:p text:style-name="P83"/>
      <text:p text:style-name="P83"/>
      <text:p text:style-name="P83"><text:span text:style-name="Source_20_Text">except Exception as e:</text:span></text:p>
      <text:p text:style-name="P83"/>
      <text:p text:style-name="P83"><text:span text:style-name="Source_20_Text"><text:s text:c="4"/>print(</text:span></text:p>
      <text:p text:style-name="P83"><text:soft-page-break/><text:span text:style-name="Source_20_Text"><text:s text:c="8"/>"Loading failed:",</text:span></text:p>
      <text:p text:style-name="P83"><text:span text:style-name="Source_20_Text"><text:s text:c="8"/>e</text:span></text:p>
      <text:p text:style-name="P84"><text:span text:style-name="Source_20_Text"><text:s text:c="4"/>)</text:span></text:p>
      <text:p text:style-name="P81"/>
      <text:h text:style-name="P78" text:outline-level="1">Error 3: Timeout</text:h>
      <text:p text:style-name="P79">Website phản hồi chậm.</text:p>
      <text:p text:style-name="P79">Xử lý:</text:p>
      <text:p text:style-name="P83"><text:span text:style-name="Source_20_Text">try:</text:span></text:p>
      <text:p text:style-name="P83"/>
      <text:p text:style-name="P83"><text:span text:style-name="Source_20_Text"><text:s text:c="4"/>loader.load()</text:span></text:p>
      <text:p text:style-name="P83"/>
      <text:p text:style-name="P83"><text:span text:style-name="Source_20_Text">except TimeoutError: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"Website timeout"</text:span></text:p>
      <text:p text:style-name="P84"><text:span text:style-name="Source_20_Text"><text:s text:c="4"/>)</text:span></text:p>
      <text:p text:style-name="P81"/>
      <text:h text:style-name="P78" text:outline-level="1">15. Mini Project: Website Content Analyzer</text:h>
      <text:h text:style-name="P85" text:outline-level="2">Requirement</text:h>
      <text:p text:style-name="P79">Input:</text:p>
      <text:p text:style-name="P84"><text:span text:style-name="Source_20_Text">URL</text:span></text:p>
      <text:p text:style-name="P79">Output:</text:p>
      <text:p text:style-name="P83"><text:span text:style-name="Source_20_Text">Website:</text:span></text:p>
      <text:p text:style-name="P83"/>
      <text:p text:style-name="P83"><text:span text:style-name="Source_20_Text">https://example.com</text:span></text:p>
      <text:p text:style-name="P83"/>
      <text:p text:style-name="P83"/>
      <text:p text:style-name="P83"><text:span text:style-name="Source_20_Text">Characters:</text:span></text:p>
      <text:p text:style-name="P83"/>
      <text:p text:style-name="P83"><text:span text:style-name="Source_20_Text">350</text:span></text:p>
      <text:p text:style-name="P83"/>
      <text:p text:style-name="P83"/>
      <text:p text:style-name="P83"><text:span text:style-name="Source_20_Text">Metadata:</text:span></text:p>
      <text:p text:style-name="P83"/>
      <text:p text:style-name="P83"><text:span text:style-name="Source_20_Text">{</text:span></text:p>
      <text:p text:style-name="P83"><text:span text:style-name="Source_20_Text">source:url</text:span></text:p>
      <text:p text:style-name="P83"><text:span text:style-name="Source_20_Text">}</text:span></text:p>
      <text:p text:style-name="P83"/>
      <text:p text:style-name="P83"><text:soft-page-break/></text:p>
      <text:p text:style-name="P83"><text:span text:style-name="Source_20_Text">Preview:</text:span></text:p>
      <text:p text:style-name="P83"/>
      <text:p text:style-name="P84"><text:span text:style-name="Source_20_Text">Example Domain...</text:span></text:p>
      <text:p text:style-name="P81"/>
      <text:h text:style-name="P85" text:outline-level="2">Source Code</text:h>
      <text:p text:style-name="P83"><text:span text:style-name="Source_20_Text">from langchain_community.document_loaders import WebBaseLoader</text:span></text:p>
      <text:p text:style-name="P83"><text:span text:style-name="Source_20_Text">from urllib.parse import urlparse</text:span></text:p>
      <text:p text:style-name="P83"/>
      <text:p text:style-name="P83"/>
      <text:p text:style-name="P83"/>
      <text:p text:style-name="P83"><text:span text:style-name="Source_20_Text">def validate_url(url):</text:span></text:p>
      <text:p text:style-name="P83"/>
      <text:p text:style-name="P83"><text:span text:style-name="Source_20_Text"><text:s text:c="4"/>result = urlparse(url)</text:span></text:p>
      <text:p text:style-name="P83"/>
      <text:p text:style-name="P83"><text:span text:style-name="Source_20_Text"><text:s text:c="4"/>return all(</text:span></text:p>
      <text:p text:style-name="P83"><text:span text:style-name="Source_20_Text"><text:s text:c="8"/>[</text:span></text:p>
      <text:p text:style-name="P83"><text:span text:style-name="Source_20_Text"><text:s text:c="12"/>result.scheme,</text:span></text:p>
      <text:p text:style-name="P83"><text:span text:style-name="Source_20_Text"><text:s text:c="12"/>result.netloc</text:span></text:p>
      <text:p text:style-name="P83"><text:span text:style-name="Source_20_Text"><text:s text:c="8"/>]</text:span></text:p>
      <text:p text:style-name="P83"><text:span text:style-name="Source_20_Text"><text:s text:c="4"/>)</text:span></text:p>
      <text:p text:style-name="P83"/>
      <text:p text:style-name="P83"/>
      <text:p text:style-name="P83"/>
      <text:p text:style-name="P83"><text:span text:style-name="Source_20_Text">def load_web(url):</text:span></text:p>
      <text:p text:style-name="P83"/>
      <text:p text:style-name="P83"><text:span text:style-name="Source_20_Text"><text:s text:c="4"/>if not validate_url(url):</text:span></text:p>
      <text:p text:style-name="P83"/>
      <text:p text:style-name="P83"><text:span text:style-name="Source_20_Text"><text:s text:c="8"/>raise ValueError(</text:span></text:p>
      <text:p text:style-name="P83"><text:span text:style-name="Source_20_Text"><text:s text:c="12"/>"Invalid URL"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4"/>loader = WebBaseLoader(url)</text:span></text:p>
      <text:p text:style-name="P83"/>
      <text:p text:style-name="P83"/>
      <text:p text:style-name="P83"><text:span text:style-name="Source_20_Text"><text:s text:c="4"/>return loader.load()</text:span></text:p>
      <text:p text:style-name="P83"/>
      <text:p text:style-name="P83"/>
      <text:p text:style-name="P83"/>
      <text:p text:style-name="P83"><text:span text:style-name="Source_20_Text">def analyze_document(doc):</text:span></text:p>
      <text:p text:style-name="P83"/>
      <text:p text:style-name="P83"><text:span text:style-name="Source_20_Text"><text:s text:c="4"/>text = doc.page_content</text:span></text:p>
      <text:p text:style-name="P83"/>
      <text:p text:style-name="P83"/>
      <text:p text:style-name="P83"><text:soft-page-break/><text:span text:style-name="Source_20_Text"><text:s text:c="4"/>print(</text:span></text:p>
      <text:p text:style-name="P83"><text:span text:style-name="Source_20_Text"><text:s text:c="8"/>"Source:",</text:span></text:p>
      <text:p text:style-name="P83"><text:span text:style-name="Source_20_Text"><text:s text:c="8"/>doc.metadata["source"]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<text:s text:c="4"/>print(</text:span></text:p>
      <text:p text:style-name="P83"><text:span text:style-name="Source_20_Text"><text:s text:c="8"/>"Characters:",</text:span></text:p>
      <text:p text:style-name="P83"><text:span text:style-name="Source_20_Text"><text:s text:c="8"/>len(text)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<text:s text:c="4"/>print(</text:span></text:p>
      <text:p text:style-name="P83"><text:span text:style-name="Source_20_Text"><text:s text:c="8"/>"Preview:"</text:span></text:p>
      <text:p text:style-name="P83"><text:span text:style-name="Source_20_Text"><text:s text:c="4"/>)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text[:300]</text:span></text:p>
      <text:p text:style-name="P83"><text:span text:style-name="Source_20_Text"><text:s text:c="4"/>)</text:span></text:p>
      <text:p text:style-name="P83"/>
      <text:p text:style-name="P83"/>
      <text:p text:style-name="P83"/>
      <text:p text:style-name="P83"><text:span text:style-name="Source_20_Text">if __name__ == "__main__":</text:span></text:p>
      <text:p text:style-name="P83"/>
      <text:p text:style-name="P83"/>
      <text:p text:style-name="P83"><text:span text:style-name="Source_20_Text"><text:s text:c="4"/>url = (</text:span></text:p>
      <text:p text:style-name="P83"><text:span text:style-name="Source_20_Text"><text:s text:c="8"/>"https://example.com"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<text:s text:c="4"/>documents = load_web(url)</text:span></text:p>
      <text:p text:style-name="P83"/>
      <text:p text:style-name="P83"/>
      <text:p text:style-name="P83"><text:span text:style-name="Source_20_Text"><text:s text:c="4"/>for doc in documents:</text:span></text:p>
      <text:p text:style-name="P83"/>
      <text:p text:style-name="P84"><text:span text:style-name="Source_20_Text"><text:s text:c="8"/>analyze_document(doc)</text:span></text:p>
      <text:p text:style-name="P81"/>
      <text:h text:style-name="P78" text:outline-level="1">16. Expected Output</text:h>
      <text:p text:style-name="P83"><text:span text:style-name="Source_20_Text">Source:</text:span></text:p>
      <text:p text:style-name="P83"/>
      <text:p text:style-name="P83"><text:span text:style-name="Source_20_Text">https://example.com</text:span></text:p>
      <text:p text:style-name="P83"/>
      <text:p text:style-name="P83"/>
      <text:p text:style-name="P83"><text:span text:style-name="Source_20_Text">Characters:</text:span></text:p>
      <text:p text:style-name="P83"/>
      <text:p text:style-name="P83"><text:span text:style-name="Source_20_Text">125</text:span></text:p>
      <text:p text:style-name="P83"><text:soft-page-break/></text:p>
      <text:p text:style-name="P83"/>
      <text:p text:style-name="P83"><text:span text:style-name="Source_20_Text">Preview:</text:span></text:p>
      <text:p text:style-name="P83"/>
      <text:p text:style-name="P83"><text:span text:style-name="Source_20_Text">Example Domain</text:span></text:p>
      <text:p text:style-name="P83"/>
      <text:p text:style-name="P84"><text:span text:style-name="Source_20_Text">This domain is used...</text:span></text:p>
      <text:p text:style-name="P81"/>
      <text:h text:style-name="P78" text:outline-level="1">17. Test Cases</text:h>
      <text:h text:style-name="P85" text:outline-level="2">Test Case 1: Website đơn giản</text:h>
      <text:p text:style-name="P79">Input:</text:p>
      <text:p text:style-name="P84"><text:span text:style-name="Source_20_Text">https://example.com</text:span></text:p>
      <text:p text:style-name="P79">Expected:</text:p>
      <text:p text:style-name="P83"><text:span text:style-name="Source_20_Text">Document loaded successfully</text:span></text:p>
      <text:p text:style-name="P83"/>
      <text:p text:style-name="P84"><text:span text:style-name="Source_20_Text">Metadata contains source</text:span></text:p>
      <text:p text:style-name="P81"/>
      <text:h text:style-name="P85" text:outline-level="2">Test Case 2: Documentation Website</text:h>
      <text:p text:style-name="P79">Input:</text:p>
      <text:p text:style-name="P84"><text:span text:style-name="Source_20_Text">https://python.langchain.com</text:span></text:p>
      <text:p text:style-name="P79">Expected:</text:p>
      <text:p text:style-name="P83"><text:span text:style-name="Source_20_Text">Large text extracted</text:span></text:p>
      <text:p text:style-name="P83"/>
      <text:p text:style-name="P84"><text:span text:style-name="Source_20_Text">Multiple sections</text:span></text:p>
      <text:p text:style-name="P81"/>
      <text:h text:style-name="P85" text:outline-level="2">Test Case 3: Invalid URL</text:h>
      <text:p text:style-name="P79">Input:</text:p>
      <text:p text:style-name="P84"><text:span text:style-name="Source_20_Text">abc123</text:span></text:p>
      <text:p text:style-name="P79">Expected:</text:p>
      <text:p text:style-name="P83"><text:span text:style-name="Source_20_Text">ValueError:</text:span></text:p>
      <text:p text:style-name="P84"><text:span text:style-name="Source_20_Text">Invalid URL</text:span></text:p>
      <text:p text:style-name="P81"><text:soft-page-break/></text:p>
      <text:h text:style-name="P85" text:outline-level="2">Test Case 4: Website không tồn tại</text:h>
      <text:p text:style-name="P79">Input:</text:p>
      <text:p text:style-name="P84"><text:span text:style-name="Source_20_Text">https://not-existing-domain.com</text:span></text:p>
      <text:p text:style-name="P79">Expected:</text:p>
      <text:p text:style-name="P84"><text:span text:style-name="Source_20_Text">Connection error handled</text:span></text:p>
      <text:p text:style-name="P81"/>
      <text:h text:style-name="P85" text:outline-level="2">Test Case 5: Dynamic Website</text:h>
      <text:p text:style-name="P79">Input:</text:p>
      <text:p text:style-name="P79">Website sử dụng React:</text:p>
      <text:p text:style-name="P79">Expected:</text:p>
      <text:p text:style-name="P83"><text:span text:style-name="Source_20_Text">Content may be incomplete</text:span></text:p>
      <text:p text:style-name="P84"><text:span text:style-name="Source_20_Text">Need browser automation</text:span></text:p>
      <text:p text:style-name="P81"/>
      <text:h text:style-name="P78" text:outline-level="1">18. Bài tập thực hành</text:h>
      <text:h text:style-name="P85" text:outline-level="2">Exercise 1: Basic Web Loader</text:h>
      <text:p text:style-name="P79">Viết chương trình:</text:p>
      <text:p text:style-name="P79">Input:</text:p>
      <text:p text:style-name="P84"><text:span text:style-name="Source_20_Text">URL</text:span></text:p>
      <text:p text:style-name="P79">Output:</text:p>
      <text:p text:style-name="P83"><text:span text:style-name="Source_20_Text">Metadata</text:span></text:p>
      <text:p text:style-name="P83"/>
      <text:p text:style-name="P83"><text:span text:style-name="Source_20_Text">Content preview</text:span></text:p>
      <text:p text:style-name="P83"/>
      <text:p text:style-name="P84"><text:span text:style-name="Source_20_Text">Character count</text:span></text:p>
      <text:p text:style-name="P81"/>
      <text:h text:style-name="P85" text:outline-level="2">Exercise 2: Website Comparison</text:h>
      <text:p text:style-name="P79">Load:</text:p>
      <text:p text:style-name="P83"><text:span text:style-name="Source_20_Text">Documentation website</text:span></text:p>
      <text:p text:style-name="P83"><text:soft-page-break/></text:p>
      <text:p text:style-name="P84"><text:span text:style-name="Source_20_Text">Blog website</text:span></text:p>
      <text:p text:style-name="P79">So sánh:</text:p>
      <text:list text:style-name="L71">
        <text:list-item>
          <text:p text:style-name="P91">Content length</text:p>
        </text:list-item>
        <text:list-item>
          <text:p text:style-name="P91">Metadata</text:p>
        </text:list-item>
        <text:list-item>
          <text:p text:style-name="P91">Noise level</text:p>
        </text:list-item>
      </text:list>
      <text:p text:style-name="P81"/>
      <text:h text:style-name="P85" text:outline-level="2">Exercise 3: URL Validator</text:h>
      <text:p text:style-name="P79">Viết:</text:p>
      <text:p text:style-name="P84"><text:span text:style-name="Source_20_Text">validate_url(url)</text:span></text:p>
      <text:p text:style-name="P79">Kiểm tra:</text:p>
      <text:list text:style-name="L72">
        <text:list-item>
          <text:p text:style-name="P92">Missing protocol</text:p>
        </text:list-item>
        <text:list-item>
          <text:p text:style-name="P92">Invalid domain</text:p>
        </text:list-item>
        <text:list-item>
          <text:p text:style-name="P92">Empty URL</text:p>
        </text:list-item>
      </text:list>
      <text:p text:style-name="P81"/>
      <text:h text:style-name="P85" text:outline-level="2">Exercise 4: Prepare for RAG</text:h>
      <text:p text:style-name="P79">Xây pipeline:</text:p>
      <text:p text:style-name="P83"><text:span text:style-name="Source_20_Text">Website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WebBaseLoader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Document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Text Splitter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Embedding</text:span></text:p>
      <text:p text:style-name="P83"/>
      <text:p text:style-name="P83"><text:span text:style-name="Source_20_Text">↓</text:span></text:p>
      <text:p text:style-name="P83"><text:soft-page-break/></text:p>
      <text:p text:style-name="P84"><text:span text:style-name="Source_20_Text">Vector Database</text:span></text:p>
      <text:p text:style-name="P81"/>
      <text:h text:style-name="P78" text:outline-level="1">19. Tổng kết bài học</text:h>
      <text:p text:style-name="P79">Sau bài học, AI Engineer Intern có thể:</text:p>
      <text:h text:style-name="P85" text:outline-level="2">Knowledge</text:h>
      <text:list text:style-name="L73">
        <text:list-item>
          <text:p text:style-name="P93">Hiểu HTML structure.</text:p>
        </text:list-item>
        <text:list-item>
          <text:p text:style-name="P93">Hiểu web scraping.</text:p>
        </text:list-item>
        <text:list-item>
          <text:p text:style-name="P93">Hiểu BeautifulSoup.</text:p>
        </text:list-item>
        <text:list-item>
          <text:p text:style-name="P93">Hiểu WebBaseLoader.</text:p>
        </text:list-item>
        <text:list-item>
          <text:p text:style-name="P93">Hiểu vấn đề khi lấy dữ liệu website.</text:p>
        </text:list-item>
      </text:list>
      <text:h text:style-name="P85" text:outline-level="2">Coding Skills</text:h>
      <text:p text:style-name="P79">Có thể:</text:p>
      <text:list text:style-name="L74">
        <text:list-item>
          <text:p text:style-name="P94">Load URL bằng LangChain.</text:p>
        </text:list-item>
        <text:list-item>
          <text:p text:style-name="P94">Extract web content.</text:p>
        </text:list-item>
        <text:list-item>
          <text:p text:style-name="P94">Xử lý metadata.</text:p>
        </text:list-item>
        <text:list-item>
          <text:p text:style-name="P94">Validate URL.</text:p>
        </text:list-item>
        <text:list-item>
          <text:p text:style-name="P94">Handle crawling errors.</text:p>
        </text:list-item>
      </text:list>
      <text:h text:style-name="P85" text:outline-level="2">Chuẩn bị bài tiếp theo:</text:h>
      <text:p text:style-name="P83"><text:span text:style-name="Source_20_Text">Document Loaders</text:span></text:p>
      <text:p text:style-name="P83"/>
      <text:p text:style-name="P83"><text:span text:style-name="Source_20_Text">PDF</text:span></text:p>
      <text:p text:style-name="P83"><text:span text:style-name="Source_20_Text">DOCX</text:span></text:p>
      <text:p text:style-name="P83"><text:span text:style-name="Source_20_Text">Web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Document Object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Text Splitting</text:span></text:p>
      <text:p text:style-name="P83"/>
      <text:p text:style-name="P83"><text:span text:style-name="Source_20_Text"><text:s text:c="8"/>↓</text:span></text:p>
      <text:p text:style-name="P83"/>
      <text:p text:style-name="P84"><text:soft-page-break/><text:span text:style-name="Source_20_Text">RAG Pipeline</text:span></text:p>
      <text:p text:style-name="P76"/>
      <text:p text:style-name="P76"/>
      <text:p text:style-name="P95"><text:span text:style-name="T4"/></text:p>
      <text:p text:style-name="P76"/>
      <text:h text:style-name="Heading_20_1" text:outline-level="1"><text:span text:style-name="T5">7</text:span>. Mini Project Multi Source Loader</text:h>
      <text:h text:style-name="P77" text:outline-level="1">Mini Project: Multi Source Document Loader Pipeline using LangChain</text:h>
      <text:h text:style-name="P85" text:outline-level="2">1. Tổng quan Project</text:h>
      <text:h text:style-name="P85" text:outline-level="2">Mục tiêu</text:h>
      <text:p text:style-name="P79">Xây dựng một <text:span text:style-name="Strong_20_Emphasis">Document Ingestion Pipeline</text:span> có khả năng nhận nhiều loại dữ liệu đầu vào:</text:p>
      <text:list text:style-name="L75">
        <text:list-item>
          <text:p text:style-name="P96">PDF File</text:p>
        </text:list-item>
        <text:list-item>
          <text:p text:style-name="P96">DOCX File</text:p>
        </text:list-item>
        <text:list-item>
          <text:p text:style-name="P96">Website URL</text:p>
        </text:list-item>
      </text:list>
      <text:p text:style-name="P79">Hệ thống tự động:</text:p>
      <text:list text:style-name="L76">
        <text:list-item>
          <text:p text:style-name="P97">Detect loại dữ liệu.</text:p>
        </text:list-item>
        <text:list-item>
          <text:p text:style-name="P97">Chọn Document Loader phù hợp.</text:p>
        </text:list-item>
        <text:list-item>
          <text:p text:style-name="P97">Load dữ liệu.</text:p>
        </text:list-item>
        <text:list-item>
          <text:p text:style-name="P97">Convert thành LangChain Document Object.</text:p>
        </text:list-item>
        <text:list-item>
          <text:p text:style-name="P97">Phân tích kết quả:</text:p>
          <text:list>
            <text:list-item>
              <text:p text:style-name="P97">Document count.</text:p>
            </text:list-item>
            <text:list-item>
              <text:p text:style-name="P97">Metadata.</text:p>
            </text:list-item>
            <text:list-item>
              <text:p text:style-name="P97">Content preview.</text:p>
            </text:list-item>
            <text:list-item>
              <text:p text:style-name="P97">Character count.</text:p>
            </text:list-item>
          </text:list>
        </text:list-item>
      </text:list>
      <text:p text:style-name="P81"/>
      <text:h text:style-name="P78" text:outline-level="1">2. Kiến trúc hệ thống</text:h>
      <text:h text:style-name="P85" text:outline-level="2">High Level Architecture</text:h>
      <text:p text:style-name="P83"><text:span text:style-name="Source_20_Text"><text:s text:c="17"/>INPUT</text:span></text:p>
      <text:p text:style-name="P83"/>
      <text:p text:style-name="P83"><text:span text:style-name="Source_20_Text"><text:s text:c="8"/>┌──────────┼──────────┐</text:span></text:p>
      <text:p text:style-name="P83"><text:span text:style-name="Source_20_Text"><text:s text:c="8"/>│ <text:s text:c="9"/>│ <text:s text:c="9"/>│</text:span></text:p>
      <text:p text:style-name="P83"><text:soft-page-break/><text:span text:style-name="Source_20_Text"><text:s text:c="7"/>PDF <text:s text:c="7"/>DOCX <text:s text:c="6"/>URL</text:span></text:p>
      <text:p text:style-name="P83"/>
      <text:p text:style-name="P83"><text:span text:style-name="Source_20_Text"><text:s text:c="8"/>│ <text:s text:c="9"/>│ <text:s text:c="9"/>│</text:span></text:p>
      <text:p text:style-name="P83"/>
      <text:p text:style-name="P83"><text:span text:style-name="Source_20_Text"><text:s text:c="8"/>↓ <text:s text:c="9"/>↓ <text:s text:c="9"/>↓</text:span></text:p>
      <text:p text:style-name="P83"/>
      <text:p text:style-name="P83"/>
      <text:p text:style-name="P83"><text:span text:style-name="Source_20_Text"><text:s text:c="4"/>PyPDFLoader <text:s/>DocxLoader <text:s/>WebBaseLoader</text:span></text:p>
      <text:p text:style-name="P83"/>
      <text:p text:style-name="P83"/>
      <text:p text:style-name="P83"><text:span text:style-name="Source_20_Text"><text:s text:c="8"/>└──────────┼──────────┘</text:span></text:p>
      <text:p text:style-name="P83"/>
      <text:p text:style-name="P83"><text:span text:style-name="Source_20_Text"><text:s text:c="19"/>↓</text:span></text:p>
      <text:p text:style-name="P83"/>
      <text:p text:style-name="P83"><text:span text:style-name="Source_20_Text"><text:s text:c="10"/>Document Object List</text:span></text:p>
      <text:p text:style-name="P83"/>
      <text:p text:style-name="P83"><text:span text:style-name="Source_20_Text"><text:s text:c="19"/>↓</text:span></text:p>
      <text:p text:style-name="P83"/>
      <text:p text:style-name="P83"><text:span text:style-name="Source_20_Text"><text:s text:c="10"/>Document Analyzer</text:span></text:p>
      <text:p text:style-name="P83"/>
      <text:p text:style-name="P83"><text:span text:style-name="Source_20_Text"><text:s text:c="19"/>↓</text:span></text:p>
      <text:p text:style-name="P83"/>
      <text:p text:style-name="P83"><text:span text:style-name="Source_20_Text"><text:s text:c="14"/>Output Report</text:span></text:p>
      <text:p text:style-name="P84"/>
      <text:p text:style-name="P81"/>
      <text:h text:style-name="P78" text:outline-level="1">3. Công nghệ sử dụng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Component</text:p>
            </table:table-cell>
            <table:table-cell table:style-name="Table10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10.A1" office:value-type="string">
            <text:p text:style-name="Table_20_Contents">Language</text:p>
          </table:table-cell>
          <table:table-cell table:style-name="Table10.A1" office:value-type="string">
            <text:p text:style-name="Table_20_Contents">Python</text:p>
          </table:table-cell>
        </table:table-row>
        <table:table-row>
          <table:table-cell table:style-name="Table10.A1" office:value-type="string">
            <text:p text:style-name="Table_20_Contents">Framework</text:p>
          </table:table-cell>
          <table:table-cell table:style-name="Table10.A1" office:value-type="string">
            <text:p text:style-name="Table_20_Contents">LangChain</text:p>
          </table:table-cell>
        </table:table-row>
        <table:table-row>
          <table:table-cell table:style-name="Table10.A1" office:value-type="string">
            <text:p text:style-name="Table_20_Contents">PDF Loader</text:p>
          </table:table-cell>
          <table:table-cell table:style-name="Table10.A1" office:value-type="string">
            <text:p text:style-name="Table_20_Contents">PyPDFLoader</text:p>
          </table:table-cell>
        </table:table-row>
        <table:table-row>
          <table:table-cell table:style-name="Table10.A1" office:value-type="string">
            <text:p text:style-name="Table_20_Contents">Word Loader</text:p>
          </table:table-cell>
          <table:table-cell table:style-name="Table10.A1" office:value-type="string">
            <text:p text:style-name="Table_20_Contents">Docx2txtLoader</text:p>
          </table:table-cell>
        </table:table-row>
        <table:table-row>
          <table:table-cell table:style-name="Table10.A1" office:value-type="string">
            <text:p text:style-name="Table_20_Contents">Web Loader</text:p>
          </table:table-cell>
          <table:table-cell table:style-name="Table10.A1" office:value-type="string">
            <text:p text:style-name="Table_20_Contents">WebBaseLoader</text:p>
          </table:table-cell>
        </table:table-row>
        <table:table-row>
          <table:table-cell table:style-name="Table10.A1" office:value-type="string">
            <text:p text:style-name="Table_20_Contents">HTML Parser</text:p>
          </table:table-cell>
          <table:table-cell table:style-name="Table10.A1" office:value-type="string">
            <text:p text:style-name="Table_20_Contents">BeautifulSoup</text:p>
          </table:table-cell>
        </table:table-row>
        <table:table-row>
          <table:table-cell table:style-name="Table10.A1" office:value-type="string">
            <text:p text:style-name="Table_20_Contents">Package Manager</text:p>
          </table:table-cell>
          <table:table-cell table:style-name="Table10.A1" office:value-type="string">
            <text:p text:style-name="Table_20_Contents">pip</text:p>
          </table:table-cell>
        </table:table-row>
      </table:table>
      <text:p text:style-name="P81"/>
      <text:h text:style-name="P78" text:outline-level="1">4. Folder Structure</text:h>
      <text:p text:style-name="P83"><text:span text:style-name="Source_20_Text">multi_source_loader/</text:span></text:p>
      <text:p text:style-name="P83"/>
      <text:p text:style-name="P83"/>
      <text:p text:style-name="P83"><text:span text:style-name="Source_20_Text">│</text:span></text:p>
      <text:p text:style-name="P83"><text:span text:style-name="Source_20_Text">├── data/</text:span></text:p>
      <text:p text:style-name="P83"><text:span text:style-name="Source_20_Text">│</text:span></text:p>
      <text:p text:style-name="P83"><text:soft-page-break/><text:span text:style-name="Source_20_Text">│ <text:s text:c="2"/>├── sample.pdf</text:span></text:p>
      <text:p text:style-name="P83"><text:span text:style-name="Source_20_Text">│ <text:s text:c="2"/>└── sample.docx</text:span></text:p>
      <text:p text:style-name="P83"><text:span text:style-name="Source_20_Text">│</text:span></text:p>
      <text:p text:style-name="P83"><text:span text:style-name="Source_20_Text">│</text:span></text:p>
      <text:p text:style-name="P83"><text:span text:style-name="Source_20_Text">├── loaders/</text:span></text:p>
      <text:p text:style-name="P83"><text:span text:style-name="Source_20_Text">│</text:span></text:p>
      <text:p text:style-name="P83"><text:span text:style-name="Source_20_Text">│ <text:s text:c="2"/>├── __init__.py</text:span></text:p>
      <text:p text:style-name="P83"><text:span text:style-name="Source_20_Text">│ <text:s text:c="2"/>├── pdf_loader.py</text:span></text:p>
      <text:p text:style-name="P83"><text:span text:style-name="Source_20_Text">│ <text:s text:c="2"/>├── docx_loader.py</text:span></text:p>
      <text:p text:style-name="P83"><text:span text:style-name="Source_20_Text">│ <text:s text:c="2"/>└── web_loader.py</text:span></text:p>
      <text:p text:style-name="P83"><text:span text:style-name="Source_20_Text">│</text:span></text:p>
      <text:p text:style-name="P83"><text:span text:style-name="Source_20_Text">│</text:span></text:p>
      <text:p text:style-name="P83"><text:span text:style-name="Source_20_Text">├── utils/</text:span></text:p>
      <text:p text:style-name="P83"><text:span text:style-name="Source_20_Text">│</text:span></text:p>
      <text:p text:style-name="P83"><text:span text:style-name="Source_20_Text">│ <text:s text:c="2"/>├── __init__.py</text:span></text:p>
      <text:p text:style-name="P83"><text:span text:style-name="Source_20_Text">│ <text:s text:c="2"/>├── validator.py</text:span></text:p>
      <text:p text:style-name="P83"><text:span text:style-name="Source_20_Text">│ <text:s text:c="2"/>└── analyzer.py</text:span></text:p>
      <text:p text:style-name="P83"><text:span text:style-name="Source_20_Text">│</text:span></text:p>
      <text:p text:style-name="P83"><text:span text:style-name="Source_20_Text">│</text:span></text:p>
      <text:p text:style-name="P83"><text:span text:style-name="Source_20_Text">├── main.py</text:span></text:p>
      <text:p text:style-name="P83"><text:span text:style-name="Source_20_Text">│</text:span></text:p>
      <text:p text:style-name="P83"><text:span text:style-name="Source_20_Text">├── requirements.txt</text:span></text:p>
      <text:p text:style-name="P83"><text:span text:style-name="Source_20_Text">│</text:span></text:p>
      <text:p text:style-name="P83"><text:span text:style-name="Source_20_Text">└── README.md</text:span></text:p>
      <text:p text:style-name="P84"/>
      <text:p text:style-name="P81"/>
      <text:h text:style-name="P78" text:outline-level="1">5. Cài đặt môi trường</text:h>
      <text:h text:style-name="P85" text:outline-level="2">requirements.txt</text:h>
      <text:p text:style-name="P83"><text:span text:style-name="Source_20_Text">langchain</text:span></text:p>
      <text:p text:style-name="P83"><text:span text:style-name="Source_20_Text">langchain-community</text:span></text:p>
      <text:p text:style-name="P83"><text:span text:style-name="Source_20_Text">pypdf</text:span></text:p>
      <text:p text:style-name="P83"><text:span text:style-name="Source_20_Text">docx2txt</text:span></text:p>
      <text:p text:style-name="P84"><text:span text:style-name="Source_20_Text">beautifulsoup4</text:span></text:p>
      <text:p text:style-name="P79">Cài đặt:</text:p>
      <text:p text:style-name="P84"><text:span text:style-name="Source_20_Text">pip install -r requirements.txt</text:span></text:p>
      <text:p text:style-name="P81"/>
      <text:h text:style-name="P78" text:outline-level="1">6. Architecture Detail</text:h>
      <text:h text:style-name="P85" text:outline-level="2">Component 1: Input Detector</text:h>
      <text:p text:style-name="P79">Nhiệm vụ:</text:p>
      <text:p text:style-name="P79"><text:soft-page-break/>Nhận input:</text:p>
      <text:p text:style-name="P84"><text:span text:style-name="Source_20_Text">data/report.pdf</text:span></text:p>
      <text:p text:style-name="P79">hoặc:</text:p>
      <text:p text:style-name="P84"><text:span text:style-name="Source_20_Text">https://example.com</text:span></text:p>
      <text:p text:style-name="P79">Xác định:</text:p>
      <text:p text:style-name="P83"><text:span text:style-name="Source_20_Text">PDF</text:span></text:p>
      <text:p text:style-name="P83"/>
      <text:p text:style-name="P83"><text:span text:style-name="Source_20_Text">DOCX</text:span></text:p>
      <text:p text:style-name="P83"/>
      <text:p text:style-name="P84"><text:span text:style-name="Source_20_Text">URL</text:span></text:p>
      <text:p text:style-name="P81"/>
      <text:h text:style-name="P85" text:outline-level="2">Component 2: Loader Manager</text:h>
      <text:p text:style-name="P79">Mapping:</text:p>
      <text:p text:style-name="P83"><text:span text:style-name="Source_20_Text">PDF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PyPDFLoader</text:span></text:p>
      <text:p text:style-name="P83"/>
      <text:p text:style-name="P83"/>
      <text:p text:style-name="P83"/>
      <text:p text:style-name="P83"><text:span text:style-name="Source_20_Text">DOCX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Docx2txtLoader</text:span></text:p>
      <text:p text:style-name="P83"/>
      <text:p text:style-name="P83"/>
      <text:p text:style-name="P83"/>
      <text:p text:style-name="P83"><text:span text:style-name="Source_20_Text">URL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WebBaseLoader</text:span></text:p>
      <text:p text:style-name="P84"/>
      <text:p text:style-name="P81"/>
      <text:h text:style-name="P85" text:outline-level="2">Component 3: Document Analyzer</text:h>
      <text:p text:style-name="P79">Input:</text:p>
      <text:p text:style-name="P83"><text:soft-page-break/><text:span text:style-name="Source_20_Text">[</text:span></text:p>
      <text:p text:style-name="P83"><text:span text:style-name="Source_20_Text">Document(),</text:span></text:p>
      <text:p text:style-name="P83"><text:span text:style-name="Source_20_Text">Document()</text:span></text:p>
      <text:p text:style-name="P84"><text:span text:style-name="Source_20_Text">]</text:span></text:p>
      <text:p text:style-name="P79">Output:</text:p>
      <text:p text:style-name="P83"><text:span text:style-name="Source_20_Text">Document count:</text:span></text:p>
      <text:p text:style-name="P83"/>
      <text:p text:style-name="P83"><text:span text:style-name="Source_20_Text">5</text:span></text:p>
      <text:p text:style-name="P83"/>
      <text:p text:style-name="P83"/>
      <text:p text:style-name="P83"><text:span text:style-name="Source_20_Text">Metadata:</text:span></text:p>
      <text:p text:style-name="P83"/>
      <text:p text:style-name="P83"><text:span text:style-name="Source_20_Text">{</text:span></text:p>
      <text:p text:style-name="P83"><text:span text:style-name="Source_20_Text">source:"file.pdf",</text:span></text:p>
      <text:p text:style-name="P83"><text:span text:style-name="Source_20_Text">page:1</text:span></text:p>
      <text:p text:style-name="P83"><text:span text:style-name="Source_20_Text">}</text:span></text:p>
      <text:p text:style-name="P83"/>
      <text:p text:style-name="P83"/>
      <text:p text:style-name="P83"><text:span text:style-name="Source_20_Text">Content:</text:span></text:p>
      <text:p text:style-name="P83"/>
      <text:p text:style-name="P83"><text:span text:style-name="Source_20_Text">Introduction...</text:span></text:p>
      <text:p text:style-name="P83"/>
      <text:p text:style-name="P83"/>
      <text:p text:style-name="P83"><text:span text:style-name="Source_20_Text">Characters:</text:span></text:p>
      <text:p text:style-name="P83"/>
      <text:p text:style-name="P83"><text:span text:style-name="Source_20_Text">5000</text:span></text:p>
      <text:p text:style-name="P84"/>
      <text:p text:style-name="P81"/>
      <text:h text:style-name="P78" text:outline-level="1">7. Implement Loader Components</text:h>
      <text:h text:style-name="P78" text:outline-level="1">7.1. PDF Loader</text:h>
      <text:p text:style-name="P79">File:</text:p>
      <text:p text:style-name="P84"><text:span text:style-name="Source_20_Text">loaders/pdf_loader.py</text:span></text:p>
      <text:p text:style-name="P79">Code:</text:p>
      <text:p text:style-name="P83"><text:span text:style-name="Source_20_Text">from langchain_community.document_loaders import PyPDFLoader</text:span></text:p>
      <text:p text:style-name="P83"/>
      <text:p text:style-name="P83"/>
      <text:p text:style-name="P83"/>
      <text:p text:style-name="P83"><text:span text:style-name="Source_20_Text">def load_pdf(path):</text:span></text:p>
      <text:p text:style-name="P83"/>
      <text:p text:style-name="P83"><text:span text:style-name="Source_20_Text"><text:s text:c="4"/>loader = PyPDFLoader(path)</text:span></text:p>
      <text:p text:style-name="P83"/>
      <text:p text:style-name="P84"><text:soft-page-break/><text:span text:style-name="Source_20_Text"><text:s text:c="4"/>return loader.load()</text:span></text:p>
      <text:p text:style-name="P81"/>
      <text:h text:style-name="P78" text:outline-level="1">7.2. DOCX Loader</text:h>
      <text:p text:style-name="P79">File:</text:p>
      <text:p text:style-name="P84"><text:span text:style-name="Source_20_Text">loaders/docx_loader.py</text:span></text:p>
      <text:p text:style-name="P79">Code:</text:p>
      <text:p text:style-name="P83"><text:span text:style-name="Source_20_Text">from langchain_community.document_loaders import Docx2txtLoader</text:span></text:p>
      <text:p text:style-name="P83"/>
      <text:p text:style-name="P83"/>
      <text:p text:style-name="P83"/>
      <text:p text:style-name="P83"><text:span text:style-name="Source_20_Text">def load_docx(path):</text:span></text:p>
      <text:p text:style-name="P83"/>
      <text:p text:style-name="P83"><text:span text:style-name="Source_20_Text"><text:s text:c="4"/>loader = Docx2txtLoader(path)</text:span></text:p>
      <text:p text:style-name="P83"/>
      <text:p text:style-name="P84"><text:span text:style-name="Source_20_Text"><text:s text:c="4"/>return loader.load()</text:span></text:p>
      <text:p text:style-name="P81"/>
      <text:h text:style-name="P78" text:outline-level="1">7.3. Web Loader</text:h>
      <text:p text:style-name="P79">File:</text:p>
      <text:p text:style-name="P84"><text:span text:style-name="Source_20_Text">loaders/web_loader.py</text:span></text:p>
      <text:p text:style-name="P79">Code:</text:p>
      <text:p text:style-name="P83"><text:span text:style-name="Source_20_Text">from langchain_community.document_loaders import WebBaseLoader</text:span></text:p>
      <text:p text:style-name="P83"/>
      <text:p text:style-name="P83"/>
      <text:p text:style-name="P83"/>
      <text:p text:style-name="P83"><text:span text:style-name="Source_20_Text">def load_web(url):</text:span></text:p>
      <text:p text:style-name="P83"/>
      <text:p text:style-name="P83"><text:span text:style-name="Source_20_Text"><text:s text:c="4"/>loader = WebBaseLoader(url)</text:span></text:p>
      <text:p text:style-name="P83"/>
      <text:p text:style-name="P84"><text:span text:style-name="Source_20_Text"><text:s text:c="4"/>return loader.load()</text:span></text:p>
      <text:p text:style-name="P81"/>
      <text:h text:style-name="P78" text:outline-level="1">8. Input Validator</text:h>
      <text:p text:style-name="P79">File:</text:p>
      <text:p text:style-name="P84"><text:soft-page-break/><text:span text:style-name="Source_20_Text">utils/validator.py</text:span></text:p>
      <text:p text:style-name="P79">Code:</text:p>
      <text:p text:style-name="P83"><text:span text:style-name="Source_20_Text">import os</text:span></text:p>
      <text:p text:style-name="P83"><text:span text:style-name="Source_20_Text">from urllib.parse import urlparse</text:span></text:p>
      <text:p text:style-name="P83"/>
      <text:p text:style-name="P83"/>
      <text:p text:style-name="P83"/>
      <text:p text:style-name="P83"><text:span text:style-name="Source_20_Text">def is_url(value):</text:span></text:p>
      <text:p text:style-name="P83"/>
      <text:p text:style-name="P83"><text:span text:style-name="Source_20_Text"><text:s text:c="4"/>result = urlparse(value)</text:span></text:p>
      <text:p text:style-name="P83"/>
      <text:p text:style-name="P83"><text:span text:style-name="Source_20_Text"><text:s text:c="4"/>return all(</text:span></text:p>
      <text:p text:style-name="P83"><text:span text:style-name="Source_20_Text"><text:s text:c="8"/>[</text:span></text:p>
      <text:p text:style-name="P83"><text:span text:style-name="Source_20_Text"><text:s text:c="12"/>result.scheme,</text:span></text:p>
      <text:p text:style-name="P83"><text:span text:style-name="Source_20_Text"><text:s text:c="12"/>result.netloc</text:span></text:p>
      <text:p text:style-name="P83"><text:span text:style-name="Source_20_Text"><text:s text:c="8"/>]</text:span></text:p>
      <text:p text:style-name="P83"><text:span text:style-name="Source_20_Text"><text:s text:c="4"/>)</text:span></text:p>
      <text:p text:style-name="P83"/>
      <text:p text:style-name="P83"/>
      <text:p text:style-name="P83"/>
      <text:p text:style-name="P83"><text:span text:style-name="Source_20_Text">def detect_type(source):</text:span></text:p>
      <text:p text:style-name="P83"/>
      <text:p text:style-name="P83"/>
      <text:p text:style-name="P83"><text:span text:style-name="Source_20_Text"><text:s text:c="4"/>if is_url(source):</text:span></text:p>
      <text:p text:style-name="P83"/>
      <text:p text:style-name="P83"><text:span text:style-name="Source_20_Text"><text:s text:c="8"/>return "url"</text:span></text:p>
      <text:p text:style-name="P83"/>
      <text:p text:style-name="P83"/>
      <text:p text:style-name="P83"/>
      <text:p text:style-name="P83"><text:span text:style-name="Source_20_Text"><text:s text:c="4"/>if not os.path.exists(source):</text:span></text:p>
      <text:p text:style-name="P83"/>
      <text:p text:style-name="P83"><text:span text:style-name="Source_20_Text"><text:s text:c="8"/>raise FileNotFoundError(</text:span></text:p>
      <text:p text:style-name="P83"><text:span text:style-name="Source_20_Text"><text:s text:c="12"/>"Source does not exist"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4"/>extension = (</text:span></text:p>
      <text:p text:style-name="P83"><text:span text:style-name="Source_20_Text"><text:s text:c="8"/>os.path.splitext(source)[1]</text:span></text:p>
      <text:p text:style-name="P83"><text:span text:style-name="Source_20_Text"><text:s text:c="8"/>.lower()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<text:s text:c="4"/>if extension == ".pdf":</text:span></text:p>
      <text:p text:style-name="P83"/>
      <text:p text:style-name="P83"><text:span text:style-name="Source_20_Text"><text:s text:c="8"/>return "pdf"</text:span></text:p>
      <text:p text:style-name="P83"/>
      <text:p text:style-name="P83"/>
      <text:p text:style-name="P83"><text:soft-page-break/><text:span text:style-name="Source_20_Text"><text:s text:c="4"/>elif extension == ".docx":</text:span></text:p>
      <text:p text:style-name="P83"/>
      <text:p text:style-name="P83"><text:span text:style-name="Source_20_Text"><text:s text:c="8"/>return "docx"</text:span></text:p>
      <text:p text:style-name="P83"/>
      <text:p text:style-name="P83"/>
      <text:p text:style-name="P83"><text:span text:style-name="Source_20_Text"><text:s text:c="4"/>else:</text:span></text:p>
      <text:p text:style-name="P83"/>
      <text:p text:style-name="P83"><text:span text:style-name="Source_20_Text"><text:s text:c="8"/>raise ValueError(</text:span></text:p>
      <text:p text:style-name="P83"><text:span text:style-name="Source_20_Text"><text:s text:c="12"/>"Unsupported file type"</text:span></text:p>
      <text:p text:style-name="P83"><text:span text:style-name="Source_20_Text"><text:s text:c="8"/>)</text:span></text:p>
      <text:p text:style-name="P84"/>
      <text:p text:style-name="P81"/>
      <text:h text:style-name="P78" text:outline-level="1">9. Document Analyzer</text:h>
      <text:p text:style-name="P79">File:</text:p>
      <text:p text:style-name="P84"><text:span text:style-name="Source_20_Text">utils/analyzer.py</text:span></text:p>
      <text:p text:style-name="P79">Code:</text:p>
      <text:p text:style-name="P83"><text:span text:style-name="Source_20_Text">def analyze_documents(documents):</text:span></text:p>
      <text:p text:style-name="P83"/>
      <text:p text:style-name="P83"/>
      <text:p text:style-name="P83"><text:span text:style-name="Source_20_Text"><text:s text:c="4"/>print("\n===================")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"Document count:",</text:span></text:p>
      <text:p text:style-name="P83"><text:span text:style-name="Source_20_Text"><text:s text:c="8"/>len(documents)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<text:s text:c="4"/>total_chars = 0</text:span></text:p>
      <text:p text:style-name="P83"/>
      <text:p text:style-name="P83"/>
      <text:p text:style-name="P83"><text:span text:style-name="Source_20_Text"><text:s text:c="4"/>for index, doc in enumerate(documents):</text:span></text:p>
      <text:p text:style-name="P83"/>
      <text:p text:style-name="P83"/>
      <text:p text:style-name="P83"><text:span text:style-name="Source_20_Text"><text:s text:c="8"/>print(</text:span></text:p>
      <text:p text:style-name="P83"><text:span text:style-name="Source_20_Text"><text:s text:c="12"/>"\nDocument:",</text:span></text:p>
      <text:p text:style-name="P83"><text:span text:style-name="Source_20_Text"><text:s text:c="12"/>index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print(</text:span></text:p>
      <text:p text:style-name="P83"><text:span text:style-name="Source_20_Text"><text:s text:c="12"/>"Metadata:"</text:span></text:p>
      <text:p text:style-name="P83"><text:span text:style-name="Source_20_Text"><text:s text:c="8"/>)</text:span></text:p>
      <text:p text:style-name="P83"/>
      <text:p text:style-name="P83"><text:soft-page-break/></text:p>
      <text:p text:style-name="P83"><text:span text:style-name="Source_20_Text"><text:s text:c="8"/>print(</text:span></text:p>
      <text:p text:style-name="P83"><text:span text:style-name="Source_20_Text"><text:s text:c="12"/>doc.metadata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preview = (</text:span></text:p>
      <text:p text:style-name="P83"><text:span text:style-name="Source_20_Text"><text:s text:c="12"/>doc.page_content[:200]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print(</text:span></text:p>
      <text:p text:style-name="P83"><text:span text:style-name="Source_20_Text"><text:s text:c="12"/>"Content preview:"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print(</text:span></text:p>
      <text:p text:style-name="P83"><text:span text:style-name="Source_20_Text"><text:s text:c="12"/>preview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chars = len(</text:span></text:p>
      <text:p text:style-name="P83"><text:span text:style-name="Source_20_Text"><text:s text:c="12"/>doc.page_content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print(</text:span></text:p>
      <text:p text:style-name="P83"><text:span text:style-name="Source_20_Text"><text:s text:c="12"/>"Characters:",</text:span></text:p>
      <text:p text:style-name="P83"><text:span text:style-name="Source_20_Text"><text:s text:c="12"/>chars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total_chars += chars</text:span></text:p>
      <text:p text:style-name="P83"/>
      <text:p text:style-name="P83"/>
      <text:p text:style-name="P83"/>
      <text:p text:style-name="P83"><text:span text:style-name="Source_20_Text"><text:s text:c="4"/>print(</text:span></text:p>
      <text:p text:style-name="P83"><text:span text:style-name="Source_20_Text"><text:s text:c="8"/>"\nTotal characters:",</text:span></text:p>
      <text:p text:style-name="P83"><text:span text:style-name="Source_20_Text"><text:s text:c="8"/>total_chars</text:span></text:p>
      <text:p text:style-name="P83"><text:span text:style-name="Source_20_Text"><text:s text:c="4"/>)</text:span></text:p>
      <text:p text:style-name="P84"/>
      <text:p text:style-name="P81"/>
      <text:h text:style-name="P78" text:outline-level="1">10. Main Pipeline</text:h>
      <text:p text:style-name="P79">File:</text:p>
      <text:p text:style-name="P84"><text:span text:style-name="Source_20_Text">main.py</text:span></text:p>
      <text:p text:style-name="P79"><text:soft-page-break/>Code:</text:p>
      <text:p text:style-name="P83"><text:span text:style-name="Source_20_Text">from utils.validator import detect_type</text:span></text:p>
      <text:p text:style-name="P83"/>
      <text:p text:style-name="P83"><text:span text:style-name="Source_20_Text">from loaders.pdf_loader import load_pdf</text:span></text:p>
      <text:p text:style-name="P83"><text:span text:style-name="Source_20_Text">from loaders.docx_loader import load_docx</text:span></text:p>
      <text:p text:style-name="P83"><text:span text:style-name="Source_20_Text">from loaders.web_loader import load_web</text:span></text:p>
      <text:p text:style-name="P83"/>
      <text:p text:style-name="P83"><text:span text:style-name="Source_20_Text">from utils.analyzer import analyze_documents</text:span></text:p>
      <text:p text:style-name="P83"/>
      <text:p text:style-name="P83"/>
      <text:p text:style-name="P83"/>
      <text:p text:style-name="P83"><text:span text:style-name="Source_20_Text">def load_source(source):</text:span></text:p>
      <text:p text:style-name="P83"/>
      <text:p text:style-name="P83"/>
      <text:p text:style-name="P83"><text:span text:style-name="Source_20_Text"><text:s text:c="4"/>source_type = detect_type(source)</text:span></text:p>
      <text:p text:style-name="P83"/>
      <text:p text:style-name="P83"/>
      <text:p text:style-name="P83"/>
      <text:p text:style-name="P83"><text:span text:style-name="Source_20_Text"><text:s text:c="4"/>if source_type == "pdf":</text:span></text:p>
      <text:p text:style-name="P83"/>
      <text:p text:style-name="P83"><text:span text:style-name="Source_20_Text"><text:s text:c="8"/>return load_pdf(source)</text:span></text:p>
      <text:p text:style-name="P83"/>
      <text:p text:style-name="P83"/>
      <text:p text:style-name="P83"/>
      <text:p text:style-name="P83"><text:span text:style-name="Source_20_Text"><text:s text:c="4"/>elif source_type == "docx":</text:span></text:p>
      <text:p text:style-name="P83"/>
      <text:p text:style-name="P83"><text:span text:style-name="Source_20_Text"><text:s text:c="8"/>return load_docx(source)</text:span></text:p>
      <text:p text:style-name="P83"/>
      <text:p text:style-name="P83"/>
      <text:p text:style-name="P83"/>
      <text:p text:style-name="P83"><text:span text:style-name="Source_20_Text"><text:s text:c="4"/>elif source_type == "url":</text:span></text:p>
      <text:p text:style-name="P83"/>
      <text:p text:style-name="P83"><text:span text:style-name="Source_20_Text"><text:s text:c="8"/>return load_web(source)</text:span></text:p>
      <text:p text:style-name="P83"/>
      <text:p text:style-name="P83"/>
      <text:p text:style-name="P83"/>
      <text:p text:style-name="P83"/>
      <text:p text:style-name="P83"><text:span text:style-name="Source_20_Text">if __name__ == "__main__":</text:span></text:p>
      <text:p text:style-name="P83"/>
      <text:p text:style-name="P83"/>
      <text:p text:style-name="P83"><text:span text:style-name="Source_20_Text"><text:s text:c="4"/>source = (</text:span></text:p>
      <text:p text:style-name="P83"><text:span text:style-name="Source_20_Text"><text:s text:c="8"/>"data/sample.pdf"</text:span></text:p>
      <text:p text:style-name="P83"><text:span text:style-name="Source_20_Text"><text:s text:c="4"/>)</text:span></text:p>
      <text:p text:style-name="P83"/>
      <text:p text:style-name="P83"/>
      <text:p text:style-name="P83"><text:span text:style-name="Source_20_Text"><text:s text:c="4"/>try:</text:span></text:p>
      <text:p text:style-name="P83"/>
      <text:p text:style-name="P83"/>
      <text:p text:style-name="P83"><text:soft-page-break/><text:span text:style-name="Source_20_Text"><text:s text:c="8"/>documents = load_source(</text:span></text:p>
      <text:p text:style-name="P83"><text:span text:style-name="Source_20_Text"><text:s text:c="12"/>source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8"/>analyze_documents(</text:span></text:p>
      <text:p text:style-name="P83"><text:span text:style-name="Source_20_Text"><text:s text:c="12"/>documents</text:span></text:p>
      <text:p text:style-name="P83"><text:span text:style-name="Source_20_Text"><text:s text:c="8"/>)</text:span></text:p>
      <text:p text:style-name="P83"/>
      <text:p text:style-name="P83"/>
      <text:p text:style-name="P83"><text:span text:style-name="Source_20_Text"><text:s text:c="4"/>except Exception as e:</text:span></text:p>
      <text:p text:style-name="P83"/>
      <text:p text:style-name="P83"/>
      <text:p text:style-name="P83"><text:span text:style-name="Source_20_Text"><text:s text:c="8"/>print(</text:span></text:p>
      <text:p text:style-name="P83"><text:span text:style-name="Source_20_Text"><text:s text:c="12"/>"Error:",</text:span></text:p>
      <text:p text:style-name="P83"><text:span text:style-name="Source_20_Text"><text:s text:c="12"/>e</text:span></text:p>
      <text:p text:style-name="P83"><text:span text:style-name="Source_20_Text"><text:s text:c="8"/>)</text:span></text:p>
      <text:p text:style-name="P84"/>
      <text:p text:style-name="P81"/>
      <text:h text:style-name="P78" text:outline-level="1">11. Execution Example</text:h>
      <text:h text:style-name="P85" text:outline-level="2">Case 1: PDF</text:h>
      <text:p text:style-name="P79">Input:</text:p>
      <text:p text:style-name="P84"><text:span text:style-name="Source_20_Text">source = "data/sample.pdf"</text:span></text:p>
      <text:p text:style-name="P79">Output:</text:p>
      <text:p text:style-name="P83"><text:span text:style-name="Source_20_Text">===================</text:span></text:p>
      <text:p text:style-name="P83"/>
      <text:p text:style-name="P83"><text:span text:style-name="Source_20_Text">Document count: 5</text:span></text:p>
      <text:p text:style-name="P83"/>
      <text:p text:style-name="P83"/>
      <text:p text:style-name="P83"><text:span text:style-name="Source_20_Text">Document:0</text:span></text:p>
      <text:p text:style-name="P83"/>
      <text:p text:style-name="P83"><text:span text:style-name="Source_20_Text">Metadata:</text:span></text:p>
      <text:p text:style-name="P83"/>
      <text:p text:style-name="P83"><text:span text:style-name="Source_20_Text">{</text:span></text:p>
      <text:p text:style-name="P83"><text:span text:style-name="Source_20_Text">'source':'sample.pdf',</text:span></text:p>
      <text:p text:style-name="P83"><text:span text:style-name="Source_20_Text">'page':0</text:span></text:p>
      <text:p text:style-name="P83"><text:span text:style-name="Source_20_Text">}</text:span></text:p>
      <text:p text:style-name="P83"/>
      <text:p text:style-name="P83"/>
      <text:p text:style-name="P83"><text:span text:style-name="Source_20_Text">Content preview:</text:span></text:p>
      <text:p text:style-name="P83"/>
      <text:p text:style-name="P83"><text:span text:style-name="Source_20_Text">Introduction to AI...</text:span></text:p>
      <text:p text:style-name="P83"><text:soft-page-break/></text:p>
      <text:p text:style-name="P83"/>
      <text:p text:style-name="P83"><text:span text:style-name="Source_20_Text">Characters:</text:span></text:p>
      <text:p text:style-name="P83"/>
      <text:p text:style-name="P84"><text:span text:style-name="Source_20_Text">500</text:span></text:p>
      <text:p text:style-name="P81"/>
      <text:h text:style-name="P78" text:outline-level="1">Case 2: DOCX</text:h>
      <text:p text:style-name="P79">Input:</text:p>
      <text:p text:style-name="P84"><text:span text:style-name="Source_20_Text">source="data/report.docx"</text:span></text:p>
      <text:p text:style-name="P79">Output:</text:p>
      <text:p text:style-name="P83"><text:span text:style-name="Source_20_Text">Document count:</text:span></text:p>
      <text:p text:style-name="P83"/>
      <text:p text:style-name="P83"><text:span text:style-name="Source_20_Text">1</text:span></text:p>
      <text:p text:style-name="P83"/>
      <text:p text:style-name="P83"/>
      <text:p text:style-name="P83"><text:span text:style-name="Source_20_Text">Metadata:</text:span></text:p>
      <text:p text:style-name="P83"/>
      <text:p text:style-name="P83"><text:span text:style-name="Source_20_Text">{</text:span></text:p>
      <text:p text:style-name="P83"><text:span text:style-name="Source_20_Text">'source':'report.docx'</text:span></text:p>
      <text:p text:style-name="P83"><text:span text:style-name="Source_20_Text">}</text:span></text:p>
      <text:p text:style-name="P83"/>
      <text:p text:style-name="P83"/>
      <text:p text:style-name="P83"><text:span text:style-name="Source_20_Text">Content preview:</text:span></text:p>
      <text:p text:style-name="P83"/>
      <text:p text:style-name="P84"><text:span text:style-name="Source_20_Text">Project report...</text:span></text:p>
      <text:p text:style-name="P81"/>
      <text:h text:style-name="P78" text:outline-level="1">Case 3: Website</text:h>
      <text:p text:style-name="P79">Input:</text:p>
      <text:p text:style-name="P84"><text:span text:style-name="Source_20_Text">source="https://example.com"</text:span></text:p>
      <text:p text:style-name="P79">Output:</text:p>
      <text:p text:style-name="P83"><text:span text:style-name="Source_20_Text">Document count:</text:span></text:p>
      <text:p text:style-name="P83"/>
      <text:p text:style-name="P83"><text:span text:style-name="Source_20_Text">1</text:span></text:p>
      <text:p text:style-name="P83"/>
      <text:p text:style-name="P83"/>
      <text:p text:style-name="P83"><text:span text:style-name="Source_20_Text">Metadata:</text:span></text:p>
      <text:p text:style-name="P83"/>
      <text:p text:style-name="P83"><text:span text:style-name="Source_20_Text">{</text:span></text:p>
      <text:p text:style-name="P83"><text:soft-page-break/><text:span text:style-name="Source_20_Text">'source':</text:span></text:p>
      <text:p text:style-name="P83"><text:span text:style-name="Source_20_Text">'https://example.com'</text:span></text:p>
      <text:p text:style-name="P83"><text:span text:style-name="Source_20_Text">}</text:span></text:p>
      <text:p text:style-name="P83"/>
      <text:p text:style-name="P83"/>
      <text:p text:style-name="P83"><text:span text:style-name="Source_20_Text">Content preview:</text:span></text:p>
      <text:p text:style-name="P83"/>
      <text:p text:style-name="P84"><text:span text:style-name="Source_20_Text">Example Domain...</text:span></text:p>
      <text:p text:style-name="P81"/>
      <text:h text:style-name="P78" text:outline-level="1">12. Error Handling</text:h>
      <text:h text:style-name="P85" text:outline-level="2">12.1. File không tồn tại</text:h>
      <text:p text:style-name="P79">Input:</text:p>
      <text:p text:style-name="P84"><text:span text:style-name="Source_20_Text">source="data/not_found.pdf"</text:span></text:p>
      <text:p text:style-name="P79">Error:</text:p>
      <text:p text:style-name="P84"><text:span text:style-name="Source_20_Text">FileNotFoundError</text:span></text:p>
      <text:p text:style-name="P79">Xử lý:</text:p>
      <text:p text:style-name="P83"><text:span text:style-name="Source_20_Text">try:</text:span></text:p>
      <text:p text:style-name="P83"/>
      <text:p text:style-name="P83"><text:span text:style-name="Source_20_Text"><text:s text:c="4"/>documents = load_source(source)</text:span></text:p>
      <text:p text:style-name="P83"/>
      <text:p text:style-name="P83"><text:span text:style-name="Source_20_Text">except FileNotFoundError as e:</text:span></text:p>
      <text:p text:style-name="P83"/>
      <text:p text:style-name="P84"><text:span text:style-name="Source_20_Text"><text:s text:c="4"/>print(e)</text:span></text:p>
      <text:p text:style-name="P81"/>
      <text:h text:style-name="P78" text:outline-level="1">12.2. Unsupported File</text:h>
      <text:p text:style-name="P79">Input:</text:p>
      <text:p text:style-name="P84"><text:span text:style-name="Source_20_Text">image.png</text:span></text:p>
      <text:p text:style-name="P79">Output:</text:p>
      <text:p text:style-name="P83"><text:span text:style-name="Source_20_Text">ValueError:</text:span></text:p>
      <text:p text:style-name="P83"/>
      <text:p text:style-name="P84"><text:span text:style-name="Source_20_Text">Unsupported file type</text:span></text:p>
      <text:p text:style-name="P81"/>
      <text:h text:style-name="P78" text:outline-level="1"><text:soft-page-break/>12.3. Invalid URL</text:h>
      <text:p text:style-name="P79">Input:</text:p>
      <text:p text:style-name="P84"><text:span text:style-name="Source_20_Text">abc123</text:span></text:p>
      <text:p text:style-name="P79">Output:</text:p>
      <text:p text:style-name="P84"><text:span text:style-name="Source_20_Text">Invalid URL</text:span></text:p>
      <text:p text:style-name="P81"/>
      <text:h text:style-name="P78" text:outline-level="1">12.4. Website không truy cập được</text:h>
      <text:p text:style-name="P79">Input:</text:p>
      <text:p text:style-name="P84"><text:span text:style-name="Source_20_Text">https://invalid-domain.com</text:span></text:p>
      <text:p text:style-name="P79">Output:</text:p>
      <text:p text:style-name="P84"><text:span text:style-name="Source_20_Text">Connection Error</text:span></text:p>
      <text:p text:style-name="P79">Xử lý:</text:p>
      <text:p text:style-name="P83"><text:span text:style-name="Source_20_Text">try:</text:span></text:p>
      <text:p text:style-name="P83"/>
      <text:p text:style-name="P83"><text:span text:style-name="Source_20_Text"><text:s text:c="4"/>documents = load_web(url)</text:span></text:p>
      <text:p text:style-name="P83"/>
      <text:p text:style-name="P83"/>
      <text:p text:style-name="P83"><text:span text:style-name="Source_20_Text">except Exception:</text:span></text:p>
      <text:p text:style-name="P83"/>
      <text:p text:style-name="P83"><text:span text:style-name="Source_20_Text"><text:s text:c="4"/>print(</text:span></text:p>
      <text:p text:style-name="P83"><text:span text:style-name="Source_20_Text"><text:s text:c="8"/>"Cannot load website"</text:span></text:p>
      <text:p text:style-name="P84"><text:span text:style-name="Source_20_Text"><text:s text:c="4"/>)</text:span></text:p>
      <text:p text:style-name="P81"/>
      <text:h text:style-name="P78" text:outline-level="1">13. Nâng cấp Architecture cho Production</text:h>
      <text:p text:style-name="P79">Hiện tại:</text:p>
      <text:p text:style-name="P83"><text:span text:style-name="Source_20_Text">Input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Loader</text:span></text:p>
      <text:p text:style-name="P83"/>
      <text:p text:style-name="P83"><text:span text:style-name="Source_20_Text">↓</text:span></text:p>
      <text:p text:style-name="P83"/>
      <text:p text:style-name="P84"><text:span text:style-name="Source_20_Text">Document</text:span></text:p>
      <text:p text:style-name="P79"><text:soft-page-break/>Production:</text:p>
      <text:p text:style-name="P83"><text:span text:style-name="Source_20_Text">Input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Validator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Loader Factory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Document Cleaner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Text Splitter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Embedding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Vector Database</text:span></text:p>
      <text:p text:style-name="P83"/>
      <text:p text:style-name="P83"><text:span text:style-name="Source_20_Text">↓</text:span></text:p>
      <text:p text:style-name="P83"/>
      <text:p text:style-name="P83"><text:span text:style-name="Source_20_Text">Retriever</text:span></text:p>
      <text:p text:style-name="P83"/>
      <text:p text:style-name="P83"><text:span text:style-name="Source_20_Text">↓</text:span></text:p>
      <text:p text:style-name="P83"/>
      <text:p text:style-name="P84"><text:span text:style-name="Source_20_Text">LLM</text:span></text:p>
      <text:p text:style-name="P81"/>
      <text:h text:style-name="P78" text:outline-level="1">14. Loader Factory Pattern</text:h>
      <text:p text:style-name="P79">Thay vì:</text:p>
      <text:p text:style-name="P83"><text:span text:style-name="Source_20_Text">if pdf:</text:span></text:p>
      <text:p text:style-name="P83"><text:span text:style-name="Source_20_Text"><text:s text:c="4"/>loader = PyPDFLoader</text:span></text:p>
      <text:p text:style-name="P83"/>
      <text:p text:style-name="P83"><text:span text:style-name="Source_20_Text">if docx:</text:span></text:p>
      <text:p text:style-name="P84"><text:span text:style-name="Source_20_Text"><text:s text:c="4"/>loader = DocxLoader</text:span></text:p>
      <text:p text:style-name="P79">Có thể:</text:p>
      <text:p text:style-name="P83"><text:soft-page-break/><text:span text:style-name="Source_20_Text">class LoaderFactory:</text:span></text:p>
      <text:p text:style-name="P83"/>
      <text:p text:style-name="P83"/>
      <text:p text:style-name="P83"><text:span text:style-name="Source_20_Text"><text:s text:c="4"/>def create(type):</text:span></text:p>
      <text:p text:style-name="P83"/>
      <text:p text:style-name="P83"><text:span text:style-name="Source_20_Text"><text:s text:c="8"/>if type=="pdf":</text:span></text:p>
      <text:p text:style-name="P83"/>
      <text:p text:style-name="P83"><text:span text:style-name="Source_20_Text"><text:s text:c="12"/>return PDFLoader()</text:span></text:p>
      <text:p text:style-name="P83"/>
      <text:p text:style-name="P83"/>
      <text:p text:style-name="P83"><text:span text:style-name="Source_20_Text"><text:s text:c="8"/>if type=="docx":</text:span></text:p>
      <text:p text:style-name="P83"/>
      <text:p text:style-name="P83"><text:span text:style-name="Source_20_Text"><text:s text:c="12"/>return DOCXLoader()</text:span></text:p>
      <text:p text:style-name="P84"/>
      <text:p text:style-name="P79">Lợi ích:</text:p>
      <text:list text:style-name="L77">
        <text:list-item>
          <text:p text:style-name="P98">Dễ mở rộng.</text:p>
        </text:list-item>
        <text:list-item>
          <text:p text:style-name="P98">Code clean hơn.</text:p>
        </text:list-item>
        <text:list-item>
          <text:p text:style-name="P98">Dễ maintain.</text:p>
        </text:list-item>
      </text:list>
      <text:p text:style-name="P81"/>
      <text:h text:style-name="P78" text:outline-level="1">15. Testing Checklist</text:h>
      <text:h text:style-name="P78" text:outline-level="1">A. PDF Testing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Test</text:p>
            </table:table-cell>
            <table:table-cell table:style-name="Table11.A1" office:value-type="string">
              <text:p text:style-name="Table_20_Heading">Expected</text:p>
            </table:table-cell>
          </table:table-row>
        </table:table-header-rows>
        <table:table-row>
          <table:table-cell table:style-name="Table11.A1" office:value-type="string">
            <text:p text:style-name="Table_20_Contents">PDF 1 page</text:p>
          </table:table-cell>
          <table:table-cell table:style-name="Table11.A1" office:value-type="string">
            <text:p text:style-name="Table_20_Contents">Load success</text:p>
          </table:table-cell>
        </table:table-row>
        <table:table-row>
          <table:table-cell table:style-name="Table11.A1" office:value-type="string">
            <text:p text:style-name="Table_20_Contents">PDF 10 pages</text:p>
          </table:table-cell>
          <table:table-cell table:style-name="Table11.A1" office:value-type="string">
            <text:p text:style-name="Table_20_Contents">Document count = pages</text:p>
          </table:table-cell>
        </table:table-row>
        <table:table-row>
          <table:table-cell table:style-name="Table11.A1" office:value-type="string">
            <text:p text:style-name="Table_20_Contents">Empty PDF</text:p>
          </table:table-cell>
          <table:table-cell table:style-name="Table11.A1" office:value-type="string">
            <text:p text:style-name="Table_20_Contents">Handle empty content</text:p>
          </table:table-cell>
        </table:table-row>
        <table:table-row>
          <table:table-cell table:style-name="Table11.A1" office:value-type="string">
            <text:p text:style-name="Table_20_Contents">Corrupted PDF</text:p>
          </table:table-cell>
          <table:table-cell table:style-name="Table11.A1" office:value-type="string">
            <text:p text:style-name="Table_20_Contents">Raise exception</text:p>
          </table:table-cell>
        </table:table-row>
        <table:table-row>
          <table:table-cell table:style-name="Table11.A1" office:value-type="string">
            <text:p text:style-name="Table_20_Contents">Scan PDF</text:p>
          </table:table-cell>
          <table:table-cell table:style-name="Table11.A1" office:value-type="string">
            <text:p text:style-name="Table_20_Contents">Detect no text</text:p>
          </table:table-cell>
        </table:table-row>
      </table:table>
      <text:p text:style-name="P81"/>
      <text:h text:style-name="P78" text:outline-level="1">B. DOCX Testing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Test</text:p>
            </table:table-cell>
            <table:table-cell table:style-name="Table12.A1" office:value-type="string">
              <text:p text:style-name="Table_20_Heading">Expected</text:p>
            </table:table-cell>
          </table:table-row>
        </table:table-header-rows>
        <table:table-row>
          <table:table-cell table:style-name="Table12.A1" office:value-type="string">
            <text:p text:style-name="Table_20_Contents">Simple DOCX</text:p>
          </table:table-cell>
          <table:table-cell table:style-name="Table12.A1" office:value-type="string">
            <text:p text:style-name="Table_20_Contents">Extract text</text:p>
          </table:table-cell>
        </table:table-row>
        <table:table-row>
          <table:table-cell table:style-name="Table12.A1" office:value-type="string">
            <text:p text:style-name="Table_20_Contents">Large DOCX</text:p>
          </table:table-cell>
          <table:table-cell table:style-name="Table12.A1" office:value-type="string">
            <text:p text:style-name="Table_20_Contents">Load success</text:p>
          </table:table-cell>
        </table:table-row>
        <table:table-row>
          <table:table-cell table:style-name="Table12.A1" office:value-type="string">
            <text:p text:style-name="Table_20_Contents">Empty DOCX</text:p>
          </table:table-cell>
          <table:table-cell table:style-name="Table12.A1" office:value-type="string">
            <text:p text:style-name="Table_20_Contents">Empty content</text:p>
          </table:table-cell>
        </table:table-row>
        <table:table-row>
          <table:table-cell table:style-name="Table12.A1" office:value-type="string">
            <text:p text:style-name="Table_20_Contents">DOCX with table</text:p>
          </table:table-cell>
          <table:table-cell table:style-name="Table12.A1" office:value-type="string">
            <text:p text:style-name="Table_20_Contents">Text extracted</text:p>
          </table:table-cell>
        </table:table-row>
        <table:table-row>
          <table:table-cell table:style-name="Table12.A1" office:value-type="string">
            <text:p text:style-name="Table_20_Contents">Invalid DOCX</text:p>
          </table:table-cell>
          <table:table-cell table:style-name="Table12.A1" office:value-type="string">
            <text:p text:style-name="Table_20_Contents">Error handled</text:p>
          </table:table-cell>
        </table:table-row>
      </table:table>
      <text:p text:style-name="P81"/>
      <text:h text:style-name="P78" text:outline-level="1"><text:soft-page-break/>C. Website Testing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Test</text:p>
            </table:table-cell>
            <table:table-cell table:style-name="Table13.A1" office:value-type="string">
              <text:p text:style-name="Table_20_Heading">Expected</text:p>
            </table:table-cell>
          </table:table-row>
        </table:table-header-rows>
        <table:table-row>
          <table:table-cell table:style-name="Table13.A1" office:value-type="string">
            <text:p text:style-name="Table_20_Contents">Valid URL</text:p>
          </table:table-cell>
          <table:table-cell table:style-name="Table13.A1" office:value-type="string">
            <text:p text:style-name="Table_20_Contents">Load success</text:p>
          </table:table-cell>
        </table:table-row>
        <table:table-row>
          <table:table-cell table:style-name="Table13.A1" office:value-type="string">
            <text:p text:style-name="Table_20_Contents">Invalid URL</text:p>
          </table:table-cell>
          <table:table-cell table:style-name="Table13.A1" office:value-type="string">
            <text:p text:style-name="Table_20_Contents">Validation error</text:p>
          </table:table-cell>
        </table:table-row>
        <table:table-row>
          <table:table-cell table:style-name="Table13.A1" office:value-type="string">
            <text:p text:style-name="Table_20_Contents">Timeout website</text:p>
          </table:table-cell>
          <table:table-cell table:style-name="Table13.A1" office:value-type="string">
            <text:p text:style-name="Table_20_Contents">Exception handled</text:p>
          </table:table-cell>
        </table:table-row>
        <table:table-row>
          <table:table-cell table:style-name="Table13.A1" office:value-type="string">
            <text:p text:style-name="Table_20_Contents">Dynamic website</text:p>
          </table:table-cell>
          <table:table-cell table:style-name="Table13.A1" office:value-type="string">
            <text:p text:style-name="Table_20_Contents">Warning</text:p>
          </table:table-cell>
        </table:table-row>
        <table:table-row>
          <table:table-cell table:style-name="Table13.A1" office:value-type="string">
            <text:p text:style-name="Table_20_Contents">Large page</text:p>
          </table:table-cell>
          <table:table-cell table:style-name="Table13.A1" office:value-type="string">
            <text:p text:style-name="Table_20_Contents">Load successfully</text:p>
          </table:table-cell>
        </table:table-row>
      </table:table>
      <text:p text:style-name="P81"/>
      <text:h text:style-name="P78" text:outline-level="1">D. Pipeline Testing</text:h>
      <text:h text:style-name="P85" text:outline-level="2">Test 1</text:h>
      <text:p text:style-name="P79">Input:</text:p>
      <text:p text:style-name="P84"><text:span text:style-name="Source_20_Text">sample.pdf</text:span></text:p>
      <text:p text:style-name="P79">Expected:</text:p>
      <text:p text:style-name="P83"><text:span text:style-name="Source_20_Text">Loader:</text:span></text:p>
      <text:p text:style-name="P83"/>
      <text:p text:style-name="P84"><text:span text:style-name="Source_20_Text">PyPDFLoader</text:span></text:p>
      <text:p text:style-name="P81"/>
      <text:h text:style-name="P85" text:outline-level="2">Test 2</text:h>
      <text:p text:style-name="P79">Input:</text:p>
      <text:p text:style-name="P84"><text:span text:style-name="Source_20_Text">sample.docx</text:span></text:p>
      <text:p text:style-name="P79">Expected:</text:p>
      <text:p text:style-name="P83"><text:span text:style-name="Source_20_Text">Loader:</text:span></text:p>
      <text:p text:style-name="P83"/>
      <text:p text:style-name="P84"><text:span text:style-name="Source_20_Text">Docx2txtLoader</text:span></text:p>
      <text:p text:style-name="P81"/>
      <text:h text:style-name="P85" text:outline-level="2">Test 3</text:h>
      <text:p text:style-name="P79">Input:</text:p>
      <text:p text:style-name="P84"><text:span text:style-name="Source_20_Text">https://example.com</text:span></text:p>
      <text:p text:style-name="P79">Expected:</text:p>
      <text:p text:style-name="P83"><text:span text:style-name="Source_20_Text">Loader:</text:span></text:p>
      <text:p text:style-name="P83"/>
      <text:p text:style-name="P84"><text:span text:style-name="Source_20_Text">WebBaseLoader</text:span></text:p>
      <text:p text:style-name="P81"><text:soft-page-break/></text:p>
      <text:h text:style-name="P78" text:outline-level="1">16. Bài tập mở rộng</text:h>
      <text:h text:style-name="P85" text:outline-level="2">Task 1: Add TXT Loader</text:h>
      <text:p text:style-name="P79">Thêm:</text:p>
      <text:p text:style-name="P84"><text:span text:style-name="Source_20_Text">TextLoader</text:span></text:p>
      <text:p text:style-name="P79">Support:</text:p>
      <text:p text:style-name="P84"><text:span text:style-name="Source_20_Text">.txt</text:span></text:p>
      <text:p text:style-name="P81"/>
      <text:h text:style-name="P85" text:outline-level="2">Task 2: Add CSV Loader</text:h>
      <text:p text:style-name="P79">Support:</text:p>
      <text:p text:style-name="P84"><text:span text:style-name="Source_20_Text">.csv</text:span></text:p>
      <text:p text:style-name="P79">Sử dụng:</text:p>
      <text:p text:style-name="P84"><text:span text:style-name="Source_20_Text">CSVLoader</text:span></text:p>
      <text:p text:style-name="P81"/>
      <text:h text:style-name="P85" text:outline-level="2">Task 3: Add Batch Processing</text:h>
      <text:p text:style-name="P79">Input:</text:p>
      <text:p text:style-name="P83"><text:span text:style-name="Source_20_Text">data/</text:span></text:p>
      <text:p text:style-name="P83"/>
      <text:p text:style-name="P83"><text:span text:style-name="Source_20_Text">├── a.pdf</text:span></text:p>
      <text:p text:style-name="P83"><text:span text:style-name="Source_20_Text">├── b.docx</text:span></text:p>
      <text:p text:style-name="P83"><text:span text:style-name="Source_20_Text">└── c.pdf</text:span></text:p>
      <text:p text:style-name="P84"/>
      <text:p text:style-name="P79">Output:</text:p>
      <text:p text:style-name="P83"><text:span text:style-name="Source_20_Text">Total documents:</text:span></text:p>
      <text:p text:style-name="P83"/>
      <text:p text:style-name="P84"><text:span text:style-name="Source_20_Text">15</text:span></text:p>
      <text:p text:style-name="P81"/>
      <text:h text:style-name="P85" text:outline-level="2">Task 4: Prepare RAG Pipeline</text:h>
      <text:p text:style-name="P79">Mở rộng:</text:p>
      <text:p text:style-name="P83"><text:soft-page-break/><text:span text:style-name="Source_20_Text">Multi Source Loader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Document Objects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RecursiveCharacterTextSplitter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Embedding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ChromaDB</text:span></text:p>
      <text:p text:style-name="P83"/>
      <text:p text:style-name="P83"><text:span text:style-name="Source_20_Text"><text:s text:c="8"/>↓</text:span></text:p>
      <text:p text:style-name="P83"/>
      <text:p text:style-name="P84"><text:span text:style-name="Source_20_Text">Retriever</text:span></text:p>
      <text:p text:style-name="P81"/>
      <text:h text:style-name="P78" text:outline-level="1">17. Kết quả đạt được sau Mini Project</text:h>
      <text:p text:style-name="P79">Sau khi hoàn thành project, AI Engineer Intern có thể:</text:p>
      <text:h text:style-name="P85" text:outline-level="2">Knowledge</text:h>
      <text:list text:style-name="L78">
        <text:list-item>
          <text:p text:style-name="P99">Hiểu Data Ingestion Pipeline.</text:p>
        </text:list-item>
        <text:list-item>
          <text:p text:style-name="P99">Hiểu Document Loader Architecture.</text:p>
        </text:list-item>
        <text:list-item>
          <text:p text:style-name="P99">Biết cách xử lý nhiều nguồn dữ liệu.</text:p>
        </text:list-item>
      </text:list>
      <text:h text:style-name="P85" text:outline-level="2">Technical Skills</text:h>
      <text:p text:style-name="P79">Có thể:</text:p>
      <text:list text:style-name="L79">
        <text:list-item>
          <text:p text:style-name="P100">Xây dựng Loader Pipeline.</text:p>
        </text:list-item>
        <text:list-item>
          <text:p text:style-name="P100">Làm việc với PDF/DOCX/Web.</text:p>
        </text:list-item>
        <text:list-item>
          <text:p text:style-name="P100">Quản lý Document Object.</text:p>
        </text:list-item>
        <text:list-item>
          <text:p text:style-name="P100">Xử lý lỗi.</text:p>
        </text:list-item>
        <text:list-item>
          <text:p text:style-name="P100">Chuẩn bị dữ liệu cho RAG.</text:p>
        </text:list-item>
      </text:list>
      <text:h text:style-name="P85" text:outline-level="2"><text:soft-page-break/>Next Step trong RAG Roadmap</text:h>
      <text:p text:style-name="P83"><text:span text:style-name="Source_20_Text">Document Loading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Text Splitting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Chunk Optimization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Embedding Model</text:span></text:p>
      <text:p text:style-name="P83"/>
      <text:p text:style-name="P83"><text:span text:style-name="Source_20_Text"><text:s text:c="8"/>↓</text:span></text:p>
      <text:p text:style-name="P83"/>
      <text:p text:style-name="P83"><text:span text:style-name="Source_20_Text">Vector Database</text:span></text:p>
      <text:p text:style-name="P83"/>
      <text:p text:style-name="P83"><text:span text:style-name="Source_20_Text"><text:s text:c="8"/>↓</text:span></text:p>
      <text:p text:style-name="P83"/>
      <text:p text:style-name="P84"><text:span text:style-name="Source_20_Text">Retriever</text:span></text:p>
      <text:p text:style-name="P76"><text:line-break/></text:p>
      <text:p text:style-name="P76"/>
      <text:p text:style-name="P76">8. Testing &amp; Review</text:p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7T08:21:38.937898067</meta:creation-date>
    <dc:date>2026-07-17T09:39:20.833917826</dc:date>
    <meta:editing-duration>PT1M</meta:editing-duration>
    <meta:editing-cycles>1</meta:editing-cycles>
    <meta:document-statistic meta:table-count="13" meta:image-count="0" meta:object-count="0" meta:page-count="139" meta:paragraph-count="3595" meta:word-count="8241" meta:character-count="53979" meta:non-whitespace-character-count="45295"/>
    <meta:generator>LibreOffice/26.2.4.2$Linux_X86_64 LibreOffice_project/0229ac93fcf0d7cbc6376066c6f35021cef002dc</meta:generator>
  </office:meta>
</office:document-meta>
</file>